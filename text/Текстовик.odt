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3000003F4C418C31F.png" manifest:media-type="image/png"/>
  <manifest:file-entry manifest:full-path="Pictures/10000001000005E3000003F40E1DBFF7.png" manifest:media-type="image/png"/>
  <manifest:file-entry manifest:full-path="Pictures/10000001000005E3000003F484B186BF.png" manifest:media-type="image/png"/>
  <manifest:file-entry manifest:full-path="Pictures/10000001000005E3000003F4DE5E6B60.png" manifest:media-type="image/png"/>
  <manifest:file-entry manifest:full-path="Pictures/10000001000005E3000003F416332F05.png" manifest:media-type="image/png"/>
  <manifest:file-entry manifest:full-path="Pictures/10000001000005E3000003F465AC5D0C.png" manifest:media-type="image/png"/>
  <manifest:file-entry manifest:full-path="Pictures/10000001000005E3000003F421C42F62.png" manifest:media-type="image/png"/>
  <manifest:file-entry manifest:full-path="Pictures/10000001000005E3000003F4E19DD676.png" manifest:media-type="image/png"/>
  <manifest:file-entry manifest:full-path="Pictures/10000001000006040000041F50745D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8.013cm" table:align="right" style:writing-mode="lr-tb"/>
    </style:style>
    <style:style style:name="Table5.A" style:family="table-column">
      <style:table-column-properties style:column-width="8.013cm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4cm" style:rel-column-width="61271*"/>
    </style:style>
    <style:style style:name="Table2.B" style:family="table-column">
      <style:table-column-properties style:column-width="1.106cm" style:rel-column-width="4264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none" fo:border-bottom="1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5.894cm" style:rel-column-width="61271*"/>
    </style:style>
    <style:style style:name="Table3.B" style:family="table-column">
      <style:table-column-properties style:column-width="1.106cm" style:rel-column-width="4264*"/>
    </style:style>
    <style:style style:name="Table3.A1" style:family="table-cell">
      <style:table-cell-properties fo:padding="0.097cm" fo:border="none"/>
    </style:style>
    <style:style style:name="Table3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rsid="001f9141" officeooo:paragraph-rsid="001f9141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d1e9e" officeooo:paragraph-rsid="001d1e9e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01d1e9e" officeooo:paragraph-rsid="001d1e9e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text-position="super 58%" style:font-name="Times New Roman" fo:font-size="12pt" officeooo:rsid="001d1e9e" officeooo:paragraph-rsid="001d1e9e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1e55c6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text-position="super 58%" style:font-name="Times New Roman" fo:font-size="12pt" officeooo:rsid="001e55c6" officeooo:paragraph-rsid="001e55c6" style:font-size-asian="12pt" style:font-size-complex="12pt"/>
    </style:style>
    <style:style style:name="P13" style:family="paragraph" style:parent-style-name="Contents_20_Heading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4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Contents_20_1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298290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2fade3" officeooo:paragraph-rsid="002fade3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e55c6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Contents_20_1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e55c6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135c9d" style:font-size-asian="14pt" style:font-name-complex="Times New Roman1" style:font-size-complex="14pt">
        <loext:char-complex-color loext:theme-type="dark1" loext:color-type="theme"/>
      </style:text-properties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/>
    </style:style>
    <style:style style:name="P27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30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1015cf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1015cf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6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1932d6" style:font-size-asian="12pt" style:font-size-complex="12pt"/>
    </style:style>
    <style:style style:name="P5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235878" style:font-size-asian="14pt" style:font-weight-asian="bold" style:font-name-complex="Times New Roman1" style:font-size-complex="14pt" style:font-weight-complex="bold"/>
    </style:style>
    <style:style style:name="P64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152f05" officeooo:paragraph-rsid="00152f05" style:font-size-asian="14pt" style:font-size-complex="14pt"/>
    </style:style>
    <style:style style:name="P65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2fade3" officeooo:paragraph-rsid="002fade3" style:font-size-asian="14pt" style:font-size-complex="14pt"/>
    </style:style>
    <style:style style:name="P66" style:family="paragraph" style:parent-style-name="Standard">
      <style:paragraph-properties fo:margin-left="0cm" fo:margin-top="0cm" fo:margin-bottom="0cm" style:contextual-spacing="false" fo:line-height="100%" fo:orphans="2" fo:widows="2" fo:hyphenation-ladder-count="no-limit" fo:hyphenation-keep="page" loext:hyphenation-keep-type="column" loext:hyphenation-keep-line="true" fo:text-indent="1.251cm" style:auto-text-indent="false" style:writing-mode="lr-tb"/>
      <style:text-properties style:use-window-font-color="true" loext:opacity="0%" style:font-name="Times New Roman" fo:font-size="14pt" fo:language="ru" fo:country="RU" officeooo:paragraph-rsid="00235878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Table_20_Contents">
      <style:paragraph-properties fo:margin-left="0cm" fo:margin-top="0cm" fo:margin-bottom="0cm" style:contextual-spacing="false" fo:line-height="100%" fo:text-indent="0cm" style:auto-text-indent="false"/>
      <style:text-properties style:font-name="Times New Roman" fo:font-size="14pt" officeooo:rsid="002fade3" officeooo:paragraph-rsid="002fade3" style:font-size-asian="14pt" style:font-size-complex="14pt"/>
    </style:style>
    <style:style style:name="P68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paragraph-rsid="00152f05" style:font-size-asian="14pt" style:font-size-complex="14pt"/>
    </style:style>
    <style:style style:name="P6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7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6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7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rsid="003329bb" officeooo:paragraph-rsid="003329bb" style:font-size-asian="14pt" style:font-weight-asian="normal" style:font-name-complex="Times New Roman1" style:font-size-complex="14pt" style:font-weight-complex="normal"/>
    </style:style>
    <style:style style:name="P80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paragraph-rsid="000ee979" style:font-size-asian="14pt" style:font-weight-asian="bold" style:font-name-complex="Times New Roman1" style:font-size-complex="14pt" style:font-weight-complex="bold"/>
    </style:style>
    <style:style style:name="P81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0ee979" style:font-size-asian="14pt" style:font-weight-asian="bold" style:font-name-complex="Times New Roman1" style:font-size-complex="14pt" style:font-weight-complex="bold"/>
    </style:style>
    <style:style style:name="P82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5ef2" style:font-size-asian="14pt" style:font-weight-asian="normal" style:font-name-complex="Times New Roman1" style:font-size-complex="14pt" style:font-weight-complex="normal"/>
    </style:style>
    <style:style style:name="P83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5d616" officeooo:paragraph-rsid="0025d616" style:font-size-asian="14pt" style:font-weight-asian="normal" style:font-name-complex="Times New Roman1" style:font-size-complex="14pt" style:font-weight-complex="normal"/>
    </style:style>
    <style:style style:name="P8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5878" style:font-size-asian="14pt" style:font-weight-asian="bold" style:font-name-complex="Times New Roman1" style:font-size-complex="14pt" style:font-weight-complex="bold"/>
    </style:style>
    <style:style style:name="P8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6d7bc" officeooo:paragraph-rsid="0026d7bc" style:font-size-asian="14pt" style:font-weight-asian="normal" style:font-name-complex="Times New Roman1" style:font-size-complex="14pt" style:font-weight-complex="normal"/>
    </style:style>
    <style:style style:name="P86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8d57f" officeooo:paragraph-rsid="0028d57f" style:font-size-asian="14pt" style:font-weight-asian="normal" style:font-name-complex="Times New Roman1" style:font-size-complex="14pt" style:font-weight-complex="normal"/>
    </style:style>
    <style:style style:name="P8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8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8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0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1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fad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letter-kerning="false" style:language-asian="ru" style:country-asian="RU" style:font-weight-asian="normal" style:font-name-complex="Times New Roman1" style:font-weight-complex="normal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fo:language="en" fo:country="US" style:font-size-asian="14pt" style:font-name-complex="Times New Roman1" style:font-size-complex="14pt"/>
    </style:style>
    <style:style style:name="T8" style:family="text">
      <style:text-properties fo:color="#000000" loext:opacity="100%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10" style:family="text">
      <style:text-properties officeooo:rsid="001f9141"/>
    </style:style>
    <style:style style:name="T11" style:family="text">
      <style:text-properties fo:font-size="14pt" style:letter-kerning="false" style:font-size-asian="14pt" style:font-name-complex="Times New Roman1" style:font-size-complex="14pt"/>
    </style:style>
    <style:style style:name="T12" style:family="text">
      <style:text-properties style:font-name-complex="Times New Roman1"/>
    </style:style>
    <style:style style:name="T13" style:family="text">
      <style:text-properties officeooo:rsid="001ca533" style:font-name-complex="Times New Roman1"/>
    </style:style>
    <style:style style:name="T14" style:family="text">
      <style:text-properties officeooo:rsid="00174b0a"/>
    </style:style>
    <style:style style:name="T15" style:family="text">
      <style:text-properties officeooo:rsid="001ca533"/>
    </style:style>
    <style:style style:name="T16" style:family="text">
      <style:text-properties officeooo:rsid="00135c9d"/>
    </style:style>
    <style:style style:name="T17" style:family="text">
      <style:text-properties officeooo:rsid="0009e7a5"/>
    </style:style>
    <style:style style:name="T18" style:family="text">
      <style:text-properties officeooo:rsid="000d01d4"/>
    </style:style>
    <style:style style:name="T19" style:family="text">
      <style:text-properties officeooo:rsid="0018f2a4"/>
    </style:style>
    <style:style style:name="T20" style:family="text">
      <style:text-properties officeooo:rsid="0027aad2"/>
    </style:style>
    <style:style style:name="T21" style:family="text">
      <style:text-properties officeooo:rsid="00235878"/>
    </style:style>
    <style:style style:name="T22" style:family="text">
      <style:text-properties fo:font-weight="normal" officeooo:rsid="00235878" style:font-weight-asian="normal" style:font-weight-complex="normal"/>
    </style:style>
    <style:style style:name="T23" style:family="text">
      <style:text-properties officeooo:rsid="000ee979"/>
    </style:style>
    <style:style style:name="T24" style:family="text">
      <style:text-properties officeooo:rsid="003329bb"/>
    </style:style>
    <style:style style:name="T25" style:family="text">
      <style:text-properties officeooo:rsid="002910d9"/>
    </style:style>
    <style:style style:name="T26" style:family="text">
      <style:text-properties officeooo:rsid="00235ef2"/>
    </style:style>
    <style:style style:name="T27" style:family="text">
      <style:text-properties officeooo:rsid="0023f2f2"/>
    </style:style>
    <style:style style:name="T28" style:family="text">
      <style:text-properties officeooo:rsid="002d0ac1"/>
    </style:style>
    <style:style style:name="T29" style:family="text">
      <style:text-properties officeooo:rsid="002ed4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сударственное автономное профессиональное</text:h>
      <text:h text:style-name="P1" text:outline-level="2">образовательное учреждение</text:h>
      <text:h text:style-name="P1" text:outline-level="2">«Читинский педагогический колледж»</text:h>
      <text:h text:style-name="P2" text:outline-level="2"/>
      <text:h text:style-name="P3" text:outline-level="2">Кафедра информационных технологий и программирования</text:h>
      <text:h text:style-name="P4" text:outline-level="2"/>
      <text:h text:style-name="P5" text:outline-level="2">Специальность 09.02.07 Информационные системы и программирование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6" text:outline-level="2">ВЫПУСКНАЯ КВАЛИФИКАЦИОННАЯ РАБОТА</text:h>
      <text:h text:style-name="P6" text:outline-level="2">Дипломный проект</text:h>
      <text:h text:style-name="P4" text:outline-level="2"/>
      <text:h text:style-name="P6" text:outline-level="2">Разработка десктопного приложения для онлайн-школы по программированию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Выполнил:</text:p>
          </table:table-cell>
        </table:table-row>
        <table:table-row>
          <table:table-cell table:style-name="Table5.A1" office:value-type="string">
            <text:p text:style-name="P8">Богодухов А.Г.</text:p>
          </table:table-cell>
        </table:table-row>
        <table:table-row>
          <table:table-cell table:style-name="Table5.A1" office:value-type="string">
            <text:p text:style-name="P8">студент<text:tab/><text:tab/>401<text:tab/><text:tab/>группы</text:p>
          </table:table-cell>
        </table:table-row>
        <table:table-row>
          <table:table-cell table:style-name="Table5.A1" office:value-type="string">
            <text:p text:style-name="P9">Руководитель</text:p>
          </table:table-cell>
        </table:table-row>
        <table:table-row>
          <table:table-cell table:style-name="Table5.A1" office:value-type="string">
            <text:p text:style-name="P10">подпись</text:p>
          </table:table-cell>
        </table:table-row>
        <table:table-row>
          <table:table-cell table:style-name="Table5.A1" office:value-type="string">
            <text:p text:style-name="P11">Трушина Е.Г.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  <table:table-row>
          <table:table-cell table:style-name="Table5.A1" office:value-type="string">
            <text:p text:style-name="P11">Допущен к защите</text:p>
          </table:table-cell>
        </table:table-row>
        <table:table-row>
          <table:table-cell table:style-name="Table5.A1" office:value-type="string">
            <text:p text:style-name="P11">Зав. кафедрой</text:p>
          </table:table-cell>
        </table:table-row>
        <table:table-row>
          <table:table-cell table:style-name="Table5.A1" office:value-type="string">
            <text:p text:style-name="P12">подпись</text:p>
          </table:table-cell>
        </table:table-row>
        <table:table-row>
          <table:table-cell table:style-name="Table5.A1" office:value-type="string">
            <text:p text:style-name="P11">Медведкова Ю.К.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  <table:table-row>
          <table:table-cell table:style-name="Table5.A1" office:value-type="string">
            <text:p text:style-name="P11">Оценка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</table:table>
      <text:p text:style-name="P13"/>
      <text:p text:style-name="P14">СОДЕРЖАНИЕ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. Пояснительная записка<text:span text:style-name="T1"> ..............................................................................</text:span></text:p>
          </table:table-cell>
          <table:table-cell table:style-name="Table2.A1" office:value-type="string">
            <text:p text:style-name="P17">3</text:p>
          </table:table-cell>
        </table:table-row>
        <table:table-row>
          <table:table-cell table:style-name="Table2.A1" office:value-type="string">
            <text:p text:style-name="P18">1.1. Квалификационные характеристики проекта ................................</text:p>
          </table:table-cell>
          <table:table-cell table:style-name="Table2.A1" office:value-type="string">
            <text:p text:style-name="P19">3</text:p>
          </table:table-cell>
        </table:table-row>
        <table:table-row>
          <table:table-cell table:style-name="Table2.A1" office:value-type="string">
            <text:p text:style-name="P18">1.2. Описание предметной области ........................................................</text:p>
          </table:table-cell>
          <table:table-cell table:style-name="Table2.B3" office:value-type="float" office:value="5">
            <text:p text:style-name="P19">5</text:p>
          </table:table-cell>
        </table:table-row>
        <table:table-row>
          <table:table-cell table:style-name="Table2.A1" office:value-type="string">
            <text:p text:style-name="P18">1.3. Техническое задание .........................................................................</text:p>
          </table:table-cell>
          <table:table-cell table:style-name="Table2.A1" office:value-type="string">
            <text:p text:style-name="P19">1<text:span text:style-name="T2">2</text:span></text:p>
          </table:table-cell>
        </table:table-row>
        <table:table-row>
          <table:table-cell table:style-name="Table2.A1" office:value-type="string">
            <text:p text:style-name="P16">2. Проектная часть<text:span text:style-name="T1"> ...........................................................................................</text:span></text:p>
          </table:table-cell>
          <table:table-cell table:style-name="Table2.A1" office:value-type="string">
            <text:p text:style-name="P17">19</text:p>
          </table:table-cell>
        </table:table-row>
        <table:table-row>
          <table:table-cell table:style-name="Table2.A1" office:value-type="string">
            <text:p text:style-name="P18">2.1. Проектирование программного продукта ......................................</text:p>
          </table:table-cell>
          <table:table-cell table:style-name="Table2.A1" office:value-type="string">
            <text:p text:style-name="P17">19</text:p>
          </table:table-cell>
        </table:table-row>
        <table:table-row>
          <table:table-cell table:style-name="Table2.A1" office:value-type="string">
            <text:p text:style-name="P18">2.2. Руководство пользователя ...............................................................</text:p>
          </table:table-cell>
          <table:table-cell table:style-name="Table2.A1" office:value-type="string">
            <text:p text:style-name="P17">20</text:p>
          </table:table-cell>
        </table:table-row>
        <table:table-row>
          <table:table-cell table:style-name="Table2.A1" office:value-type="string">
            <text:p text:style-name="P18">2.3. Результаты апробации ......................................................................</text:p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20"><text:span text:style-name="T3">Заключение </text:span><text:span text:style-name="T4">........................................................................................................</text:span></text:p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20"><text:span text:style-name="T3">Список использованных источников </text:span><text:span text:style-name="T4">..........................................................</text:span></text:p>
          </table:table-cell>
          <table:table-cell table:style-name="Table2.A1" office:value-type="string">
            <text:p text:style-name="P19"/>
          </table:table-cell>
        </table:table-row>
      </table:table>
      <text:p text:style-name="P21"/>
      <text:p text:style-name="P22">1. ПОЯСНИТЕЛЬНАЯ ЗАПИСКА</text:p>
      <text:p text:style-name="P23"/>
      <text:p text:style-name="P23">1.1. Квалификационные характеристики проекта</text:p>
      <text:p text:style-name="P23"/>
      <text:p text:style-name="P24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- ключевую роль играет регулярная практическая работа с кодом и получение оперативной обратной связи по результатам выполнения заданий.</text:p>
      <text:p text:style-name="P25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p>
      <text:p text:style-name="P25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 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качества формирования практических навыков программирования у обучающихся.</text:p>
      <text:p text:style-name="P26"><text:soft-page-break/><text:span text:style-name="T5">Объектом</text:span><text:span text:style-name="T6"> дипломного проекта является процесс разработки приложения.</text:span></text:p>
      <text:p text:style-name="P26"><text:span text:style-name="T5">Предметом</text:span><text:span text:style-name="T6"> дипломного проекта является создание десктопного приложения с клиент-серверной архитектурой с помощью </text:span><text:span text:style-name="T7">Qt</text:span><text:span text:style-name="T6"> на языке </text:span><text:span text:style-name="T7">C</text:span><text:span text:style-name="T6">++.</text:span></text:p>
      <text:p text:style-name="P26"><text:span text:style-name="T5">Целью</text:span><text:span text:style-name="T6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6"><text:span text:style-name="T6">В соответствии с поставленной целью в работе необходимо решить следующие </text:span><text:span text:style-name="T5">задачи</text:span><text:span text:style-name="T6">:</text:span></text:p>
      <text:list xml:id="list1458461042" text:style-name="WWNum7">
        <text:list-item text:start-value="1">
          <text:p text:style-name="P27">Изучить и проанализировать предметную область.</text:p>
        </text:list-item>
        <text:list-item text:style-override="WWNum3">
          <text:p text:style-name="P28">Разработать техническое задание.</text:p>
        </text:list-item>
        <text:list-item text:style-override="WWNum3">
          <text:p text:style-name="P28">Создать программное обеспечение.</text:p>
        </text:list-item>
        <text:list-item text:style-override="WWNum3">
          <text:p text:style-name="P28">Разработать пользовательский интерфейс приложения.</text:p>
        </text:list-item>
        <text:list-item text:style-override="WWNum3">
          <text:p text:style-name="P28">Подготовить руководство пользователя.</text:p>
        </text:list-item>
      </text:list>
      <text:p text:style-name="P26"><text:span text:style-name="T8">Тип проекта</text:span><text:span text:style-name="T9">: практико-ориентированный.</text:span></text:p>
      <text:p text:style-name="P26"><text:span text:style-name="T8">Этапы работы над проектом</text:span><text:span text:style-name="T9">:</text:span></text:p>
      <text:list text:style-name="WWNum2">
        <text:list-item>
          <text:p text:style-name="P29">Аналитический этап: исследование предметной области, анализ требований</text:p>
        </text:list-item>
        <text:list-item>
          <text:p text:style-name="P29">Проектирование: разработка архитектуры, проектирование интерфейсов</text:p>
        </text:list-item>
        <text:list-item>
          <text:p text:style-name="P29">Реализация: программирование клиентской и серверной частей</text:p>
        </text:list-item>
        <text:list-item>
          <text:p text:style-name="P29">Интеграция: объединение компонентов</text:p>
        </text:list-item>
        <text:list-item>
          <text:p text:style-name="P29">Тестирование: функциональное и интеграционное тестирование</text:p>
        </text:list-item>
        <text:list-item>
          <text:p text:style-name="P29">Документирование: написание технической документации</text:p>
        </text:list-item>
      </text:list>
      <text:p text:style-name="P26"><text:span text:style-name="T5">Прикладная ценность проекта</text:span><text:span text:style-name="T6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</text:span><text:soft-page-break/><text:span text:style-name="T6">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26"><text:span text:style-name="T5">Критерии эффективности проекта</text:span><text:span text:style-name="T6">:</text:span></text:p>
      <text:list xml:id="list3770890234" text:style-name="WWNum8">
        <text:list-item text:start-value="1">
          <text:p text:style-name="P30">Корректность выполнения программных заданий и точность проверки результатов работы пользователей.</text:p>
        </text:list-item>
        <text:list-item text:style-override="WWNum4">
          <text:p text:style-name="P31">Понятность и простота использования приложения.</text:p>
        </text:list-item>
        <text:list-item text:style-override="WWNum4">
          <text:p text:style-name="P31">Стабильность работы системы при взаимодействии пользователей с учебными материалами и заданиями.</text:p>
        </text:list-item>
      </text:list>
      <text:p text:style-name="P32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p>
      <text:p text:style-name="P33"/>
      <text:p text:style-name="P23">1.2. Описание предметной области</text:p>
      <text:p text:style-name="P34"/>
      <text:p text:style-name="P32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быстрого развития информационных технологий и роста потребности в <text:span text:style-name="T10">IT</text:span>-специалистах.</text:p>
      <text:p text:style-name="P26"><text:span text:style-name="T6">Особенностью онлайн-обучения является высокая степень самостоятельности обучающихся. Пользователь самостоятельно планирует темп </text:span><text:soft-page-break/><text:span text:style-name="T6">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/text:p>
      <text:p text:style-name="P32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p>
      <text:p text:style-name="P32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p>
      <text:p text:style-name="P26"><text:span text:style-name="T6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</text:span><text:soft-page-break/><text:span text:style-name="T6">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/text:p>
      <text:p text:style-name="P32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p>
      <text:p text:style-name="P32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p>
      <text:p text:style-name="P26"><text:span text:style-name="T6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</text:span><text:soft-page-break/><text:span text:style-name="T6">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/text:p>
      <text:p text:style-name="P32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p>
      <text:p text:style-name="P32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.</text:p>
      <text:p text:style-name="P26"><text:span text:style-name="T6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</text:span><text:soft-page-break/><text:span text:style-name="T6">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/text:p>
      <text:p text:style-name="P32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p>
      <text:p text:style-name="P32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 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p>
      <text:p text:style-name="P26"><text:soft-page-break/><text:span text:style-name="T6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/text:p>
      <text:p text:style-name="P32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.</text:p>
      <text:p text:style-name="P32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p>
      <text:p text:style-name="P26"><text:soft-page-break/><text:span text:style-name="T6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/text:p>
      <text:p text:style-name="P32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p>
      <text:p text:style-name="P35"><text:span text:style-name="T11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6">архитектуре системы, которые будут рассмотрены в последующих главах работы.</text:span></text:p>
      <text:p text:style-name="P36">1.3. Техническое задание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Техническое задание на разработку программы</text:p>
      <text:p text:style-name="P38">«Десктопное приложение для онлайн-школы по программированию»</text:p>
      <text:p text:style-name="P38"/>
      <text:p text:style-name="P39">Содержание</text:p>
      <text:list xml:id="list601660677" text:style-name="WWNum9">
        <text:list-item text:start-value="1">
          <text:p text:style-name="P40">Введение</text:p>
          <text:list text:style-name="WWNum1">
            <text:list-item>
              <text:p text:style-name="P41">Основание для разработки</text:p>
            </text:list-item>
            <text:list-item>
              <text:p text:style-name="P41">Назначение и область применения</text:p>
            </text:list-item>
          </text:list>
        </text:list-item>
        <text:list-item text:style-override="WWNum1">
          <text:p text:style-name="P41">Требования к программе</text:p>
          <text:list text:style-name="WWNum1">
            <text:list-item>
              <text:p text:style-name="P41">Требования к функциональным характеристикам</text:p>
            </text:list-item>
            <text:list-item>
              <text:p text:style-name="P41">Требования к надёжности</text:p>
              <text:list>
                <text:list-item>
                  <text:p text:style-name="P41">Требования к обеспечению надёжного функционирования программы</text:p>
                </text:list-item>
                <text:list-item>
                  <text:p text:style-name="P41">Время восстановления после отказа</text:p>
                </text:list-item>
                <text:list-item>
                  <text:p text:style-name="P41">Отказы из-за некорректных действий пользовательской системы</text:p>
                </text:list-item>
              </text:list>
            </text:list-item>
          </text:list>
        </text:list-item>
        <text:list-item text:style-override="WWNum1">
          <text:p text:style-name="P41">Условия эксплуатации</text:p>
          <text:list text:style-name="WWNum1">
            <text:list-item>
              <text:p text:style-name="P41">Климатические условия эксплуатации</text:p>
            </text:list-item>
            <text:list-item>
              <text:p text:style-name="P41">Требования к квалификации и численности персонала</text:p>
            </text:list-item>
            <text:list-item>
              <text:p text:style-name="P41">Требования к составу и параметрам технических средств</text:p>
            </text:list-item>
            <text:list-item>
              <text:p text:style-name="P41">Требования к информационной и программной совместимости</text:p>
              <text:list>
                <text:list-item>
                  <text:p text:style-name="P41">Требования к информационным структурам и методам решения</text:p>
                </text:list-item>
                <text:list-item>
                  <text:p text:style-name="P41">Требования к исходным кодам и языкам программирования</text:p>
                </text:list-item>
                <text:list-item>
                  <text:p text:style-name="P41">Требования к программным средствам, используемым программой</text:p>
                </text:list-item>
                <text:list-item>
                  <text:p text:style-name="P41">Требования к защите информации и программ</text:p>
                </text:list-item>
              </text:list>
            </text:list-item>
            <text:list-item>
              <text:p text:style-name="P41">Специальные требования</text:p>
            </text:list-item>
          </text:list>
        </text:list-item>
        <text:list-item text:style-override="WWNum1">
          <text:p text:style-name="P41">Требования к программной документации</text:p>
          <text:list text:style-name="WWNum1">
            <text:list-item>
              <text:p text:style-name="P41">Состав программной документации</text:p>
            </text:list-item>
          </text:list>
        </text:list-item>
        <text:list-item text:style-override="WWNum1">
          <text:p text:style-name="P41">Технико-экономическое обоснование</text:p>
        </text:list-item>
        <text:list-item text:style-override="WWNum1">
          <text:p text:style-name="P41">Стадии и этапы разработки</text:p>
          <text:list text:style-name="WWNum1">
            <text:list-item>
              <text:p text:style-name="P41">Стадии разработки</text:p>
            </text:list-item>
            <text:list-item>
              <text:p text:style-name="P41">Этапы разработки</text:p>
            </text:list-item>
            <text:list-item>
              <text:p text:style-name="P41">Содержание работ по этапам</text:p>
            </text:list-item>
          </text:list>
        </text:list-item>
        <text:list-item text:style-override="WWNum1">
          <text:p text:style-name="P41">Порядок контроля и приемки</text:p>
          <text:list text:style-name="WWNum1">
            <text:list-item>
              <text:p text:style-name="P41">Предварительный контроль</text:p>
            </text:list-item>
            <text:list-item>
              <text:p text:style-name="P41">Тестирование</text:p>
            </text:list-item>
            <text:list-item>
              <text:p text:style-name="P41">Приёмка</text:p>
            </text:list-item>
          </text:list>
        </text:list-item>
      </text:list>
      <text:list xml:id="list1894157401" text:style-name="WWNum10">
        <text:list-item text:start-value="1">
          <text:p text:style-name="P42">Введение</text:p>
          <text:list text:style-name="WWNum5">
            <text:list-item>
              <text:p text:style-name="P43">Основание для разработки</text:p>
              <text:list>
                <text:list-item>
                  <text:p text:style-name="P44">Наименование работы: «Десктопное приложение для онлайн-школы по программированию».</text:p>
                </text:list-item>
                <text:list-item>
                  <text:p text:style-name="P44">Основанием для разработки является задание на выпускную квалификационную работу.</text:p>
                </text:list-item>
                <text:list-item>
                  <text:p text:style-name="P44">Организация, утвердившая договор: Читинский Педагогический колледж.</text:p>
                </text:list-item>
              </text:list>
            </text:list-item>
            <text:list-item>
              <text:p text:style-name="P43">Назначение и область применения</text:p>
              <text:list>
                <text:list-item>
                  <text:p text:style-name="P44">Назначение разработки - создание настольного клиент-серверного приложения для обучения программированию, включающего каталог курсов, теоретические материалы, практические задания, запуск пользовательского кода и проверку решений на сервере.</text:p>
                </text:list-item>
                <text:list-item>
                  <text:p text:style-name="P44">Область применения - учебный процесс в онлайн-школе программирования для студентов и преподавателей.</text:p>
                </text:list-item>
                <text:list-item>
                  <text:p text:style-name="P44">Основные функциональные задачи приложения включают:</text:p>
                  <text:list>
                    <text:list-item>
                      <text:p text:style-name="P44">Регистрацию и авторизацию пользователей с разделением ролей (student, teacher);</text:p>
                    </text:list-item>
                    <text:list-item>
                      <text:p text:style-name="P44">Просмотр списка курсов (языков программирования), списка тем и связанных заданий;</text:p>
                    </text:list-item>
                    <text:list-item>
                      <text:p text:style-name="P44">Просмотр теоретических материалов по выбранной теме (поддержка HTML-разметки в тексте теории);</text:p>
                    </text:list-item>
                    <text:list-item>
                      <text:p text:style-name="P44">Просмотр условия задания и публичного примера ввода/вывода;</text:p>
                    </text:list-item>
                    <text:list-item>
                      <text:p text:style-name="P44">Редактирование и запуск пользовательского кода с передачей входных данных;</text:p>
                    </text:list-item>
                    <text:list-item>
                      <text:p text:style-name="P44">Автоматическую проверку решения на тестах и возврат количества пройденных тестов;</text:p>
                    </text:list-item>
                    <text:list-item>
                      <text:p text:style-name="P44">Отображение прогресса обучения по темам и курсам в профиле пользователя;</text:p>
                    </text:list-item>
                    <text:list-item>
                      <text:p text:style-name="P44">Восстановление пароля по секретному восстановительному полю;</text:p>
                    </text:list-item>
                    <text:list-item>
                      <text:p text:style-name="P44">Администрирование учебного контента преподавателем (создание курсов, тем, заданий и тестов).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text:continue-list="list1894157401" text:style-name="WWNum5">
        <text:list-item>
          <text:p text:style-name="P45"><text:span text:style-name="T12">Требова</text:span><text:span text:style-name="T13">ния</text:span></text:p>
          <text:list>
            <text:list-item>
              <text:p text:style-name="P43">Требования к функциональным характеристикам</text:p>
              <text:list>
                <text:list-item>
                  <text:p text:style-name="P46">Работа с учетными записями и ролями:</text:p>
                  <text:list>
                    <text:list-item>
                      <text:p text:style-name="P46">Программа должна поддерживать регистрацию с обязательным указанием логина, пароля, роли и восстановительного поля;</text:p>
                    </text:list-item>
                    <text:list-item>
                      <text:p text:style-name="P46">Программа должна поддерживать вход по логину и паролю;</text:p>
                    </text:list-item>
                    <text:list-item>
                      <text:p text:style-name="P46">Программа должна поддерживать восстановление пароля по логину, восстановительному полю и новому паролю;</text:p>
                    </text:list-item>
                    <text:list-item>
                      <text:p text:style-name="P46">Для авторизованного пользователя должна поддерживаться сессия по bearer-токену с ограниченным временем жизни;</text:p>
                    </text:list-item>
                    <text:list-item>
                      <text:p text:style-name="P46">Роль teacher должна предоставлять доступ к панели преподавателя, роль student - к пользовательскому режиму обучения.</text:p>
                    </text:list-item>
                  </text:list>
                </text:list-item>
                <text:list-item>
                  <text:p text:style-name="P46">Работа с курсами, темами и заданиями:</text:p>
                  <text:list>
                    <text:list-item>
                      <text:p text:style-name="P46">Должна быть реализована загрузка списка курсов (языков) с кратким описанием и изображением;</text:p>
                    </text:list-item>
                    <text:list-item>
                      <text:p text:style-name="P46">Для выбранного курса должна быть реализована загрузка списка тем;</text:p>
                    </text:list-item>
                    <text:list-item>
                      <text:p text:style-name="P46">Для выбранной темы должна быть реализована загрузка теоретического материала и списка заданий;</text:p>
                    </text:list-item>
                    <text:list-item>
                      <text:p text:style-name="P46">Для выбранного задания должна быть реализована загрузка текста задания и публичного теста (пример входа/выхода);</text:p>
                    </text:list-item>
                    <text:list-item>
                      <text:p text:style-name="P46">Навигация должна обеспечивать последовательный переход: курсы → темы → теория → задание.</text:p>
                    </text:list-item>
                  </text:list>
                </text:list-item>
                <text:list-item>
                  <text:p text:style-name="P46">Редактор и выполнение кода:</text:p>
                  <text:list>
                    <text:list-item>
                      <text:p text:style-name="P46">В клиенте должен быть реализован встроенный редактор текста решения;</text:p>
                    </text:list-item>
                    <text:list-item>
                      <text:p text:style-name="P46"><text:soft-page-break/>Пользователь должен иметь возможность запускать код с произвольным входным набором данных;</text:p>
                    </text:list-item>
                    <text:list-item>
                      <text:p text:style-name="P46">Сервер должен компилировать/исполнять код во временной директории и возвращать результат выполнения;</text:p>
                    </text:list-item>
                    <text:list-item>
                      <text:p text:style-name="P46">Сервер должен поддерживать языки C++, Python, C# и Go;</text:p>
                    </text:list-item>
                    <text:list-item>
                      <text:p text:style-name="P46">При компиляционных ошибках должен возвращаться явный результат «Ошибка компиляции», при ошибках исполнения - соответствующее сообщение.</text:p>
                    </text:list-item>
                  </text:list>
                </text:list-item>
                <text:list-item>
                  <text:p text:style-name="P46">Проверка решений и прогресс:</text:p>
                  <text:list>
                    <text:list-item>
                      <text:p text:style-name="P46">Проверка решения должна выполняться на сервере по набору тестов задания;</text:p>
                    </text:list-item>
                    <text:list-item>
                      <text:p text:style-name="P46">Результатом проверки должно быть количество пройденных тестов и общий итог;</text:p>
                    </text:list-item>
                    <text:list-item>
                      <text:p text:style-name="P46">При полном прохождении тестов задание должно помечаться как решённое;</text:p>
                    </text:list-item>
                    <text:list-item>
                      <text:p text:style-name="P46">При решении всех заданий темы прогресс темы должен устанавливаться в 100%;</text:p>
                    </text:list-item>
                    <text:list-item>
                      <text:p text:style-name="P46">В профиле должен отображаться общий прогресс, список завершённых/незавершённых тем и прогресс по курсам.</text:p>
                    </text:list-item>
                  </text:list>
                </text:list-item>
                <text:list-item>
                  <text:p text:style-name="P46">Функции преподавателя:</text:p>
                  <text:list>
                    <text:list-item>
                      <text:p text:style-name="P46">Преподаватель должен иметь возможность создавать курс (название, краткое описание, URL изображения);</text:p>
                    </text:list-item>
                    <text:list-item>
                      <text:p text:style-name="P46">Преподаватель должен иметь возможность создавать тему (курс, название темы, текст теории);</text:p>
                    </text:list-item>
                    <text:list-item>
                      <text:p text:style-name="P46">Преподаватель должен иметь возможность создавать задание (тема, текст, публичный пример);</text:p>
                    </text:list-item>
                    <text:list-item>
                      <text:p text:style-name="P46">Преподаватель должен иметь возможность добавлять дополнительные тесты к заданию;</text:p>
                    </text:list-item>
                    <text:list-item>
                      <text:p text:style-name="P46">Доступ к операциям создания контента должен быть ограничен серверной проверкой роли teacher.</text:p>
                    </text:list-item>
                  </text:list>
                </text:list-item>
              </text:list>
            </text:list-item>
            <text:list-item>
              <text:p text:style-name="P43">Требования к надёжности</text:p>
              <text:list>
                <text:list-item>
                  <text:p text:style-name="P44">Требования к обеспечению надежного функционирования программы:</text:p>
                  <text:list>
                    <text:list-item>
                      <text:p text:style-name="P44">Все API-методы должны валидировать HTTP-метод запроса и обязательные поля входных данных;</text:p>
                    </text:list-item>
                    <text:list-item>
                      <text:p text:style-name="P44">При ошибках валидации или авторизации сервер должен возвращать структурированный JSON-ответ с кодом ошибки;</text:p>
                    </text:list-item>
                    <text:list-item>
                      <text:p text:style-name="P44">Приложение должно обрабатывать сетевые и серверные ошибки с выводом текста ошибки пользователю;</text:p>
                    </text:list-item>
                    <text:list-item>
                      <text:p text:style-name="P44">Для снижения риска зависаний выполнения кода должны использоваться ограничения по времени компиляции и запуска;</text:p>
                    </text:list-item>
                    <text:list-item>
                      <text:p text:style-name="P44">Временные каталоги выполнения должны очищаться после завершения запуска/проверки;</text:p>
                    </text:list-item>
                    <text:list-item>
                      <text:p text:style-name="P44">Состояние авторизации должно корректно сбрасываться при выходе из аккаунта.</text:p>
                    </text:list-item>
                  </text:list>
                </text:list-item>
                <text:list-item>
                  <text:p text:style-name="P44">Время восстановления после отказа:</text:p>
                  <text:list>
                    <text:list-item>
                      <text:p text:style-name="P44">При отказе клиентской программы восстановление обеспечивается перезапуском приложения;</text:p>
                    </text:list-item>
                    <text:list-item>
                      <text:p text:style-name="P44">При истечении серверной сессии пользователь должен повторно авторизоваться;</text:p>
                    </text:list-item>
                    <text:list-item>
                      <text:p text:style-name="P44">При сбое серверной части восстановление зависит от причины и включает перезапуск web/API-сервиса и проверку БД.</text:p>
                    </text:list-item>
                  </text:list>
                </text:list-item>
                <text:list-item>
                  <text:p text:style-name="P44">Отказы из-за некорректных действий пользователей системы</text:p>
                  <text:list>
                    <text:list-item>
                      <text:p text:style-name="P44">При пустом или некорректном вводе (логин/пароль/код/ID) должны возвращаться сообщения об ошибке;</text:p>
                    </text:list-item>
                    <text:list-item>
                      <text:p text:style-name="P44">При попытке вызова защищённых методов без токена должен возвращаться отказ авторизации;</text:p>
                    </text:list-item>
                    <text:list-item>
                      <text:p text:style-name="P44">При попытке доступа студента к операциям преподавателя должен возвращаться отказ по правам доступа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continue-numbering="true" text:style-name="WWNum5">
        <text:list-item>
          <text:p text:style-name="P45"><text:soft-page-break/><text:span text:style-name="T12">Условия эксплуатации</text:span></text:p>
          <text:list>
            <text:list-item>
              <text:p text:style-name="P43">Климатические условия эксплуатации</text:p>
              <text:list>
                <text:list-item>
                  <text:p text:style-name="P44">Рабочая температура должна находиться в диапазоне от 10 до 35 градусов Цельсия;</text:p>
                </text:list-item>
                <text:list-item>
                  <text:p text:style-name="P44">Рабочая влажность должна быть в диапазоне от 30% до 80%.</text:p>
                </text:list-item>
              </text:list>
            </text:list-item>
            <text:list-item>
              <text:p text:style-name="P43">Требования к квалификации и численности персонала</text:p>
              <text:list>
                <text:list-item>
                  <text:p text:style-name="P44">Для студента и преподавателя специальных навыков администрирования системы не требуется;</text:p>
                </text:list-item>
                <text:list-item>
                  <text:p text:style-name="P44">Для сопровождения серверной части требуется специалист, владеющий PHP, SQL и администрированием Linux-сервера.</text:p>
                </text:list-item>
              </text:list>
            </text:list-item>
            <text:list-item>
              <text:p text:style-name="P43">Требования к составу и параметрам технических средств</text:p>
              <text:list>
                <text:list-item>
                  <text:p text:style-name="P44">Клиентская ОС: Windows 10+ или Linux;</text:p>
                </text:list-item>
                <text:list-item>
                  <text:p text:style-name="P44">Процессор: Intel Core i3 или эквивалент;</text:p>
                </text:list-item>
                <text:list-item>
                  <text:p text:style-name="P44">ОЗУ: не менее <text:span text:style-name="T14">1</text:span> ГБ;</text:p>
                </text:list-item>
                <text:list-item>
                  <text:p text:style-name="P44">Свободное место на диске: не менее <text:span text:style-name="T14">2</text:span>00 МБ для клиента;</text:p>
                </text:list-item>
                <text:list-item>
                  <text:p text:style-name="P44">Постоянное интернет-соединение для работы с API;</text:p>
                </text:list-item>
                <text:list-item>
                  <text:p text:style-name="P44">Сервер: Linux/Unix-подобная ОС, PHP с PDO MySQL, СУБД MySQL/MariaDB;</text:p>
                </text:list-item>
                <text:list-item>
                  <text:p text:style-name="P44">Для выполнения кода на сервере требуются установленные инструменты: g++, python3, mono (mcs/csc+mono), go.</text:p>
                </text:list-item>
              </text:list>
            </text:list-item>
            <text:list-item>
              <text:p text:style-name="P43">Требования к информационной и программной совместимости</text:p>
              <text:list>
                <text:list-item>
                  <text:p text:style-name="P44">Требования к информационным структурам и методам решения:</text:p>
                  <text:list>
                    <text:list-item>
                      <text:p text:style-name="P44">Данные должны храниться в реляционной БД с сущностями пользователей, сессий, языков, тем, заданий, тестов и прогресса;</text:p>
                    </text:list-item>
                    <text:list-item>
                      <text:p text:style-name="P44">Обмен между клиентом и сервером должен осуществляться по HTTP(S) с JSON-полями;</text:p>
                    </text:list-item>
                    <text:list-item>
                      <text:p text:style-name="P44">Идентификаторы курсов, тем и заданий должны использоваться в API-запросах для выборки контента;</text:p>
                    </text:list-item>
                    <text:list-item>
                      <text:p text:style-name="P44">Прогресс должен вычисляться на сервере и передаваться клиенту в агрегированном виде.</text:p>
                    </text:list-item>
                  </text:list>
                </text:list-item>
                <text:list-item>
                  <text:p text:style-name="P44">Требования к исходным кодам и языкам программирования:</text:p>
                  <text:list>
                    <text:list-item>
                      <text:p text:style-name="P44">Клиентская часть реализуется на C++ (Qt) и QML;</text:p>
                    </text:list-item>
                    <text:list-item>
                      <text:p text:style-name="P44">Серверная API-часть реализуется на PHP;</text:p>
                    </text:list-item>
                    <text:list-item>
                      <text:p text:style-name="P44">SQL-скрипт и структура БД должны быть совместимы с MySQL/MariaDB;</text:p>
                    </text:list-item>
                    <text:list-item>
                      <text:p text:style-name="P44">Код должен быть структурирован по модулям: клиентский UI, клиентский API-слой, серверные endpoint-методы.</text:p>
                    </text:list-item>
                  </text:list>
                </text:list-item>
                <text:list-item>
                  <text:p text:style-name="P44">Требования к программным средствам, используемым программой:</text:p>
                  <text:list>
                    <text:list-item>
                      <text:p text:style-name="P44">Клиент использует Qt Quick / Qt Quick Controls / Qt Network;</text:p>
                    </text:list-item>
                    <text:list-item>
                      <text:p text:style-name="P44">Сервер использует PHP PDO и веб-сервер с поддержкой запуска PHP-скриптов;</text:p>
                    </text:list-item>
                    <text:list-item>
                      <text:p text:style-name="P44">Для выполнения пользовательского кода используются системные компиляторы/интерпретаторы и утилита timeout;</text:p>
                    </text:list-item>
                    <text:list-item>
                      <text:p text:style-name="P44">Система должна обеспечивать совместимость протокола API между клиентом и сервером при единых именах endpoint-методов.</text:p>
                    </text:list-item>
                  </text:list>
                </text:list-item>
                <text:list-item>
                  <text:p text:style-name="P44">Требования к защите информации и программ:</text:p>
                  <text:list>
                    <text:list-item>
                      <text:p text:style-name="P44">Пароли и восстановительные данные должны храниться в виде хэшей;</text:p>
                    </text:list-item>
                    <text:list-item>
                      <text:p text:style-name="P44">Доступ к защищённым API-методам должен осуществляться только по bearer-токену;</text:p>
                    </text:list-item>
                    <text:list-item>
                      <text:p text:style-name="P44">Для выполнения пользовательского кода должны применяться ограничения времени выполнения;</text:p>
                    </text:list-item>
                    <text:list-item>
                      <text:p text:style-name="P44">Должно быть реализовано разграничение доступа по ролям и запрет несанкционированных операций.</text:p>
                    </text:list-item>
                  </text:list>
                </text:list-item>
              </text:list>
            </text:list-item>
            <text:list-item>
              <text:p text:style-name="P43">Специальные требования</text:p>
              <text:list>
                <text:list-item>
                  <text:p text:style-name="P44">Интерфейс должен поддерживать пользовательский сценарий без стандартной системной рамки окна (кастомный заголовок окна);</text:p>
                </text:list-item>
                <text:list-item>
                  <text:p text:style-name="P44">Должна поддерживаться стартовая заставка (Splash Screen);</text:p>
                </text:list-item>
                <text:list-item>
                  <text:p text:style-name="P44"><text:soft-page-break/>В профиле должен отображаться детализированный прогресс по темам и курсам;</text:p>
                </text:list-item>
                <text:list-item>
                  <text:p text:style-name="P44">Панель преподавателя должна быть доступна только после авторизации учётной записи с ролью teacher;</text:p>
                </text:list-item>
                <text:list-item>
                  <text:p text:style-name="P44">В программе должен быть реализован выход из аккаунта с очисткой локального состояния авторизации.</text:p>
                </text:list-item>
              </text:list>
            </text:list-item>
          </text:list>
        </text:list-item>
      </text:list>
      <text:p text:style-name="P48"/>
      <text:list text:continue-numbering="true" text:style-name="WWNum5">
        <text:list-item>
          <text:p text:style-name="P43">Требования к программной документации</text:p>
          <text:list>
            <text:list-item>
              <text:p text:style-name="P43">Состав программной документации</text:p>
              <text:list>
                <text:list-item>
                  <text:p text:style-name="P44">Техническое задание;</text:p>
                </text:list-item>
                <text:list-item>
                  <text:p text:style-name="P44">Руководство пользователя.</text:p>
                </text:list-item>
              </text:list>
            </text:list-item>
          </text:list>
        </text:list-item>
      </text:list>
      <text:p text:style-name="P48"/>
      <text:list text:continue-numbering="true" text:style-name="WWNum5">
        <text:list-item>
          <text:p text:style-name="P43">Технико-экономическое обоснование</text:p>
          <text:list>
            <text:list-item>
              <text:p text:style-name="P44">Разработка ориентирована на учебный процесс и не предполагает коммерческого лицензирования на этапе ВКР;</text:p>
            </text:list-item>
            <text:list-item>
              <text:p text:style-name="P44">Экономическая эффективность выражается в сокращении времени проверки типовых практических задач за счёт автоматизированной проверки;</text:p>
            </text:list-item>
            <text:list-item>
              <text:p text:style-name="P44">Использование открытых технологий (Qt, PHP, MySQL, компиляторы/интерпретаторы) снижает стоимость внедрения.</text:p>
            </text:list-item>
          </text:list>
        </text:list-item>
      </text:list>
      <text:p text:style-name="P48"/>
      <text:list text:continue-numbering="true" text:style-name="WWNum5">
        <text:list-item>
          <text:p text:style-name="P43">Стадии и этапы разработки</text:p>
          <text:list>
            <text:list-item>
              <text:p text:style-name="P43">Стадии разработки</text:p>
              <text:list>
                <text:list-item>
                  <text:p text:style-name="P44">Разработка технического задания;</text:p>
                </text:list-item>
                <text:list-item>
                  <text:p text:style-name="P44">Рабочее проектирование;</text:p>
                </text:list-item>
                <text:list-item>
                  <text:p text:style-name="P44">Внедрение.</text:p>
                </text:list-item>
              </text:list>
            </text:list-item>
            <text:list-item>
              <text:p text:style-name="P43">Этапы разработки</text:p>
              <text:list>
                <text:list-item>
                  <text:p text:style-name="P44">Разработка технического задания;</text:p>
                </text:list-item>
                <text:list-item>
                  <text:p text:style-name="P44">Разработка программы;</text:p>
                </text:list-item>
                <text:list-item>
                  <text:p text:style-name="P44">Разработка программной документации;</text:p>
                </text:list-item>
                <text:list-item>
                  <text:p text:style-name="P44">Испытания программы;</text:p>
                </text:list-item>
                <text:list-item>
                  <text:p text:style-name="P44">Подготовка и передача программы.</text:p>
                </text:list-item>
              </text:list>
            </text:list-item>
            <text:list-item>
              <text:p text:style-name="P43">Содержание работ по этапам</text:p>
              <text:list>
                <text:list-item>
                  <text:p text:style-name="P44">Разработка технического задания:</text:p>
                  <text:list>
                    <text:list-item>
                      <text:p text:style-name="P44">Постановка задачи;</text:p>
                    </text:list-item>
                    <text:list-item>
                      <text:p text:style-name="P44">Определение и уточнение требований к техническим средствам;</text:p>
                    </text:list-item>
                    <text:list-item>
                      <text:p text:style-name="P44">Определение требований к программе;</text:p>
                    </text:list-item>
                    <text:list-item>
                      <text:p text:style-name="P44">Определение стадий, этапов и сроков разработки программы и документации на неё;</text:p>
                    </text:list-item>
                    <text:list-item>
                      <text:p text:style-name="P44">Согласование и утверждение технического задания.</text:p>
                    </text:list-item>
                  </text:list>
                </text:list-item>
                <text:list-item>
                  <text:p text:style-name="P44">Разработка программы:</text:p>
                  <text:list>
                    <text:list-item>
                      <text:p text:style-name="P44">Программирование;</text:p>
                    </text:list-item>
                    <text:list-item>
                      <text:p text:style-name="P44">Отладка программы.</text:p>
                    </text:list-item>
                    <text:list-item>
                      <text:p text:style-name="P44">Разработка программной документации:</text:p>
                      <text:list>
                        <text:list-item>
                          <text:p text:style-name="P44">Разработка программных документов в соответствии с требованиями к составу документации.</text:p>
                        </text:list-item>
                      </text:list>
                    </text:list-item>
                  </text:list>
                </text:list-item>
                <text:list-item>
                  <text:p text:style-name="P44">Испытаний программы:</text:p>
                  <text:list>
                    <text:list-item>
                      <text:p text:style-name="P44">Разработка, согласование и утверждение и методики испытаний;</text:p>
                    </text:list-item>
                    <text:list-item>
                      <text:p text:style-name="P44"><text:s/>Проведение приемо-сдаточных испытаний;</text:p>
                    </text:list-item>
                    <text:list-item>
                      <text:p text:style-name="P44">Корректировка программы и программной документации по результатам испытаний.</text:p>
                    </text:list-item>
                  </text:list>
                </text:list-item>
                <text:list-item>
                  <text:p text:style-name="P44">Подготовка и передача программы:</text:p>
                  <text:list>
                    <text:list-item>
                      <text:p text:style-name="P44">Работа по подготовке и передаче программы и программной документации в эксплуатацию на объектах Заказчика.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text:continue-numbering="true" text:style-name="WWNum5">
        <text:list-item>
          <text:p text:style-name="P43">Порядок контроля и приемки<text:span text:style-name="T3"/></text:p>
          <text:list>
            <text:list-item>
              <text:p text:style-name="P45"><text:soft-page-break/><text:span text:style-name="T12">Предварительный контроль</text:span></text:p>
              <text:list>
                <text:list-item>
                  <text:p text:style-name="P44">Проверка соответствия функциональности приложения требованиям технического задания. Контроль качества кода и отсутствия ошибок.</text:p>
                </text:list-item>
              </text:list>
            </text:list-item>
            <text:list-item>
              <text:p text:style-name="P43">Тестирование</text:p>
              <text:list>
                <text:list-item>
                  <text:p text:style-name="P44">Проверка всех основных функций приложения;</text:p>
                </text:list-item>
                <text:list-item>
                  <text:p text:style-name="P44">Проверка стабильности работы приложения при различных нагрузках;</text:p>
                </text:list-item>
                <text:list-item>
                  <text:p text:style-name="P44">Проверка защиты данных пользователей.</text:p>
                </text:list-item>
              </text:list>
            </text:list-item>
            <text:list-item>
              <text:p text:style-name="P43">Приёмка</text:p>
              <text:list>
                <text:list-item>
                  <text:p text:style-name="P44">Проверка соответствия приложения требованиям безопасности и конфиденциальности данных;</text:p>
                </text:list-item>
                <text:list-item>
                  <text:p text:style-name="P44">Проверка оформления приложения в соответствии с корпоративным стилем компании;</text:p>
                </text:list-item>
                <text:list-item>
                  <text:p text:style-name="P44">Утверждение результатов тестирования.</text:p>
                </text:list-item>
              </text:list>
            </text:list-item>
          </text:list>
        </text:list-item>
      </text:list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0">От ИСПОЛНИТЕЛЯ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0">От ЗАКАЗЧИКА</text:p>
          </table:table-cell>
        </table:table-row>
        <table:table-row>
          <table:table-cell table:style-name="Table4.A2" office:value-type="string">
            <text:p text:style-name="P50">Богодухов А.Г.</text:p>
          </table:table-cell>
          <table:table-cell table:style-name="Table4.A1" office:value-type="string">
            <text:p text:style-name="P51"/>
          </table:table-cell>
          <table:table-cell table:style-name="Table4.A2" office:value-type="string">
            <text:p text:style-name="P50"><text:span text:style-name="T15">ГАПОУ</text:span> «ЧПК»</text:p>
          </table:table-cell>
        </table:table-row>
        <table:table-row>
          <table:table-cell table:style-name="Table4.A1" office:value-type="string">
            <text:p text:style-name="P50">31 октября 2025 г.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0">31 октября 2025 г.</text:p>
          </table:table-cell>
        </table:table-row>
      </table:table>
      <text:p text:style-name="P48"/>
      <text:p text:style-name="P52">2. ПРОЕКТНАЯ ЧАСТЬ</text:p>
      <text:p text:style-name="P34"/>
      <text:p text:style-name="P23">2.1. Проектирование программного продукта</text:p>
      <text:p text:style-name="P53"/>
      <text:p text:style-name="P54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16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16">к</text:span>лиентское приложение - десктопное приложение на Qt + QML (Qt Quick Controls) с С++ модулем доступа к API; <text:span text:style-name="T16">с</text:span>ерверная часть (API) - набор PHP‑скриптов, предоставляющих HTTP‑интерфейс для клиента; <text:span text:style-name="T16">б</text:span>аза данных - схема и стартовые данные (курсы, темы, задания, тесты).</text:p>
      <text:p text:style-name="P54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.</text:p>
      <text:p text:style-name="P54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запуск выполняется с ограничением по времени, входные данные передаются <text:soft-page-break/>через <text:span text:style-name="T17">стандартный вход</text:span>; вывод программы сравнивается с ожидаемым (для проверки по тестам).</text:p>
      <text:p text:style-name="P55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- пользователи (логин, хэш пароля, роль); sessions - сессии авторизации (bearer‑токен с временем жизни); languages - курсы по языкам программирования (название, описание, изображение); themes - темы/уроки, привязанные к языку (lang_id), и теоретический материал; tasks - практические задания, привязанные к теме (theme_id); task_tests - набор тестов для задания (вход/ожидаемый вывод); user_theme_progress, user_task_solved -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54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-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56"/>
      <text:p text:style-name="P57">2.2. Руководство пользователя</text:p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pan text:style-name="T18">Д</text:span>есктопно<text:span text:style-name="T18">е </text:span>приложени<text:span text:style-name="T18">е</text:span> для онлайн-школы по программированию</text:p>
      <text:p text:style-name="P60">Руководство пользователя</text:p>
      <text:p text:style-name="P60">Версия 1.0 </text:p>
      <text:p text:style-name="P60">2026 год</text:p>
      <text:p text:style-name="P61">СОДЕРЖАНИЕ</text:p>
      <text:p text:style-name="P6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3">1. Введение<text:span text:style-name="T1"> .........................................................................................................</text:span></text:p>
          </table:table-cell>
          <table:table-cell table:style-name="Table3.A1" office:value-type="string">
            <text:p text:style-name="P64">2<text:span text:style-name="T19">3</text:span></text:p>
          </table:table-cell>
        </table:table-row>
        <table:table-row>
          <table:table-cell table:style-name="Table3.A1" office:value-type="string">
            <text:p text:style-name="P63">2. Общие сведения о программе <text:span text:style-name="T1">....................................................................</text:span></text:p>
          </table:table-cell>
          <table:table-cell table:style-name="Table3.A1" office:value-type="string">
            <text:p text:style-name="P64">2<text:span text:style-name="T19">4</text:span></text:p>
          </table:table-cell>
        </table:table-row>
        <table:table-row>
          <table:table-cell table:style-name="Table3.A1" office:value-type="string">
            <text:p text:style-name="P63">3. Рекомендуемый первичный порядок действий <text:span text:style-name="T1">.....................................</text:span></text:p>
          </table:table-cell>
          <table:table-cell table:style-name="Table3.B3" office:value-type="float" office:value="26">
            <text:p text:style-name="P65">26</text:p>
          </table:table-cell>
        </table:table-row>
        <table:table-row>
          <table:table-cell table:style-name="Table3.A1" office:value-type="string">
            <text:p text:style-name="P66">3.1. <text:span text:style-name="T20">У</text:span><text:span text:style-name="T21">становка приложения </text:span><text:span text:style-name="T22">.....................................................................</text:span></text:p>
          </table:table-cell>
          <table:table-cell table:style-name="Table3.A1" office:value-type="string">
            <text:p text:style-name="P67">26</text:p>
          </table:table-cell>
        </table:table-row>
        <table:table-row>
          <table:table-cell table:style-name="Table3.A1" office:value-type="string">
            <text:p text:style-name="P63">4. Работа программы <text:span text:style-name="T1">.......................................................................................</text:span></text:p>
          </table:table-cell>
          <table:table-cell table:style-name="Table3.A1" office:value-type="string">
            <text:p text:style-name="P68"/>
          </table:table-cell>
        </table:table-row>
      </table:table>
      <text:p text:style-name="P69"/>
      <text:p text:style-name="P70">1. ВВЕДЕНИЕ</text:p>
      <text:p text:style-name="P53"/>
      <text:p text:style-name="P71">Цель данного руководства -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59">В приложении предусмотрены отдельные сценарии работы для двух ролей -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72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73">2. ОБЩИЕ СВЕДЕНИЯ О ПРОГРАММЕ</text:p>
      <text:p text:style-name="P74"/>
      <text:p text:style-name="P75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-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 (языков программирования)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 (курс, тема, задание, тест).</text:p>
      <text:p text:style-name="P75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Основной маршрут пользователя: «Курсы → Темы → Теория → Задание»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75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<text:soft-page-break/>исходного кода. Рекомендуемая среда эксплуатации: рабочее место пользователя с установленным клиентским приложением Qt/QML; стабильное сетевое <text:span text:style-name="T23">интернет-</text:span>соединение. Проект рассчитан на учебное применение, в том числе для сопровождения дисциплин по программированию, организации практических занятий, контроля прохождения тем и постепенного наращивания учебного контента силами преподавателей.</text:p>
      <text:p text:style-name="P76">3. РЕКОМЕНДУЕМЫЙ ПЕРВИЧНЫЙ ПОРЯДОК ДЕЙСТВИЙ</text:p>
      <text:p text:style-name="P77"/>
      <text:p text:style-name="P78">3.1 Установка приложения</text:p>
      <text:p text:style-name="P75">Для установки приложения онлайн-школы программирования необходимо перейти на официальный сайт проекта: <text:a xlink:type="simple" xlink:href="https://diploma.bogaledev.ru/" text:style-name="Internet_20_link" text:visited-style-name="Visited_20_Internet_20_Link">https://diploma.bogaledev.ru</text:a> <text:span text:style-name="T24">(Рисунок 1).</text:span></text:p>
      <text:p text:style-name="P79"><draw:frame draw:style-name="fr1" draw:name="Image9" text:anchor-type="char" svg:width="17cm" svg:height="11.645cm" draw:z-index="8"><draw:image xlink:href="Pictures/10000001000006040000041F50745D69.png" xlink:type="simple" xlink:show="embed" xlink:actuate="onLoad" draw:mime-type="image/png"/></draw:frame>Рисунок 1</text:p>
      <text:p text:style-name="P79"/>
      <text:p text:style-name="P75">На главной странице сайта нужно выбрать версию приложения для используемой операционной системы: Windows / Linux. После этого начнётся скачивание <text:span text:style-name="T24">архива с приложением</text:span>. После завершения загрузки необходимо <text:span text:style-name="T24">распаковать архив</text:span>. Для операционной системы Windows необходимо распаковать архив приложения и запустить файл DiplomaApp.exe.</text:p>
      <text:p text:style-name="P75">Для операционной системы Linux необходимо:</text:p>
      <text:p text:style-name="P75">Открыть терминал в папке с приложением.</text:p>
      <text:p text:style-name="P75">Выдать файлу права на выполнение командой:</text:p>
      <text:p text:style-name="P75">chmod +x DiplomaApp.AppImage</text:p>
      <text:p text:style-name="P75">Запустить приложение двойным нажатием мыши либо командой:</text:p>
      <text:p text:style-name="P75">./DiplomaApp.AppImage</text:p>
      <text:p text:style-name="P75"><text:soft-page-break/></text:p>
      <text:p text:style-name="P75">После запуска приложения откроется главное окно системы онлайн-школы программирования (рис. 2).</text:p>
      <text:p text:style-name="P75"/>
      <text:p text:style-name="P75">Рисунок 2 – Главное окно приложения</text:p>
      <text:p text:style-name="P80"><text:span text:style-name="T21">4. </text:span>РАБОТА ПРОГРАММЫ</text:p>
      <text:p text:style-name="P81"/>
      <text:p text:style-name="P82">Пользовательский интерфейс приложения реализован в виде единого окна с последовательной навигацией по учебному сценарию: выбор курса → выбор темы → изучение теории → выполнение задания. В верхней части окна всегда доступна пользовательская кнопка профиля для быстрого перехода в личный кабинет и кнопка закрытия приложения. Сразу после запуска отображается заставка (Рисунок 1), затем открывается основная рабочая область.</text:p>
      <text:p text:style-name="P83"><draw:frame draw:style-name="fr2" draw:name="Image1" text:anchor-type="paragraph" svg:width="12cm" svg:height="7.999cm" draw:z-index="0"><draw:image xlink:href="Pictures/10000001000005E3000003F4E19DD676.png" xlink:type="simple" xlink:show="embed" xlink:actuate="onLoad" draw:mime-type="image/png"/></draw:frame>Рисунок 1</text:p>
      <text:p text:style-name="P84"/>
      <text:p text:style-name="P82">После завершения заставки пользователь попадает на первую рабочую страницу (Рисунок 2) — список курсов (языков программирования). Каждый элемент списка содержит название и описание курса. <text:span text:style-name="T25">В</text:span>ыбор курса выполняется нажатием на карточку элемента. Эта страница является стартовой точкой пользовательского пути.</text:p>
      <text:p text:style-name="P83"><draw:frame draw:style-name="fr3" draw:name="Image2" text:anchor-type="paragraph" svg:width="12cm" svg:height="7.999cm" draw:z-index="1"><draw:image xlink:href="Pictures/10000001000005E3000003F465AC5D0C.png" xlink:type="simple" xlink:show="embed" xlink:actuate="onLoad" draw:mime-type="image/png"/></draw:frame><text:soft-page-break/>Рисунок 2</text:p>
      <text:p text:style-name="P84"/>
      <text:p text:style-name="P82">После выбора курса открывается окно со списком тем (Рисунок 3). На странице отображаются все темы по выбранному языку программирования; переход к следующему шагу выполняется выбором нужной темы. Для удобства каждая тема сопровождается кратким пояснением.</text:p>
      <text:p text:style-name="P84"/>
      <text:p text:style-name="P85"><draw:frame draw:style-name="fr3" draw:name="Image3" text:anchor-type="paragraph" svg:width="12cm" svg:height="7.999cm" draw:z-index="2"><draw:image xlink:href="Pictures/10000001000005E3000003F421C42F62.png" xlink:type="simple" xlink:show="embed" xlink:actuate="onLoad" draw:mime-type="image/png"/></draw:frame>Рисунок 3</text:p>
      <text:p text:style-name="P84"/>
      <text:p text:style-name="P82">После выбора темы открывается <text:span text:style-name="T26">окно с</text:span> теоретическ<text:span text:style-name="T26">им</text:span> материа<text:span text:style-name="T26">лом</text:span> (Рисунок 4). В верхней части отображается текст теории, а ниже — кнопки перехода к практическим заданиям темы. Выбор задания выполняется нажатием соответствующей кнопки.</text:p>
      <text:p text:style-name="P86"><draw:frame draw:style-name="fr3" draw:name="Image4" text:anchor-type="paragraph" svg:width="12cm" svg:height="7.999cm" draw:z-index="3"><draw:image xlink:href="Pictures/10000001000005E3000003F416332F05.png" xlink:type="simple" xlink:show="embed" xlink:actuate="onLoad" draw:mime-type="image/png"/></draw:frame><text:soft-page-break/>Рисунок 4</text:p>
      <text:p text:style-name="P84"/>
      <text:p text:style-name="P82">Если пользователь пытается открыть задание или личный кабинет без входа в систему, приложение автоматически открывает окно авторизации (Рисунок 5). В этом окне доступны стандартные режимы: вход, регистрация и восстановление пароля. После успешной авторизации пользователь возвращается к запрошенному ранее действию.</text:p>
      <text:p text:style-name="P86"><draw:frame draw:style-name="fr3" draw:name="Image5" text:anchor-type="paragraph" svg:width="12cm" svg:height="7.999cm" draw:z-index="4"><draw:image xlink:href="Pictures/10000001000005E3000003F4DE5E6B60.png" xlink:type="simple" xlink:show="embed" xlink:actuate="onLoad" draw:mime-type="image/png"/></draw:frame>Рисунок 5</text:p>
      <text:p text:style-name="P84"/>
      <text:p text:style-name="P82">Окно задания (Рисунок 6) содержит все основные элементы практической работы: текст условия задания; поле редактора кода; блок публичного примера (вход/выход); поле «Свой тест» для ввода пользовательских данных; кнопки «Запустить» <text:span text:style-name="T26">для</text:span> запуск решения на пользовательском вводе <text:span text:style-name="T26">и </text:span>«Отправить» <text:span text:style-name="T26">для</text:span> <text:soft-page-break/>проверк<text:span text:style-name="T26">и</text:span> решения на автоматических тестах. Ниже выводится <text:span text:style-name="T26">блок с результатом выполнения</text:span> (успешный запуск, ошибка компиляции/выполнения, число пройденных тестов, принятие решения). Таким образом, пользователь получает оперативную обратную связь после каждого действия.</text:p>
      <text:p text:style-name="P86"><draw:frame draw:style-name="fr3" draw:name="Image6" text:anchor-type="paragraph" svg:width="12cm" svg:height="7.999cm" draw:z-index="5"><draw:image xlink:href="Pictures/10000001000005E3000003F484B186BF.png" xlink:type="simple" xlink:show="embed" xlink:actuate="onLoad" draw:mime-type="image/png"/></draw:frame>Рисунок 6</text:p>
      <text:p text:style-name="P84"/>
      <text:p text:style-name="P82">Окно личного кабинета открывается по кнопке профиля после авторизации (Рисунок 7). Здесь отображаются: общий прогресс обучения в процентах; прогресс по каждому курсу в виде полосы заполнения; кнопка «Выйти из аккаунта» для завершения сессии. Страница используется для мониторинга результатов обучения и управления текущим входом пользователя.</text:p>
      <text:p text:style-name="P86"><draw:frame draw:style-name="fr3" draw:name="Image7" text:anchor-type="paragraph" svg:width="12cm" svg:height="7.999cm" draw:z-index="6"><draw:image xlink:href="Pictures/10000001000005E3000003F40E1DBFF7.png" xlink:type="simple" xlink:show="embed" xlink:actuate="onLoad" draw:mime-type="image/png"/></draw:frame>Рисунок 7</text:p>
      <text:p text:style-name="P87"><text:soft-page-break/>Если аккаунт имеет роль <text:span text:style-name="T27">учителя</text:span>, вместо личного кабинета открывается окно «Панель учителя» (Рисунок 8). Вкладки панели предоставляют инструменты администрирования учебного контента: «Новый курс» — создание нового курса (языка); «Новая тема» — добавление темы и теоретического материала; «Новое задание» — создание практического задания; «Новый тест» — добавление теста для автоматической проверки; «Выйти» — выход из учётной записи преподавателя. Этот интерфейс обеспечивает полный цикл наполнения системы учебными материалами без перехода во внешние административные инструменты.</text:p>
      <text:p text:style-name="P86"><draw:frame draw:style-name="fr3" draw:name="Image8" text:anchor-type="paragraph" svg:width="12cm" svg:height="7.999cm" draw:z-index="7"><draw:image xlink:href="Pictures/10000001000005E3000003F4C418C31F.png" xlink:type="simple" xlink:show="embed" xlink:actuate="onLoad" draw:mime-type="image/png"/></draw:frame>Рисунок 8</text:p>
      <text:p text:style-name="P88"/>
      <text:p text:style-name="P88">2.3. Результаты апробации</text:p>
      <text:p text:style-name="P88"/>
      <text:p text:style-name="P87">Апробация разработанного программного приложения проводилась на заключительном этапе выполнения выпускной квалификационной работы и была направлена на проверку его практической применимости, устойчивости работы пользовательских сценариев и качества восприятия целевой аудиторией.</text:p>
      <text:p text:style-name="P87">В рамках внешней профессионально-ориентированной оценки проект был представлен 24 апреля 2026 года на XXII Межрегиональной студенческой научно-практической конференции «Студент. Образование. Общество XXI века: профессиональное становление в эпоху цифровой трансформации и искусственного интеллекта» в тематическом направлении «Цифровая <text:soft-page-break/>трансформация общества: цифровые проекты, ИИ, Интернет вещей, большие данные, блокчейн». Демонстрация приложения в формате научного доклада позволила получить экспертную обратную связь в академической среде и подтвердить актуальность выбранной темы исследования в контексте цифровизации образовательных и общественных процессов.</text:p>
      <text:p text:style-name="P87">Дополнительно была проведена пользовательская апробация с участием преподавателей и студентов: приложение протестировали несколько преподавателей и одногруппников. Проверка включала базовые сценарии взаимодействия с интерфейсом, навигацию по ключевым разделам, выполнение целевых действий пользователя и общую оценку удобства использования. По результатам тестирования существенных затруднений в работе с системой выявлено не было; участники отметили логичность структуры, понятность интерфейса и практическую полезность реализованного функционала.</text:p>
      <text:p text:style-name="P87">Содержательный анализ собранной обратной связи показал, что разработанное приложение корректно решает поставленные прикладные задачи и может быть рекомендовано к дальнейшему использованию и развитию. Положительные отзывы преподавателей и студентов свидетельствуют о соответствии реализованного решения ожиданиям потенциальных пользователей и подтверждают перспективность его дальнейшего внедрения в учебно-практическую деятельность.</text:p>
      <text:p text:style-name="P87">Таким образом, результаты апробации подтверждают работоспособность, востребованность и практическую значимость разработанного приложения. Полученные данные могут служить основанием для последующего расширения функциональных возможностей системы, углубления аналитических модулей и масштабирования опыта применения в смежных образовательных и проектных контекстах.</text:p>
      <text:p text:style-name="P89">ЗАКЛЮЧЕНИЕ</text:p>
      <text:p text:style-name="P90"/>
      <text:p text:style-name="P87">Выпускная квалификационная работа на тему «Разработка десктопного приложения для онлайн-школы по программированию» посвящена решению практико-ориентированной задачи повышения качества обучения в цифровой среде. Актуальность проекта обусловлена тем, что современное онлайн-обучение программированию требует не только доступа к теории, но и непрерывной практики, оперативной проверки решений и удобной учебной инфраструктуры. На этапе постановки задачи была определена ключевая проблема: разрыв между изучением материалов и выполнением программных заданий, а также высокая зависимость эффективности обучения от технической подготовки обучающихся.</text:p>
      <text:p text:style-name="P87">В соответствии с поставленной целью в проекте последовательно решены все запланированные задачи. <text:span text:style-name="T28">А</text:span>нализ предметной области выполнен через изучение специфики онлайн-обучения программированию, образовательных сценариев и потребностей целевых пользователей. В результате сформировано обоснование структуры будущей системы: единое приложение, объединяющее теоретический контент, практические задания и инструменты контроля результатов. <text:span text:style-name="T28">Т</text:span>ехническо<text:span text:style-name="T28">е</text:span> задани<text:span text:style-name="T28">е</text:span> <text:span text:style-name="T28">разработано </text:span>с определением функциональных и нефункциональных требований, ролей пользователей, ограничений и критериев качества. Это позволило сформировать прозрачную основу для проектирования и дальнейшей реализации решения, а также обеспечить проверяемость соответствия итогового продукта заявленным требованиям.</text:p>
      <text:p text:style-name="P87"><text:span text:style-name="T28">П</text:span>рограммно<text:span text:style-name="T28">е</text:span> обеспечени<text:span text:style-name="T28">е создано </text:span>через реализацию клиент-серверной архитектуры приложения. В ходе разработки обеспечено взаимодействие между пользовательским интерфейсом и серверной частью, реализованы механизмы аутентификации, управление учебным контентом, получение и обработка результатов выполнения заданий. Отдельное внимание уделено целостности данных и устойчивости основных пользовательских сценариев, что критически важно для образовательных систем, ориентированных на регулярную учебную работу.</text:p>
      <text:p text:style-name="P87"><text:soft-page-break/><text:span text:style-name="T28">Р</text:span>азработка пользовательского интерфейса выполнена с учётом принципов понятности, логичности и минимизации когнитивной нагрузки. В интерфейсе организована последовательная навигация по разделам «темы», «теория», «задания» и «результаты», что делает учебный процесс структурированным и предсказуемым для обучающегося. Для преподавателя обеспечены инструменты формирования и сопровождения учебных материалов. <text:span text:style-name="T28">Р</text:span>уководств<text:span text:style-name="T28">о</text:span> пользователя <text:span text:style-name="T28">п</text:span>одгото<text:span text:style-name="T28">влено</text:span>. Документация описывает ключевые сценарии работы с системой и снижает порог входа для разных категорий пользователей.</text:p>
      <text:p text:style-name="P87">В ходе проектирования и реализации подтверждена достижимость главного результата: создано работоспособное десктопное приложение для онлайн-школы по программированию, обеспечивающее интеграцию теоретической и практической составляющих обучения. Разработанное решение позволяет обучающемуся проходить материал последовательно, выполнять задания в единой среде, оперативно получать обратную связь и видеть динамику собственного прогресса. Для преподавателя система формирует удобный контур управления контентом и контроля учебной активности.</text:p>
      <text:p text:style-name="P87">Практическая значимость проекта заключается в возможности непосредственного внедрения результата в деятельность онлайн-школ, колледжей и иных образовательных организаций, реализующих подготовку в сфере программирования. Приложение может использоваться как самостоятельный учебный инструмент и как компонент существующей цифровой образовательной среды. В обоих случаях достигается снижение технических барьеров, сокращение времени на организацию учебной работы и повышение дисциплины прохождения материалов за счёт понятного маршрута обучения.</text:p>
      <text:p text:style-name="P87">Результаты апробации показали, что пользователи положительно оценивают удобство интерфейса, структурированность контента и полезность практических модулей. Это подтверждает корректность принятых архитектурных и интерфейсных решений, а также обоснованность выбранной концепции объединения теории и практики в едином приложении. Полученные <text:soft-page-break/>выводы позволяют рассматривать разработку как устойчивую основу для дальнейшего развития.</text:p>
      <text:p text:style-name="P87">Перспективы совершенствования проекта включают расширение набора поддерживаемых языков программирования, внедрение адаптивных траекторий обучения, развитие аналитических инструментов для преподавателя и интеграцию с внешними образовательными сервисами. Дополнительным направлением может стать углубление механизмов автоматизированной проверки кода, включая оценку качества решений по нескольким критериям и персонализированные рекомендации по улучшению.</text:p>
      <text:p text:style-name="P87">Таким образом, цель выпускной квалификационной работы достигнута в полном объёме, а все поставленные задачи последовательно решены. Разработанное десктопное приложение подтвердило работоспособность, методическую обоснованность и прикладную ценность. Итоговый результат имеет практическую применимость в образовательной сфере, способствует повышению качества обучения программированию и может быть масштабирован в рамках дальнейшей цифровой трансформации учебного процесса.</text:p>
      <text:p text:style-name="P89">СПИСОК ИСПОЛЬЗОВАННЫХ ИСТОЧНИКОВ</text:p>
      <text:p text:style-name="P90"/>
      <text:list text:style-name="L1">
        <text:list-item>
          <text:p text:style-name="P91">Российская Федерация. Законы. Об образовании в Российской Федерации : Федеральный закон от 29.12.2012 № 273-ФЗ (ред. от 29.12.2025).</text:p>
        </text:list-item>
        <text:list-item>
          <text:p text:style-name="P91">Российская Федерация. Правительство. Об утверждении Правил применения организациями, осуществляющими образовательную деятельность, электронного обучения, дистанционных образовательных технологий при реализации образовательных программ : Постановление Правительства РФ от 11.10.2023 № 1678.</text:p>
        </text:list-item>
        <text:list-item>
          <text:p text:style-name="P91">Российская Федерация. Правительство. Об утверждении Положения о государственной аккредитации образовательной деятельности : Постановление Правительства РФ от 19.05.2023 № 797.</text:p>
        </text:list-item>
        <text:list-item>
          <text:p text:style-name="P91">Российская Федерация. Министерство просвещения. Об утверждении федерального государственного образовательного стандарта среднего профессионального образования по специальности 09.02.07 Информационные системы и программирование : Приказ Минобрнауки России от 09.12.2016 № 1547 (ред. от 03.07.2024).</text:p>
        </text:list-item>
        <text:list-item>
          <text:p text:style-name="P91">ГОСТ Р 56939-2024. Защита информации. Разработка безопасного программного обеспечения. Общие требования.</text:p>
        </text:list-item>
        <text:list-item>
          <text:p text:style-name="P91">ГОСТ Р ИСО/МЭК 25010-2022. Системная и программная инженерия. Требования и оценка качества систем и программных продуктов (SQuaRE).</text:p>
        </text:list-item>
        <text:list-item>
          <text:p text:style-name="P91">ГОСТ Р 59795-2021. Информационные технологии. Комплекс стандартов на автоматизированные системы. Автоматизированные системы. Стадии создания.</text:p>
        </text:list-item>
        <text:list-item>
          <text:p text:style-name="P91">Алтухова Н. Ф. Цифровая трансформация образования: подходы, модели, инструменты // Открытое образование. 2022. Т. 26. № 6. С. 4–15.</text:p>
        </text:list-item>
        <text:list-item>
          <text:p text:style-name="P91">Андреев А. А., Солдаткин В. И. Дистанционное обучение в цифровой образовательной среде: современное состояние и тенденции // Высшее образование в России. 2021. Т. 30. № 3. С. 9–24.</text:p>
        </text:list-item>
        <text:list-item>
          <text:p text:style-name="P91"><text:soft-page-break/>Блинов В. И., Есенина Е. Ю., Сергеев И. С. Профессиональное образование в условиях цифровой трансформации // Профессиональное образование и рынок труда. 2022. № 2. С. 6–19.</text:p>
        </text:list-item>
        <text:list-item>
          <text:p text:style-name="P91">Вайндорф-Сысоева М. Е., Субочева М. Л. Цифровая дидактика: теория и практика организации обучения : учебное пособие. Москва : Юрайт, 2022. 174 с.</text:p>
        </text:list-item>
        <text:list-item>
          <text:p text:style-name="P91">Днепровская Н. В. Цифровая образовательная среда: риски, возможности, эффекты // Университетское управление: практика и анализ. 2021. Т. 25. № 4. С. 102–118.</text:p>
        </text:list-item>
        <text:list-item>
          <text:p text:style-name="P91">Ильин В. В., Киселёв М. В. Архитектура клиент-серверных приложений : учебное пособие. Москва : КНОРУС, 2023. 256 с.</text:p>
        </text:list-item>
        <text:list-item>
          <text:p text:style-name="P91">Карпов В. Э., Кузнецов С. Д. Введение в анализ данных для образования : учебник. Санкт-Петербург : Питер, 2024. 320 с.</text:p>
        </text:list-item>
        <text:list-item>
          <text:p text:style-name="P91">Кулямин В. В., Петренко А. К. Инженерия требований в программных проектах : учебное пособие. Москва : Бином, 2021. 288 с.</text:p>
        </text:list-item>
        <text:list-item>
          <text:p text:style-name="P91">Лапчик М. П., Хеннер Е. К. Методика обучения программированию в цифровой школе : учебное пособие. Москва : БИНОМ. Лаборатория знаний, 2022. 240 с.</text:p>
        </text:list-item>
        <text:list-item>
          <text:p text:style-name="P91">Леонтьев А. Н. Проектирование пользовательских интерфейсов цифровых образовательных систем // Информатика и образование. 2023. № 8. С. 17–29.</text:p>
        </text:list-item>
        <text:list-item>
          <text:p text:style-name="P91">Монахов В. М., Гриншкун В. В. Цифровые образовательные технологии: педагогический дизайн и сопровождение : монография. Москва : МПГУ, 2024. 312 с.</text:p>
        </text:list-item>
        <text:list-item>
          <text:p text:style-name="P91">Поляков К. Ю., Еремин Е. А. Практикум по программированию на C++ для СПО : учебное пособие. Москва : Юрайт, 2025. 286 с.</text:p>
        </text:list-item>
        <text:list-item>
          <text:p text:style-name="P91">Рудаков А. В. Технологии разработки программных продуктов : учебник для СПО. Москва : Академия, 2023. 352 с.</text:p>
        </text:list-item>
        <text:list-item>
          <text:p text:style-name="P91">Тихомирова Н. В. Оценка качества цифровых образовательных продуктов // Стандарты и качество. 2022. № 10. С. 66–73.</text:p>
        </text:list-item>
        <text:list-item>
          <text:p text:style-name="P91"><text:soft-page-break/>Филимонова Е. В., Панфилова А. П. Электронное обучение и дистанционные образовательные технологии в СПО : практическое руководство. Санкт-Петербург : Лань, 2021. 198 с.</text:p>
        </text:list-item>
        <text:list-item>
          <text:p text:style-name="P91">Федеральный институт развития образования РАНХиГС. Цифровая образовательная среда: методические рекомендации [Электронный ресурс]. URL: https://firo.ranepa.ru/metodicheskie-materialy (дата обращения: 20.<text:span text:style-name="T29">02</text:span>.2026).</text:p>
        </text:list-item>
        <text:list-item>
          <text:p text:style-name="P91">Институт стратегии развития образования. Банк цифровых образовательных практик [Электронный ресурс]. URL: https://instrao.ru/index.php/content-page/159-bank-praktik (дата обращения: 2<text:span text:style-name="T29">2</text:span>.0<text:span text:style-name="T29">2</text:span>.2026).</text:p>
        </text:list-item>
        <text:list-item>
          <text:p text:style-name="P91">Цифровой образовательный контент. Федеральная платформа ЦОК [Электронный ресурс]. URL: https://educont.ru/ (дата обращения: <text:span text:style-name="T29">04.03</text:span>.2026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line-height="100%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indent="0cm" style:auto-text-indent="false"/>
      <style:text-properties fo:font-weight="bold" style:letter-kerning="false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9</text:page-number></text:span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20T14:31:37.435573024</dc:date>
    <meta:editing-cycles>133</meta:editing-cycles>
    <meta:editing-duration>P2DT8H17M23S</meta:editing-duration>
    <meta:generator>LibreOffice/25.8.7.3$Linux_X86_64 LibreOffice_project/580$Build-3</meta:generator>
    <meta:document-statistic meta:table-count="4" meta:image-count="9" meta:object-count="0" meta:page-count="39" meta:paragraph-count="389" meta:word-count="6201" meta:character-count="53716" meta:non-whitespace-character-count="48114"/>
    <meta:user-defined meta:name="AppVersion">15.0000</meta:user-defined>
    <meta:template xlink:type="simple" xlink:actuate="onRequest" xlink:title="Normal.dotm" xlink:href=""/>
  </office:meta>
</office:document-meta>
</file>