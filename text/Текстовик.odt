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3000003F4C418C31F.png" manifest:media-type="image/png"/>
  <manifest:file-entry manifest:full-path="Pictures/10000001000005E3000003F40E1DBFF7.png" manifest:media-type="image/png"/>
  <manifest:file-entry manifest:full-path="Pictures/10000001000005E3000003F484B186BF.png" manifest:media-type="image/png"/>
  <manifest:file-entry manifest:full-path="Pictures/10000001000005E3000003F4DE5E6B60.png" manifest:media-type="image/png"/>
  <manifest:file-entry manifest:full-path="Pictures/10000001000005E3000003F416332F05.png" manifest:media-type="image/png"/>
  <manifest:file-entry manifest:full-path="Pictures/10000001000005E3000003F465AC5D0C.png" manifest:media-type="image/png"/>
  <manifest:file-entry manifest:full-path="Pictures/10000001000005E3000003F421C42F62.png" manifest:media-type="image/png"/>
  <manifest:file-entry manifest:full-path="Pictures/10000001000005E3000003F4E19DD676.png" manifest:media-type="image/png"/>
  <manifest:file-entry manifest:full-path="Pictures/10000001000006040000041F50745D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6.9cm" fo:margin-left="10.123cm" table:align="left" style:writing-mode="lr-tb"/>
    </style:style>
    <style:style style:name="Table5.A" style:family="table-column">
      <style:table-column-properties style:column-width="6.9cm"/>
    </style:style>
    <style:style style:name="Table5.A1" style:family="table-cell">
      <style:table-cell-properties fo:padding="0.097cm" fo:border="none"/>
    </style:style>
    <style:style style:name="Table5.7" style:family="table-row">
      <style:table-row-properties style:min-row-height="0.423cm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5.894cm" style:rel-column-width="61271*"/>
    </style:style>
    <style:style style:name="Table2.B" style:family="table-column">
      <style:table-column-properties style:column-width="1.106cm" style:rel-column-width="4264*"/>
    </style:style>
    <style:style style:name="Table2.A1" style:family="table-cell">
      <style:table-cell-properties fo:padding="0.097cm" fo:border="none"/>
    </style:style>
    <style:style style:name="Table2.B3" style:family="table-cell" style:data-style-name="N0">
      <style:table-cell-properties fo:padding="0.097cm" fo:border="none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67cm" style:rel-column-width="21847*"/>
    </style:style>
    <style:style style:name="Table4.C" style:family="table-column">
      <style:table-column-properties style:column-width="5.667cm" style:rel-column-width="21848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none" fo:border-right="none" fo:border-top="none" fo:border-bottom="1.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5.894cm" style:rel-column-width="61271*"/>
    </style:style>
    <style:style style:name="Table3.B" style:family="table-column">
      <style:table-column-properties style:column-width="1.106cm" style:rel-column-width="4264*"/>
    </style:style>
    <style:style style:name="Table3.A1" style:family="table-cell">
      <style:table-cell-properties fo:padding="0.097cm" fo:border="none"/>
    </style:style>
    <style:style style:name="Table3.B3" style:family="table-cell" style:data-style-name="N0">
      <style:table-cell-properties fo:padding="0.097cm" fo:border="none"/>
    </style:style>
    <style:style style:name="P1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f53b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officeooo:rsid="001f9141" officeooo:paragraph-rsid="001f9141" style:font-size-asian="14pt" style:font-name-complex="Times New Roman1" style:font-size-complex="14p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4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d1e9e" officeooo:paragraph-rsid="001d1e9e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Times New Roman" fo:font-size="12pt" officeooo:rsid="001d1e9e" officeooo:paragraph-rsid="001d1e9e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position="super 58%" style:font-name="Times New Roman" fo:font-size="12pt" officeooo:rsid="001d1e9e" officeooo:paragraph-rsid="001d1e9e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1e55c6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3ae849" style:font-size-asian="12pt" style:font-size-complex="12pt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position="super 58%" style:font-name="Times New Roman" fo:font-size="12pt" officeooo:rsid="001d1e9e" officeooo:paragraph-rsid="003ae849" style:font-size-asian="12pt" style:font-size-complex="12pt"/>
    </style:style>
    <style:style style:name="P14" style:family="paragraph" style:parent-style-name="Contents_20_Heading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5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6" style:family="paragraph" style:parent-style-name="Contents_20_1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Contents_20_1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298290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rsid="002fade3" officeooo:paragraph-rsid="002fade3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ontents_20_2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size="14pt" fo:language="ru" fo:country="RU" officeooo:paragraph-rsid="001e55c6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rsid="00397280" officeooo:paragraph-rsid="00397280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Contents_20_1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1e55c6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List_20_Paragraph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officeooo:paragraph-rsid="00135c9d" style:font-size-asian="14pt" style:font-name-complex="Times New Roman1" style:font-size-complex="14pt">
        <loext:char-complex-color loext:theme-type="dark1" loext:color-type="theme"/>
      </style:text-properties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/>
    </style:style>
    <style:style style:name="P29" style:family="paragraph" style:parent-style-name="List_20_Paragraph" style:list-style-name="WWNum7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 style:list-style-name="WWNum3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32" style:family="paragraph" style:parent-style-name="List_20_Paragraph" style:list-style-name="WWNum8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 style:list-style-name="WWNum4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officeooo:paragraph-rsid="001015cf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bold" officeooo:paragraph-rsid="001015cf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2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3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List_20_Paragraph" style:list-style-name="WWNum10">
      <style:paragraph-properties fo:margin-top="0cm" fo:margin-bottom="0cm" style:contextual-spacing="tru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5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6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7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8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51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5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32d6" officeooo:paragraph-rsid="001932d6" style:font-size-asian="12pt" style:font-size-complex="12pt"/>
    </style:style>
    <style:style style:name="P5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235878" style:font-size-asian="14pt" style:font-weight-asian="bold" style:font-name-complex="Times New Roman1" style:font-size-complex="14pt" style:font-weight-complex="bold"/>
    </style:style>
    <style:style style:name="P66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152f05" officeooo:paragraph-rsid="00152f05" style:font-size-asian="14pt" style:font-size-complex="14pt"/>
    </style:style>
    <style:style style:name="P67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2fade3" officeooo:paragraph-rsid="002fade3" style:font-size-asian="14pt" style:font-size-complex="14pt"/>
    </style:style>
    <style:style style:name="P68" style:family="paragraph" style:parent-style-name="Standard">
      <style:paragraph-properties fo:margin-left="0cm" fo:margin-top="0cm" fo:margin-bottom="0cm" style:contextual-spacing="false" fo:line-height="100%" fo:orphans="2" fo:widows="2" fo:hyphenation-ladder-count="no-limit" fo:hyphenation-keep="page" loext:hyphenation-keep-type="column" loext:hyphenation-keep-line="true" fo:text-indent="1.251cm" style:auto-text-indent="false" style:writing-mode="lr-tb"/>
      <style:text-properties style:use-window-font-color="true" loext:opacity="0%" style:font-name="Times New Roman" fo:font-size="14pt" fo:language="ru" fo:country="RU" officeooo:paragraph-rsid="00235878" style:font-name-asian="Calibri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Table_20_Contents">
      <style:paragraph-properties fo:margin-left="0cm" fo:margin-top="0cm" fo:margin-bottom="0cm" style:contextual-spacing="false" fo:line-height="100%" fo:text-indent="0cm" style:auto-text-indent="false"/>
      <style:text-properties style:font-name="Times New Roman" fo:font-size="14pt" officeooo:rsid="002fade3" officeooo:paragraph-rsid="002fade3" style:font-size-asian="14pt" style:font-size-complex="14pt"/>
    </style:style>
    <style:style style:name="P70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397280" officeooo:paragraph-rsid="00397280" style:font-size-asian="14pt" style:font-size-complex="14pt"/>
    </style:style>
    <style:style style:name="P71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152f05" style:font-size-asian="14pt" style:font-weight-asian="bold" style:font-name-complex="Times New Roman1" style:font-size-complex="14pt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rsid="000ee979" officeooo:paragraph-rsid="000ee979" style:font-size-asian="14pt" style:font-weight-asian="bold" style:font-name-complex="Times New Roman1" style:font-size-complex="14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8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9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80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8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82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35a6b1" style:font-size-asian="14pt" style:font-weight-asian="normal" style:font-name-complex="Times New Roman1" style:font-size-complex="14pt" style:font-weight-complex="normal"/>
    </style:style>
    <style:style style:name="P83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fo:font-weight="normal" officeooo:rsid="003329bb" officeooo:paragraph-rsid="0035a6b1" style:font-size-asian="12pt" style:font-weight-asian="normal" style:font-name-complex="Times New Roman1" style:font-size-complex="12pt" style:font-weight-complex="normal"/>
    </style:style>
    <style:style style:name="P84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paragraph-rsid="000ee979" style:font-size-asian="14pt" style:font-weight-asian="bold" style:font-name-complex="Times New Roman1" style:font-size-complex="14pt" style:font-weight-complex="bold"/>
    </style:style>
    <style:style style:name="P85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0ee979" style:font-size-asian="14pt" style:font-weight-asian="bold" style:font-name-complex="Times New Roman1" style:font-size-complex="14pt" style:font-weight-complex="bold"/>
    </style:style>
    <style:style style:name="P86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5ef2" style:font-size-asian="14pt" style:font-weight-asian="normal" style:font-name-complex="Times New Roman1" style:font-size-complex="14pt" style:font-weight-complex="normal"/>
    </style:style>
    <style:style style:name="P87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5d616" officeooo:paragraph-rsid="0025d616" style:font-size-asian="12pt" style:font-weight-asian="normal" style:font-name-complex="Times New Roman1" style:font-size-complex="12pt" style:font-weight-complex="normal"/>
    </style:style>
    <style:style style:name="P8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5878" style:font-size-asian="14pt" style:font-weight-asian="bold" style:font-name-complex="Times New Roman1" style:font-size-complex="14pt" style:font-weight-complex="bold"/>
    </style:style>
    <style:style style:name="P89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6d7bc" officeooo:paragraph-rsid="0026d7bc" style:font-size-asian="12pt" style:font-weight-asian="normal" style:font-name-complex="Times New Roman1" style:font-size-complex="12pt" style:font-weight-complex="normal"/>
    </style:style>
    <style:style style:name="P90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8d57f" officeooo:paragraph-rsid="0028d57f" style:font-size-asian="12pt" style:font-weight-asian="normal" style:font-name-complex="Times New Roman1" style:font-size-complex="12pt" style:font-weight-complex="normal"/>
    </style:style>
    <style:style style:name="P91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P92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2pt" style:text-underline-style="none" fo:font-weight="normal" officeooo:rsid="0028d57f" officeooo:paragraph-rsid="0028d57f" style:font-size-asian="12pt" style:font-weight-asian="normal" style:font-name-complex="Times New Roman1" style:font-size-complex="12pt" style:font-weight-complex="normal"/>
    </style:style>
    <style:style style:name="P9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94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95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96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P97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409e96" style:font-size-asian="14pt" style:font-weight-asian="normal" style:font-name-complex="Times New Roman1" style:font-size-complex="14pt" style:font-weight-complex="normal"/>
    </style:style>
    <style:style style:name="T1" style:family="text">
      <style:text-properties officeooo:rsid="003ae84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03ae849"/>
    </style:style>
    <style:style style:name="T5" style:family="text">
      <style:text-properties officeooo:rsid="001d1e9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fade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letter-kerning="false" style:language-asian="ru" style:country-asian="RU" style:font-weight-asian="normal" style:font-name-complex="Times New Roman1" style:font-weight-complex="normal"/>
    </style:style>
    <style:style style:name="T10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fo:font-size="14pt" style:font-size-asian="14pt" style:font-name-complex="Times New Roman1" style:font-size-complex="14pt"/>
    </style:style>
    <style:style style:name="T12" style:family="text">
      <style:text-properties fo:font-size="14pt" fo:language="en" fo:country="US" style:font-size-asian="14pt" style:font-name-complex="Times New Roman1" style:font-size-complex="14pt"/>
    </style:style>
    <style:style style:name="T13" style:family="text">
      <style:text-properties fo:color="#000000" loext:opacity="100%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15" style:family="text">
      <style:text-properties officeooo:rsid="001f9141"/>
    </style:style>
    <style:style style:name="T16" style:family="text">
      <style:text-properties fo:font-size="14pt" style:letter-kerning="false" style:font-size-asian="14pt" style:font-name-complex="Times New Roman1" style:font-size-complex="14pt"/>
    </style:style>
    <style:style style:name="T17" style:family="text">
      <style:text-properties style:font-name-complex="Times New Roman1"/>
    </style:style>
    <style:style style:name="T18" style:family="text">
      <style:text-properties officeooo:rsid="001ca533" style:font-name-complex="Times New Roman1"/>
    </style:style>
    <style:style style:name="T19" style:family="text">
      <style:text-properties officeooo:rsid="00174b0a"/>
    </style:style>
    <style:style style:name="T20" style:family="text">
      <style:text-properties officeooo:rsid="001ca533"/>
    </style:style>
    <style:style style:name="T21" style:family="text">
      <style:text-properties officeooo:rsid="00135c9d"/>
    </style:style>
    <style:style style:name="T22" style:family="text">
      <style:text-properties officeooo:rsid="0009e7a5"/>
    </style:style>
    <style:style style:name="T23" style:family="text">
      <style:text-properties officeooo:rsid="000d01d4"/>
    </style:style>
    <style:style style:name="T24" style:family="text">
      <style:text-properties officeooo:rsid="0018f2a4"/>
    </style:style>
    <style:style style:name="T25" style:family="text">
      <style:text-properties officeooo:rsid="0027aad2"/>
    </style:style>
    <style:style style:name="T26" style:family="text">
      <style:text-properties officeooo:rsid="00235878"/>
    </style:style>
    <style:style style:name="T27" style:family="text">
      <style:text-properties fo:font-weight="normal" officeooo:rsid="00235878" style:font-weight-asian="normal" style:font-weight-complex="normal"/>
    </style:style>
    <style:style style:name="T28" style:family="text">
      <style:text-properties officeooo:rsid="000ee979"/>
    </style:style>
    <style:style style:name="T29" style:family="text">
      <style:text-properties officeooo:rsid="0035a6b1"/>
    </style:style>
    <style:style style:name="T30" style:family="text">
      <style:text-properties officeooo:rsid="002910d9"/>
    </style:style>
    <style:style style:name="T31" style:family="text">
      <style:text-properties officeooo:rsid="00235ef2"/>
    </style:style>
    <style:style style:name="T32" style:family="text">
      <style:text-properties officeooo:rsid="0023f2f2"/>
    </style:style>
    <style:style style:name="T33" style:family="text">
      <style:text-properties officeooo:rsid="002d0ac1"/>
    </style:style>
    <style:style style:name="T34" style:family="text">
      <style:text-properties officeooo:rsid="003f5f6a"/>
    </style:style>
    <style:style style:name="T35" style:family="text">
      <style:text-properties officeooo:rsid="00409e96"/>
    </style:style>
    <style:style style:name="fr1" style:family="graphic" style:parent-style-name="Graphics">
      <style:graphic-properties style:protect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siz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Государственное автономное профессиональное</text:h>
      <text:h text:style-name="P1" text:outline-level="2">образовательное учреждение</text:h>
      <text:h text:style-name="P1" text:outline-level="2">«Читинский педагогический колледж»</text:h>
      <text:h text:style-name="P2" text:outline-level="2"/>
      <text:h text:style-name="P3" text:outline-level="2">Кафедра информационных технологий и программирования</text:h>
      <text:h text:style-name="P4" text:outline-level="2"/>
      <text:h text:style-name="P5" text:outline-level="2">Специальность 09.02.07 Информационные системы и программирование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6" text:outline-level="2">ВЫПУСКНАЯ КВАЛИФИКАЦИОННАЯ РАБОТА</text:h>
      <text:h text:style-name="P6" text:outline-level="2">Дипломный проект</text:h>
      <text:h text:style-name="P4" text:outline-level="2"/>
      <text:h text:style-name="P6" text:outline-level="2">Разработка десктопного приложения для онлайн-школы по программированию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Выполнил:</text:p>
          </table:table-cell>
        </table:table-row>
        <table:table-row>
          <table:table-cell table:style-name="Table5.A1" office:value-type="string">
            <text:p text:style-name="P8">Богодухов <text:span text:style-name="T1">Алексей Георгиевич</text:span></text:p>
          </table:table-cell>
        </table:table-row>
        <table:table-row>
          <table:table-cell table:style-name="Table5.A1" office:value-type="string">
            <text:p text:style-name="P8">Студент <text:s/><text:span text:style-name="T2"><text:s text:c="6"/>401 <text:s text:c="5"/></text:span><text:span text:style-name="T3"><text:s text:c="2"/>группы</text:span></text:p>
          </table:table-cell>
        </table:table-row>
        <table:table-row>
          <table:table-cell table:style-name="Table5.A1" office:value-type="string">
            <text:p text:style-name="P9">Руководитель <text:s/><text:span text:style-name="T1">________________</text:span></text:p>
          </table:table-cell>
        </table:table-row>
        <table:table-row>
          <table:table-cell table:style-name="Table5.A1" office:value-type="string">
            <text:p text:style-name="P10"><text:s text:c="38"/>подпись</text:p>
          </table:table-cell>
        </table:table-row>
        <table:table-row>
          <table:table-cell table:style-name="Table5.A1" office:value-type="string">
            <text:p text:style-name="P11">Трушина Е<text:span text:style-name="T1">лена Геннадьевна</text:span></text:p>
          </table:table-cell>
        </table:table-row>
        <table:table-row table:style-name="Table5.7">
          <table:table-cell table:style-name="Table5.A1" office:value-type="string">
            <text:p text:style-name="P12">« <text:s text:c="7"/>» <text:s/><text:span text:style-name="T4"><text:s text:c="36"/></text:span><text:s text:c="2"/>2<text:span text:style-name="T1">026 </text:span>г.</text:p>
          </table:table-cell>
        </table:table-row>
        <table:table-row>
          <table:table-cell table:style-name="Table5.A1" office:value-type="string">
            <text:p text:style-name="P11">Допущен к защите</text:p>
          </table:table-cell>
        </table:table-row>
        <table:table-row>
          <table:table-cell table:style-name="Table5.A1" office:value-type="string">
            <text:p text:style-name="P11">Зав. кафедрой<text:span text:style-name="T5"> <text:s/></text:span><text:span text:style-name="T1">________________</text:span></text:p>
          </table:table-cell>
        </table:table-row>
        <table:table-row>
          <table:table-cell table:style-name="Table5.A1" office:value-type="string">
            <text:p text:style-name="P13"><text:s text:c="38"/>подпись</text:p>
          </table:table-cell>
        </table:table-row>
        <table:table-row>
          <table:table-cell table:style-name="Table5.A1" office:value-type="string">
            <text:p text:style-name="P11">Медведкова Ю<text:span text:style-name="T1">лия Константиновна</text:span></text:p>
          </table:table-cell>
        </table:table-row>
        <table:table-row>
          <table:table-cell table:style-name="Table5.A1" office:value-type="string">
            <text:p text:style-name="P12">« <text:s text:c="7"/>» <text:s/><text:span text:style-name="T4"><text:s text:c="36"/></text:span><text:s text:c="2"/>2<text:span text:style-name="T1">026 </text:span>г.</text:p>
          </table:table-cell>
        </table:table-row>
        <table:table-row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12">Оценка<text:span text:style-name="T5"> <text:s/></text:span><text:span text:style-name="T1">__________________</text:span></text:p>
          </table:table-cell>
        </table:table-row>
        <table:table-row>
          <table:table-cell table:style-name="Table5.A1" office:value-type="string">
            <text:p text:style-name="P12">« <text:s text:c="7"/>» <text:s/><text:span text:style-name="T4"><text:s text:c="36"/></text:span><text:s text:c="2"/>2<text:span text:style-name="T1">026 </text:span>г.</text:p>
          </table:table-cell>
        </table:table-row>
      </table:table>
      <text:p text:style-name="P14"/>
      <text:p text:style-name="P15">СОДЕРЖАНИЕ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1. Пояснительная записка<text:span text:style-name="T6"> ..............................................................................</text:span></text:p>
          </table:table-cell>
          <table:table-cell table:style-name="Table2.A1" office:value-type="string">
            <text:p text:style-name="P18">3</text:p>
          </table:table-cell>
        </table:table-row>
        <table:table-row>
          <table:table-cell table:style-name="Table2.A1" office:value-type="string">
            <text:p text:style-name="P19">1.1. Квалификационные характеристики проекта ................................</text:p>
          </table:table-cell>
          <table:table-cell table:style-name="Table2.A1" office:value-type="string">
            <text:p text:style-name="P20">3</text:p>
          </table:table-cell>
        </table:table-row>
        <table:table-row>
          <table:table-cell table:style-name="Table2.A1" office:value-type="string">
            <text:p text:style-name="P19">1.2. Описание предметной области ........................................................</text:p>
          </table:table-cell>
          <table:table-cell table:style-name="Table2.B3" office:value-type="float" office:value="5">
            <text:p text:style-name="P20">5</text:p>
          </table:table-cell>
        </table:table-row>
        <table:table-row>
          <table:table-cell table:style-name="Table2.A1" office:value-type="string">
            <text:p text:style-name="P19">1.3. Техническое задание .........................................................................</text:p>
          </table:table-cell>
          <table:table-cell table:style-name="Table2.A1" office:value-type="string">
            <text:p text:style-name="P20">1<text:span text:style-name="T7">2</text:span></text:p>
          </table:table-cell>
        </table:table-row>
        <table:table-row>
          <table:table-cell table:style-name="Table2.A1" office:value-type="string">
            <text:p text:style-name="P17">2. Проектная часть<text:span text:style-name="T6"> ...........................................................................................</text:span></text:p>
          </table:table-cell>
          <table:table-cell table:style-name="Table2.A1" office:value-type="string">
            <text:p text:style-name="P18">19</text:p>
          </table:table-cell>
        </table:table-row>
        <table:table-row>
          <table:table-cell table:style-name="Table2.A1" office:value-type="string">
            <text:p text:style-name="P19">2.1. Проектирование программного продукта ......................................</text:p>
          </table:table-cell>
          <table:table-cell table:style-name="Table2.A1" office:value-type="string">
            <text:p text:style-name="P18">19</text:p>
          </table:table-cell>
        </table:table-row>
        <table:table-row>
          <table:table-cell table:style-name="Table2.A1" office:value-type="string">
            <text:p text:style-name="P19">2.2. Руководство пользователя ...............................................................</text:p>
          </table:table-cell>
          <table:table-cell table:style-name="Table2.A1" office:value-type="string">
            <text:p text:style-name="P18">20</text:p>
          </table:table-cell>
        </table:table-row>
        <table:table-row>
          <table:table-cell table:style-name="Table2.A1" office:value-type="string">
            <text:p text:style-name="P19">2.3. Результаты апробации ......................................................................</text:p>
          </table:table-cell>
          <table:table-cell table:style-name="Table2.A1" office:value-type="string">
            <text:p text:style-name="P21">31</text:p>
          </table:table-cell>
        </table:table-row>
        <table:table-row>
          <table:table-cell table:style-name="Table2.A1" office:value-type="string">
            <text:p text:style-name="P22"><text:span text:style-name="T8">Заключение </text:span><text:span text:style-name="T9">........................................................................................................</text:span></text:p>
          </table:table-cell>
          <table:table-cell table:style-name="Table2.A1" office:value-type="string">
            <text:p text:style-name="P21">33</text:p>
          </table:table-cell>
        </table:table-row>
        <table:table-row>
          <table:table-cell table:style-name="Table2.A1" office:value-type="string">
            <text:p text:style-name="P22"><text:span text:style-name="T8">Список использованных источников </text:span><text:span text:style-name="T9">..........................................................</text:span></text:p>
          </table:table-cell>
          <table:table-cell table:style-name="Table2.A1" office:value-type="string">
            <text:p text:style-name="P21">36</text:p>
          </table:table-cell>
        </table:table-row>
      </table:table>
      <text:p text:style-name="P23"/>
      <text:p text:style-name="P24">1. ПОЯСНИТЕЛЬНАЯ ЗАПИСКА</text:p>
      <text:p text:style-name="P25"/>
      <text:p text:style-name="P25">1.1. Квалификационные характеристики проекта</text:p>
      <text:p text:style-name="P25"/>
      <text:p text:style-name="P26">В условиях цифровизации образования всё больше людей осваивают программирование в онлайн-формате, включая школьников, студентов и взрослых, проходящих профессиональную переподготовку. Онлайн-обучение позволяет получать знания независимо от места проживания и графика, однако одновременно обостряет проблему качества усвоения материала. Для эффективного изучения программирования недостаточно только теоретических лекций и тестовых заданий - ключевую роль играет регулярная практическая работа с кодом и получение оперативной обратной связи по результатам выполнения заданий.</text:p>
      <text:p text:style-name="P27">Существующие онлайн-платформы для обучения программированию нередко ориентированы либо на просмотр видеоматериалов, либо на выполнение ограниченного набора упражнений в браузере. Такой подход может снижать вовлечённость обучающихся и затруднять формирование устойчивых практических навыков. Кроме того, пользователи сталкиваются с трудностями при настройке рабочей среды, что особенно критично для начинающих, не обладающих достаточным техническим опытом.</text:p>
      <text:p text:style-name="P27">Актуальной является задача создания удобного и безопасного инструмента, который объединяет теоретическое обучение и практику программирования в едином образовательном пространстве, минимизируя технические барьеры для обучающихся. Десктопное приложение в данном контексте способно обеспечить стабильную работу, привычный интерфейс и возможность локального хранения учебных материалов, что повышает доступность обучения и снижает зависимость от качества интернет-соединения. Таким образом, разработка десктопного приложения для онлайн-школы по программированию является актуальной задачей, направленной на повышение эффективности обучения, удобства использования образовательных платформ и качества формирования практических навыков программирования у обучающихся.</text:p>
      <text:p text:style-name="P28"><text:soft-page-break/><text:span text:style-name="T10">Объектом</text:span><text:span text:style-name="T11"> дипломного проекта является процесс разработки приложения.</text:span></text:p>
      <text:p text:style-name="P28"><text:span text:style-name="T10">Предметом</text:span><text:span text:style-name="T11"> дипломного проекта является создание десктопного приложения с клиент-серверной архитектурой с помощью </text:span><text:span text:style-name="T12">Qt</text:span><text:span text:style-name="T11"> на языке </text:span><text:span text:style-name="T12">C</text:span><text:span text:style-name="T11">++.</text:span></text:p>
      <text:p text:style-name="P28"><text:span text:style-name="T10">Целью</text:span><text:span text:style-name="T11"> дипломного проекта является разработка десктопного приложения для онлайн-школы по программированию, обеспечивающее эффективное обучение с безопасным выполнением пользовательского кода и удобным интерфейсом для изучения теории и практики.</text:span></text:p>
      <text:p text:style-name="P28"><text:span text:style-name="T11">В соответствии с поставленной целью в работе необходимо решить следующие </text:span><text:span text:style-name="T10">задачи</text:span><text:span text:style-name="T11">:</text:span></text:p>
      <text:list xml:id="list1969766656" text:style-name="WWNum7">
        <text:list-item text:start-value="1">
          <text:p text:style-name="P29">Изучить и проанализировать предметную область.</text:p>
        </text:list-item>
        <text:list-item text:style-override="WWNum3">
          <text:p text:style-name="P30">Разработать техническое задание.</text:p>
        </text:list-item>
        <text:list-item text:style-override="WWNum3">
          <text:p text:style-name="P30">Создать программное обеспечение.</text:p>
        </text:list-item>
        <text:list-item text:style-override="WWNum3">
          <text:p text:style-name="P30">Разработать пользовательский интерфейс приложения.</text:p>
        </text:list-item>
        <text:list-item text:style-override="WWNum3">
          <text:p text:style-name="P30">Подготовить руководство пользователя.</text:p>
        </text:list-item>
      </text:list>
      <text:p text:style-name="P28"><text:span text:style-name="T13">Тип проекта</text:span><text:span text:style-name="T14">: практико-ориентированный.</text:span></text:p>
      <text:p text:style-name="P28"><text:span text:style-name="T13">Этапы работы над проектом</text:span><text:span text:style-name="T14">:</text:span></text:p>
      <text:list text:style-name="WWNum2">
        <text:list-item>
          <text:p text:style-name="P31">Аналитический этап: исследование предметной области, анализ требований</text:p>
        </text:list-item>
        <text:list-item>
          <text:p text:style-name="P31">Проектирование: разработка архитектуры, проектирование интерфейсов</text:p>
        </text:list-item>
        <text:list-item>
          <text:p text:style-name="P31">Реализация: программирование клиентской и серверной частей</text:p>
        </text:list-item>
        <text:list-item>
          <text:p text:style-name="P31">Интеграция: объединение компонентов</text:p>
        </text:list-item>
        <text:list-item>
          <text:p text:style-name="P31">Тестирование: функциональное и интеграционное тестирование</text:p>
        </text:list-item>
        <text:list-item>
          <text:p text:style-name="P31">Документирование: написание технической документации</text:p>
        </text:list-item>
      </text:list>
      <text:p text:style-name="P28"><text:span text:style-name="T10">Прикладная ценность проекта</text:span><text:span text:style-name="T11"> заключается в создании удобного программного средства, предназначенного для поддержки процесса обучения программированию в онлайн-школах. Разрабатываемое приложение предоставляет обучающимся единое образовательное пространство, в котором теоретические материалы и практические задания объединены в одном интерфейсе. Такой подход упрощает процесс обучения, повышает вовлечённость </text:span><text:soft-page-break/><text:span text:style-name="T11">пользователей и способствует более эффективному закреплению изучаемого материала за счёт немедленного применения знаний на практике.</text:span></text:p>
      <text:p text:style-name="P28"><text:span text:style-name="T10">Критерии эффективности проекта</text:span><text:span text:style-name="T11">:</text:span></text:p>
      <text:list xml:id="list4020346865" text:style-name="WWNum8">
        <text:list-item text:start-value="1">
          <text:p text:style-name="P32">Корректность выполнения программных заданий и точность проверки результатов работы пользователей.</text:p>
        </text:list-item>
        <text:list-item text:style-override="WWNum4">
          <text:p text:style-name="P33">Понятность и простота использования приложения.</text:p>
        </text:list-item>
        <text:list-item text:style-override="WWNum4">
          <text:p text:style-name="P33">Стабильность работы системы при взаимодействии пользователей с учебными материалами и заданиями.</text:p>
        </text:list-item>
      </text:list>
      <text:p text:style-name="P34">Теоретическая часть проекта включает анализ современных подходов к организации онлайн-обучения программированию, с акцентом на сочетание теоретических материалов и практических заданий. Рассматриваются принципы построения обучающих систем, обеспечивающих поэтапное освоение материала и формирование практических навыков программирования. Проведённый анализ позволяет обосновать выбранную структуру образовательной платформы и подходы к организации учебного процесса, направленные на повышение эффективности обучения и удобства взаимодействия пользователей с системой.</text:p>
      <text:p text:style-name="P35"/>
      <text:p text:style-name="P25">1.2. Описание предметной области</text:p>
      <text:p text:style-name="P36"/>
      <text:p text:style-name="P34">Онлайн-обучение программированию представляет собой форму образовательного процесса, при которой освоение знаний и практических навыков в области разработки программного обеспечения осуществляется с использованием цифровых образовательных платформ и программных средств. В отличие от традиционного очного обучения, онлайн-формат предоставляет обучающимся возможность получать знания независимо от географического положения, временных ограничений и индивидуального графика. Это делает обучение программированию более доступным и гибким, особенно в условиях быстрого развития информационных технологий и роста потребности в <text:span text:style-name="T15">IT</text:span>-специалистах.</text:p>
      <text:p text:style-name="P28"><text:span text:style-name="T11">Особенностью онлайн-обучения является высокая степень самостоятельности обучающихся. Пользователь самостоятельно планирует темп </text:span><text:soft-page-break/><text:span text:style-name="T11">прохождения курса, выбирает время для изучения материалов и выполнения заданий. При этом эффективность такого обучения во многом зависит от качества используемой образовательной платформы, структуры учебных материалов и наличия инструментов, обеспечивающих практическое применение полученных знаний. В области программирования данные факторы приобретают особую значимость, поскольку формирование навыков невозможно без регулярной практической деятельности.</text:span></text:p>
      <text:p text:style-name="P34">Целевой аудиторией онлайн-обучения программированию являются различные категории пользователей, отличающиеся уровнем подготовки, возрастом и образовательными целями. К одной из ключевых групп относятся школьники старших классов, которые рассматривают программирование как перспективное направление для дальнейшего обучения и профессиональной деятельности. Для данной категории особенно важны наглядность учебных материалов, поэтапное объяснение базовых понятий и простота взаимодействия с образовательной средой, поскольку большинство обучающихся не обладает предварительным техническим опытом.</text:p>
      <text:p text:style-name="P34">Программирование как учебная дисциплина имеет ряд существенных особенностей, отличающих его от большинства гуманитарных и даже многих технических предметов. В первую очередь, программирование ориентировано не только на усвоение теоретических знаний, но и на формирование устойчивых практических навыков. Понимание синтаксиса языков программирования, алгоритмов и принципов разработки программных систем не приводит к ожидаемому результату без регулярной работы с кодом и самостоятельного решения практических задач.</text:p>
      <text:p text:style-name="P28"><text:span text:style-name="T11">Процесс обучения программированию предполагает активное взаимодействие обучающегося с программной средой. В ходе выполнения заданий пользователь сталкивается с ошибками, анализирует результаты работы программы, вносит исправления и повторно проверяет решение. Такой итеративный характер обучения способствует развитию аналитического мышления, навыков поиска и устранения ошибок, а также способности к </text:span><text:soft-page-break/><text:span text:style-name="T11">самостоятельному решению задач. В отличие от дисциплин, где результат может быть выражен в виде тестового ответа или письменного рассуждения, в программировании корректность решения определяется фактическим поведением созданной программы.</text:span></text:p>
      <text:p text:style-name="P34">Таким образом, онлайн-обучение программированию представляет собой сложную и многоаспектную предметную область, в которой пересекаются образовательные цели, потребности различных категорий пользователей и требования к практической направленности учебного процесса. Эффективная организация обучения в данной области требует использования специализированных программных средств, способных обеспечить удобный доступ к учебным материалам, поддержку практической деятельности и получение обратной связи, что делает разработку соответствующих образовательных приложений актуальной и востребованной задачей.</text:p>
      <text:p text:style-name="P34">Онлайн-обучение программированию представляет собой последовательность взаимосвязанных учебных процессов, направленных на формирование у обучающихся теоретических знаний и практических навыков. Эффективность обучения определяется тем, насколько логично и согласованно организованы данные процессы в рамках образовательной платформы. Процесс обучения начинается с изучения теоретического материала. Теоретическая часть включает объяснение базовых понятий, принципов и подходов, необходимых для понимания изучаемой темы. В онлайн-формате теоретические материалы должны быть структурированы и представлены в доступной форме, позволяющей обучающемуся последовательно осваивать новые знания и возвращаться к ранее изученному материалу при необходимости. Чёткая логика изложения способствует снижению когнитивной нагрузки и повышает усвоение информации.</text:p>
      <text:p text:style-name="P28"><text:span text:style-name="T11">Следующим этапом является выполнение практических заданий, направленных на закрепление теоретических знаний. Практика играет ключевую роль в обучении программированию, поскольку именно в процессе написания кода формируются навыки анализа задач, поиска решений и устранения ошибок. </text:span><text:soft-page-break/><text:span text:style-name="T11">Задания должны соответствовать изучаемой теме и усложняться по мере продвижения обучающегося, обеспечивая поэтапное развитие навыков программирования.</text:span></text:p>
      <text:p text:style-name="P34">Важным процессом является проверка решений, выполненных обучающимися. Проверка позволяет определить корректность выполнения задания и степень усвоения материала. В условиях онлайн-обучения данный процесс должен быть организован таким образом, чтобы обеспечивать объективность оценки и минимизировать субъективные факторы. Наличие чётких критериев проверки способствует формированию у обучающихся понимания требований к результатам работы. Результаты проверки сопровождаются получением обратной связи, которая является неотъемлемой частью образовательного процесса. Обратная связь позволяет обучающемуся понять допущенные ошибки, скорректировать подход к решению задач и улучшить качество выполняемых работ. Своевременная и понятная обратная связь повышает мотивацию обучающихся и способствует более глубокому усвоению учебного материала.</text:p>
      <text:p text:style-name="P34">Завершающим процессом является отслеживание прогресса обучения. Фиксация результатов выполнения заданий и прохождения учебных тем позволяет обучающемуся оценивать собственные достижения и планировать дальнейшее обучение. Для преподавателя и образовательной платформы данный процесс обеспечивает контроль за ходом обучения и позволяет выявлять трудности, возникающие у обучающихся на различных этапах освоения курса. Таким образом, основные процессы онлайн-обучения программированию образуют целостную систему, в которой теоретическое обучение, практика, проверка и обратная связь взаимно дополняют друг друга. Эффективная реализация данных процессов является ключевым фактором успешного формирования практических навыков программирования в онлайн-среде.</text:p>
      <text:p text:style-name="P28"><text:span text:style-name="T11">Несмотря на широкое распространение онлайн-платформ для обучения программированию, существующие решения не всегда обеспечивают полноценное и удобное освоение учебного материала. Многие проблемы </text:span><text:soft-page-break/><text:span text:style-name="T11">проявляются именно на уровне пользовательского опыта и организации учебного процесса, что может снижать эффективность обучения и мотивацию обучающихся.</text:span></text:p>
      <text:p text:style-name="P34">Одной из распространённых проблем является разрыв между теоретическим материалом и практической деятельностью. Во многих образовательных ресурсах теория и практика представлены раздельно: обучающимся предлагается сначала изучить лекционный материал, а затем самостоятельно искать способы применить полученные знания. Отсутствие тесной связи между объяснением темы и немедленным выполнением практических заданий затрудняет понимание материала и замедляет формирование практических навыков. Существенные сложности возникают у начинающих обучающихся при подготовке рабочей среды для выполнения программных заданий. Необходимость установки и настройки дополнительных инструментов может отвлекать от учебного процесса и вызывать затруднения у пользователей, не обладающих достаточным техническим опытом. В результате внимание обучающегося смещается с изучения программирования на решение вспомогательных технических задач.</text:p>
      <text:p text:style-name="P34">Ограниченные возможности проверки программных заданий также являются распространённой проблемой онлайн-обучения. В ряде систем проверка сводится к формальному сравнению результата или требует ручного вмешательства со стороны преподавателя. Это снижает оперативность получения обратной связи и ограничивает возможности объективной оценки выполненных работ, особенно при большом количестве обучающихся. Зависимость от стабильного интернет-соединения оказывает негативное влияние на доступность онлайн-обучения. При нестабильном или ограниченном доступе к сети обучающиеся могут испытывать трудности при изучении материалов и выполнении заданий, что нарушает непрерывность учебного процесса. Отсутствие возможности продолжить обучение в офлайн-режиме снижает гибкость образовательных платформ.</text:p>
      <text:p text:style-name="P28"><text:soft-page-break/><text:span text:style-name="T11">Дополнительным ограничением является отсутствие единого и согласованного интерфейса обучения. Использование нескольких разрозненных инструментов для просмотра теоретических материалов, выполнения заданий и отслеживания прогресса усложняет взаимодействие с образовательной средой. Это повышает когнитивную нагрузку на обучающегося и может отрицательно сказываться на вовлечённости в учебный процесс. Перечисленные проблемы указывают на необходимость создания образовательного решения, ориентированного на потребности пользователей и специфику обучения программированию. Повышение связности учебных процессов, упрощение практической работы и улучшение пользовательского опыта являются важными направлениями развития онлайн-образования в данной области.</text:span></text:p>
      <text:p text:style-name="P34">Разрабатываемое приложение занимает место комплексного инструмента поддержки онлайн-обучения программированию, ориентированного на интеграцию основных учебных процессов в едином образовательном пространстве. Его назначение заключается в упрощении взаимодействия участников образовательного процесса и повышении эффективности освоения программирования за счёт систематизации учебных материалов и практической деятельности. Приложение автоматизирует ключевые этапы обучения, связанные с предоставлением учебного контента, выполнением практических заданий и оценкой результатов работы обучающихся. Теоретические материалы и практические задания представлены в согласованной структуре, что позволяет обучающемуся последовательно переходить от изучения темы к её практическому применению. Это снижает разрыв между теорией и практикой и способствует более осознанному усвоению материала.</text:p>
      <text:p text:style-name="P34">Существенным направлением автоматизации является процесс проверки программных заданий и фиксации результатов обучения. Обучающиеся получают возможность самостоятельно выполнять задания и получать результаты проверки без задержек, связанных с ручной обработкой решений. Это упрощает процесс обучения, повышает его прозрачность и позволяет обучающимся лучше отслеживать собственный прогресс.</text:p>
      <text:p text:style-name="P28"><text:soft-page-break/><text:span text:style-name="T11">Для преподавателей и авторов курсов приложение упрощает организацию учебного процесса и сопровождение обучающихся. Централизованное размещение учебных материалов и заданий снижает нагрузку, связанную с управлением образовательным контентом, и позволяет сосредоточиться на методической стороне обучения. Возможность анализа результатов выполнения заданий способствует более точной оценке уровня подготовки обучающихся и корректировке содержания курса.</text:span></text:p>
      <text:p text:style-name="P34">Для онлайн-школы в целом разрабатываемое приложение выступает инструментом повышения качества образовательных услуг. Использование единой платформы обучения способствует формированию целостного образовательного продукта, повышает удобство использования и доверие со стороны пользователей. Это создаёт условия для масштабирования образовательных программ и расширения аудитории без существенного увеличения организационных затрат.</text:p>
      <text:p text:style-name="P37"><text:span text:style-name="T16">Рассматриваемое приложение, таким образом, органично встраивается в предметную область онлайн-обучения программированию, дополняя и упорядочивая существующие образовательные процессы. Его функциональная направленность определяет требования к структуре, возможностям и </text:span><text:span text:style-name="T11">архитектуре системы, которые будут рассмотрены в последующих главах работы.</text:span></text:p>
      <text:p text:style-name="P38">1.3. Техническое задание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Техническое задание на разработку программы</text:p>
      <text:p text:style-name="P40">«Десктопное приложение для онлайн-школы по программированию»</text:p>
      <text:p text:style-name="P40"/>
      <text:p text:style-name="P41">Содержание</text:p>
      <text:list xml:id="list4228886708" text:style-name="WWNum9">
        <text:list-item text:start-value="1">
          <text:p text:style-name="P42">Введение</text:p>
          <text:list text:style-name="WWNum1">
            <text:list-item>
              <text:p text:style-name="P43">Основание для разработки</text:p>
            </text:list-item>
            <text:list-item>
              <text:p text:style-name="P43">Назначение и область применения</text:p>
            </text:list-item>
          </text:list>
        </text:list-item>
        <text:list-item text:style-override="WWNum1">
          <text:p text:style-name="P43">Требования к программе</text:p>
          <text:list text:style-name="WWNum1">
            <text:list-item>
              <text:p text:style-name="P43">Требования к функциональным характеристикам</text:p>
            </text:list-item>
            <text:list-item>
              <text:p text:style-name="P43">Требования к надёжности</text:p>
              <text:list>
                <text:list-item>
                  <text:p text:style-name="P43">Требования к обеспечению надёжного функционирования программы</text:p>
                </text:list-item>
                <text:list-item>
                  <text:p text:style-name="P43">Время восстановления после отказа</text:p>
                </text:list-item>
                <text:list-item>
                  <text:p text:style-name="P43">Отказы из-за некорректных действий пользовательской системы</text:p>
                </text:list-item>
              </text:list>
            </text:list-item>
          </text:list>
        </text:list-item>
        <text:list-item text:style-override="WWNum1">
          <text:p text:style-name="P43">Условия эксплуатации</text:p>
          <text:list text:style-name="WWNum1">
            <text:list-item>
              <text:p text:style-name="P43">Климатические условия эксплуатации</text:p>
            </text:list-item>
            <text:list-item>
              <text:p text:style-name="P43">Требования к квалификации и численности персонала</text:p>
            </text:list-item>
            <text:list-item>
              <text:p text:style-name="P43">Требования к составу и параметрам технических средств</text:p>
            </text:list-item>
            <text:list-item>
              <text:p text:style-name="P43">Требования к информационной и программной совместимости</text:p>
              <text:list>
                <text:list-item>
                  <text:p text:style-name="P43">Требования к информационным структурам и методам решения</text:p>
                </text:list-item>
                <text:list-item>
                  <text:p text:style-name="P43">Требования к исходным кодам и языкам программирования</text:p>
                </text:list-item>
                <text:list-item>
                  <text:p text:style-name="P43">Требования к программным средствам, используемым программой</text:p>
                </text:list-item>
                <text:list-item>
                  <text:p text:style-name="P43">Требования к защите информации и программ</text:p>
                </text:list-item>
              </text:list>
            </text:list-item>
            <text:list-item>
              <text:p text:style-name="P43">Специальные требования</text:p>
            </text:list-item>
          </text:list>
        </text:list-item>
        <text:list-item text:style-override="WWNum1">
          <text:p text:style-name="P43">Требования к программной документации</text:p>
          <text:list text:style-name="WWNum1">
            <text:list-item>
              <text:p text:style-name="P43">Состав программной документации</text:p>
            </text:list-item>
          </text:list>
        </text:list-item>
        <text:list-item text:style-override="WWNum1">
          <text:p text:style-name="P43">Технико-экономическое обоснование</text:p>
        </text:list-item>
        <text:list-item text:style-override="WWNum1">
          <text:p text:style-name="P43">Стадии и этапы разработки</text:p>
          <text:list text:style-name="WWNum1">
            <text:list-item>
              <text:p text:style-name="P43">Стадии разработки</text:p>
            </text:list-item>
            <text:list-item>
              <text:p text:style-name="P43">Этапы разработки</text:p>
            </text:list-item>
            <text:list-item>
              <text:p text:style-name="P43">Содержание работ по этапам</text:p>
            </text:list-item>
          </text:list>
        </text:list-item>
        <text:list-item text:style-override="WWNum1">
          <text:p text:style-name="P43">Порядок контроля и приемки</text:p>
          <text:list text:style-name="WWNum1">
            <text:list-item>
              <text:p text:style-name="P43">Предварительный контроль</text:p>
            </text:list-item>
            <text:list-item>
              <text:p text:style-name="P43">Тестирование</text:p>
            </text:list-item>
            <text:list-item>
              <text:p text:style-name="P43">Приёмка</text:p>
            </text:list-item>
          </text:list>
        </text:list-item>
      </text:list>
      <text:list xml:id="list2568788693" text:style-name="WWNum10">
        <text:list-item text:start-value="1">
          <text:p text:style-name="P44">Введение</text:p>
          <text:list text:style-name="WWNum5">
            <text:list-item>
              <text:p text:style-name="P45">Основание для разработки</text:p>
              <text:list>
                <text:list-item>
                  <text:p text:style-name="P46">Наименование работы: «Десктопное приложение для онлайн-школы по программированию».</text:p>
                </text:list-item>
                <text:list-item>
                  <text:p text:style-name="P46">Основанием для разработки является задание на выпускную квалификационную работу.</text:p>
                </text:list-item>
                <text:list-item>
                  <text:p text:style-name="P46">Организация, утвердившая договор: Читинский Педагогический колледж.</text:p>
                </text:list-item>
              </text:list>
            </text:list-item>
            <text:list-item>
              <text:p text:style-name="P45">Назначение и область применения</text:p>
              <text:list>
                <text:list-item>
                  <text:p text:style-name="P46">Назначение разработки - создание настольного клиент-серверного приложения для обучения программированию, включающего каталог курсов, теоретические материалы, практические задания, запуск пользовательского кода и проверку решений на сервере.</text:p>
                </text:list-item>
                <text:list-item>
                  <text:p text:style-name="P46">Область применения - учебный процесс в онлайн-школе программирования для студентов и преподавателей.</text:p>
                </text:list-item>
                <text:list-item>
                  <text:p text:style-name="P46">Основные функциональные задачи приложения включают:</text:p>
                  <text:list>
                    <text:list-item>
                      <text:p text:style-name="P46">Регистрацию и авторизацию пользователей с разделением ролей (student, teacher);</text:p>
                    </text:list-item>
                    <text:list-item>
                      <text:p text:style-name="P46">Просмотр списка курсов (языков программирования), списка тем и связанных заданий;</text:p>
                    </text:list-item>
                    <text:list-item>
                      <text:p text:style-name="P46">Просмотр теоретических материалов по выбранной теме (поддержка HTML-разметки в тексте теории);</text:p>
                    </text:list-item>
                    <text:list-item>
                      <text:p text:style-name="P46">Просмотр условия задания и публичного примера ввода/вывода;</text:p>
                    </text:list-item>
                    <text:list-item>
                      <text:p text:style-name="P46">Редактирование и запуск пользовательского кода с передачей входных данных;</text:p>
                    </text:list-item>
                    <text:list-item>
                      <text:p text:style-name="P46">Автоматическую проверку решения на тестах и возврат количества пройденных тестов;</text:p>
                    </text:list-item>
                    <text:list-item>
                      <text:p text:style-name="P46">Отображение прогресса обучения по темам и курсам в профиле пользователя;</text:p>
                    </text:list-item>
                    <text:list-item>
                      <text:p text:style-name="P46">Восстановление пароля по секретному восстановительному полю;</text:p>
                    </text:list-item>
                    <text:list-item>
                      <text:p text:style-name="P46">Администрирование учебного контента преподавателем (создание курсов, тем, заданий и тестов).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text:continue-list="list2568788693" text:style-name="WWNum5">
        <text:list-item>
          <text:p text:style-name="P47"><text:span text:style-name="T17">Требова</text:span><text:span text:style-name="T18">ния</text:span></text:p>
          <text:list>
            <text:list-item>
              <text:p text:style-name="P45">Требования к функциональным характеристикам</text:p>
              <text:list>
                <text:list-item>
                  <text:p text:style-name="P48">Работа с учетными записями и ролями:</text:p>
                  <text:list>
                    <text:list-item>
                      <text:p text:style-name="P48">Программа должна поддерживать регистрацию с обязательным указанием логина, пароля, роли и восстановительного поля;</text:p>
                    </text:list-item>
                    <text:list-item>
                      <text:p text:style-name="P48">Программа должна поддерживать вход по логину и паролю;</text:p>
                    </text:list-item>
                    <text:list-item>
                      <text:p text:style-name="P48">Программа должна поддерживать восстановление пароля по логину, восстановительному полю и новому паролю;</text:p>
                    </text:list-item>
                    <text:list-item>
                      <text:p text:style-name="P48">Для авторизованного пользователя должна поддерживаться сессия по bearer-токену с ограниченным временем жизни;</text:p>
                    </text:list-item>
                    <text:list-item>
                      <text:p text:style-name="P48">Роль teacher должна предоставлять доступ к панели преподавателя, роль student - к пользовательскому режиму обучения.</text:p>
                    </text:list-item>
                  </text:list>
                </text:list-item>
                <text:list-item>
                  <text:p text:style-name="P48">Работа с курсами, темами и заданиями:</text:p>
                  <text:list>
                    <text:list-item>
                      <text:p text:style-name="P48">Должна быть реализована загрузка списка курсов (языков) с кратким описанием и изображением;</text:p>
                    </text:list-item>
                    <text:list-item>
                      <text:p text:style-name="P48">Для выбранного курса должна быть реализована загрузка списка тем;</text:p>
                    </text:list-item>
                    <text:list-item>
                      <text:p text:style-name="P48">Для выбранной темы должна быть реализована загрузка теоретического материала и списка заданий;</text:p>
                    </text:list-item>
                    <text:list-item>
                      <text:p text:style-name="P48">Для выбранного задания должна быть реализована загрузка текста задания и публичного теста (пример входа/выхода);</text:p>
                    </text:list-item>
                    <text:list-item>
                      <text:p text:style-name="P48">Навигация должна обеспечивать последовательный переход: курсы → темы → теория → задание.</text:p>
                    </text:list-item>
                  </text:list>
                </text:list-item>
                <text:list-item>
                  <text:p text:style-name="P48">Редактор и выполнение кода:</text:p>
                  <text:list>
                    <text:list-item>
                      <text:p text:style-name="P48">В клиенте должен быть реализован встроенный редактор текста решения;</text:p>
                    </text:list-item>
                    <text:list-item>
                      <text:p text:style-name="P48"><text:soft-page-break/>Пользователь должен иметь возможность запускать код с произвольным входным набором данных;</text:p>
                    </text:list-item>
                    <text:list-item>
                      <text:p text:style-name="P48">Сервер должен компилировать/исполнять код во временной директории и возвращать результат выполнения;</text:p>
                    </text:list-item>
                    <text:list-item>
                      <text:p text:style-name="P48">Сервер должен поддерживать языки C++, Python, C# и Go;</text:p>
                    </text:list-item>
                    <text:list-item>
                      <text:p text:style-name="P48">При компиляционных ошибках должен возвращаться явный результат «Ошибка компиляции», при ошибках исполнения - соответствующее сообщение.</text:p>
                    </text:list-item>
                  </text:list>
                </text:list-item>
                <text:list-item>
                  <text:p text:style-name="P48">Проверка решений и прогресс:</text:p>
                  <text:list>
                    <text:list-item>
                      <text:p text:style-name="P48">Проверка решения должна выполняться на сервере по набору тестов задания;</text:p>
                    </text:list-item>
                    <text:list-item>
                      <text:p text:style-name="P48">Результатом проверки должно быть количество пройденных тестов и общий итог;</text:p>
                    </text:list-item>
                    <text:list-item>
                      <text:p text:style-name="P48">При полном прохождении тестов задание должно помечаться как решённое;</text:p>
                    </text:list-item>
                    <text:list-item>
                      <text:p text:style-name="P48">При решении всех заданий темы прогресс темы должен устанавливаться в 100%;</text:p>
                    </text:list-item>
                    <text:list-item>
                      <text:p text:style-name="P48">В профиле должен отображаться общий прогресс, список завершённых/незавершённых тем и прогресс по курсам.</text:p>
                    </text:list-item>
                  </text:list>
                </text:list-item>
                <text:list-item>
                  <text:p text:style-name="P48">Функции преподавателя:</text:p>
                  <text:list>
                    <text:list-item>
                      <text:p text:style-name="P48">Преподаватель должен иметь возможность создавать курс (название, краткое описание, URL изображения);</text:p>
                    </text:list-item>
                    <text:list-item>
                      <text:p text:style-name="P48">Преподаватель должен иметь возможность создавать тему (курс, название темы, текст теории);</text:p>
                    </text:list-item>
                    <text:list-item>
                      <text:p text:style-name="P48">Преподаватель должен иметь возможность создавать задание (тема, текст, публичный пример);</text:p>
                    </text:list-item>
                    <text:list-item>
                      <text:p text:style-name="P48">Преподаватель должен иметь возможность добавлять дополнительные тесты к заданию;</text:p>
                    </text:list-item>
                    <text:list-item>
                      <text:p text:style-name="P48">Доступ к операциям создания контента должен быть ограничен серверной проверкой роли teacher.</text:p>
                    </text:list-item>
                  </text:list>
                </text:list-item>
              </text:list>
            </text:list-item>
            <text:list-item>
              <text:p text:style-name="P45">Требования к надёжности</text:p>
              <text:list>
                <text:list-item>
                  <text:p text:style-name="P46">Требования к обеспечению надежного функционирования программы:</text:p>
                  <text:list>
                    <text:list-item>
                      <text:p text:style-name="P46">Все API-методы должны валидировать HTTP-метод запроса и обязательные поля входных данных;</text:p>
                    </text:list-item>
                    <text:list-item>
                      <text:p text:style-name="P46">При ошибках валидации или авторизации сервер должен возвращать структурированный JSON-ответ с кодом ошибки;</text:p>
                    </text:list-item>
                    <text:list-item>
                      <text:p text:style-name="P46">Приложение должно обрабатывать сетевые и серверные ошибки с выводом текста ошибки пользователю;</text:p>
                    </text:list-item>
                    <text:list-item>
                      <text:p text:style-name="P46">Для снижения риска зависаний выполнения кода должны использоваться ограничения по времени компиляции и запуска;</text:p>
                    </text:list-item>
                    <text:list-item>
                      <text:p text:style-name="P46">Временные каталоги выполнения должны очищаться после завершения запуска/проверки;</text:p>
                    </text:list-item>
                    <text:list-item>
                      <text:p text:style-name="P46">Состояние авторизации должно корректно сбрасываться при выходе из аккаунта.</text:p>
                    </text:list-item>
                  </text:list>
                </text:list-item>
                <text:list-item>
                  <text:p text:style-name="P46">Время восстановления после отказа:</text:p>
                  <text:list>
                    <text:list-item>
                      <text:p text:style-name="P46">При отказе клиентской программы восстановление обеспечивается перезапуском приложения;</text:p>
                    </text:list-item>
                    <text:list-item>
                      <text:p text:style-name="P46">При истечении серверной сессии пользователь должен повторно авторизоваться;</text:p>
                    </text:list-item>
                    <text:list-item>
                      <text:p text:style-name="P46">При сбое серверной части восстановление зависит от причины и включает перезапуск web/API-сервиса и проверку БД.</text:p>
                    </text:list-item>
                  </text:list>
                </text:list-item>
                <text:list-item>
                  <text:p text:style-name="P46">Отказы из-за некорректных действий пользователей системы</text:p>
                  <text:list>
                    <text:list-item>
                      <text:p text:style-name="P46">При пустом или некорректном вводе (логин/пароль/код/ID) должны возвращаться сообщения об ошибке;</text:p>
                    </text:list-item>
                    <text:list-item>
                      <text:p text:style-name="P46">При попытке вызова защищённых методов без токена должен возвращаться отказ авторизации;</text:p>
                    </text:list-item>
                    <text:list-item>
                      <text:p text:style-name="P46">При попытке доступа студента к операциям преподавателя должен возвращаться отказ по правам доступа.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text:continue-numbering="true" text:style-name="WWNum5">
        <text:list-item>
          <text:p text:style-name="P47"><text:soft-page-break/><text:span text:style-name="T17">Условия эксплуатации</text:span></text:p>
          <text:list>
            <text:list-item>
              <text:p text:style-name="P45">Климатические условия эксплуатации</text:p>
              <text:list>
                <text:list-item>
                  <text:p text:style-name="P46">Рабочая температура должна находиться в диапазоне от 10 до 35 градусов Цельсия;</text:p>
                </text:list-item>
                <text:list-item>
                  <text:p text:style-name="P46">Рабочая влажность должна быть в диапазоне от 30% до 80%.</text:p>
                </text:list-item>
              </text:list>
            </text:list-item>
            <text:list-item>
              <text:p text:style-name="P45">Требования к квалификации и численности персонала</text:p>
              <text:list>
                <text:list-item>
                  <text:p text:style-name="P46">Для студента и преподавателя специальных навыков администрирования системы не требуется;</text:p>
                </text:list-item>
                <text:list-item>
                  <text:p text:style-name="P46">Для сопровождения серверной части требуется специалист, владеющий PHP, SQL и администрированием Linux-сервера.</text:p>
                </text:list-item>
              </text:list>
            </text:list-item>
            <text:list-item>
              <text:p text:style-name="P45">Требования к составу и параметрам технических средств</text:p>
              <text:list>
                <text:list-item>
                  <text:p text:style-name="P46">Клиентская ОС: Windows 10+ или Linux;</text:p>
                </text:list-item>
                <text:list-item>
                  <text:p text:style-name="P46">Процессор: Intel Core i3 или эквивалент;</text:p>
                </text:list-item>
                <text:list-item>
                  <text:p text:style-name="P46">ОЗУ: не менее <text:span text:style-name="T19">1</text:span> ГБ;</text:p>
                </text:list-item>
                <text:list-item>
                  <text:p text:style-name="P46">Свободное место на диске: не менее <text:span text:style-name="T19">2</text:span>00 МБ для клиента;</text:p>
                </text:list-item>
                <text:list-item>
                  <text:p text:style-name="P46">Постоянное интернет-соединение для работы с API;</text:p>
                </text:list-item>
                <text:list-item>
                  <text:p text:style-name="P46">Сервер: Linux/Unix-подобная ОС, PHP с PDO MySQL, СУБД MySQL/MariaDB;</text:p>
                </text:list-item>
                <text:list-item>
                  <text:p text:style-name="P46">Для выполнения кода на сервере требуются установленные инструменты: g++, python3, mono (mcs/csc+mono), go.</text:p>
                </text:list-item>
              </text:list>
            </text:list-item>
            <text:list-item>
              <text:p text:style-name="P45">Требования к информационной и программной совместимости</text:p>
              <text:list>
                <text:list-item>
                  <text:p text:style-name="P46">Требования к информационным структурам и методам решения:</text:p>
                  <text:list>
                    <text:list-item>
                      <text:p text:style-name="P46">Данные должны храниться в реляционной БД с сущностями пользователей, сессий, языков, тем, заданий, тестов и прогресса;</text:p>
                    </text:list-item>
                    <text:list-item>
                      <text:p text:style-name="P46">Обмен между клиентом и сервером должен осуществляться по HTTP(S) с JSON-полями;</text:p>
                    </text:list-item>
                    <text:list-item>
                      <text:p text:style-name="P46">Идентификаторы курсов, тем и заданий должны использоваться в API-запросах для выборки контента;</text:p>
                    </text:list-item>
                    <text:list-item>
                      <text:p text:style-name="P46">Прогресс должен вычисляться на сервере и передаваться клиенту в агрегированном виде.</text:p>
                    </text:list-item>
                  </text:list>
                </text:list-item>
                <text:list-item>
                  <text:p text:style-name="P46">Требования к исходным кодам и языкам программирования:</text:p>
                  <text:list>
                    <text:list-item>
                      <text:p text:style-name="P46">Клиентская часть реализуется на C++ (Qt) и QML;</text:p>
                    </text:list-item>
                    <text:list-item>
                      <text:p text:style-name="P46">Серверная API-часть реализуется на PHP;</text:p>
                    </text:list-item>
                    <text:list-item>
                      <text:p text:style-name="P46">SQL-скрипт и структура БД должны быть совместимы с MySQL/MariaDB;</text:p>
                    </text:list-item>
                    <text:list-item>
                      <text:p text:style-name="P46">Код должен быть структурирован по модулям: клиентский UI, клиентский API-слой, серверные endpoint-методы.</text:p>
                    </text:list-item>
                  </text:list>
                </text:list-item>
                <text:list-item>
                  <text:p text:style-name="P46">Требования к программным средствам, используемым программой:</text:p>
                  <text:list>
                    <text:list-item>
                      <text:p text:style-name="P46">Клиент использует Qt Quick / Qt Quick Controls / Qt Network;</text:p>
                    </text:list-item>
                    <text:list-item>
                      <text:p text:style-name="P46">Сервер использует PHP PDO и веб-сервер с поддержкой запуска PHP-скриптов;</text:p>
                    </text:list-item>
                    <text:list-item>
                      <text:p text:style-name="P46">Для выполнения пользовательского кода используются системные компиляторы/интерпретаторы и утилита timeout;</text:p>
                    </text:list-item>
                    <text:list-item>
                      <text:p text:style-name="P46">Система должна обеспечивать совместимость протокола API между клиентом и сервером при единых именах endpoint-методов.</text:p>
                    </text:list-item>
                  </text:list>
                </text:list-item>
                <text:list-item>
                  <text:p text:style-name="P46">Требования к защите информации и программ:</text:p>
                  <text:list>
                    <text:list-item>
                      <text:p text:style-name="P46">Пароли и восстановительные данные должны храниться в виде хэшей;</text:p>
                    </text:list-item>
                    <text:list-item>
                      <text:p text:style-name="P46">Доступ к защищённым API-методам должен осуществляться только по bearer-токену;</text:p>
                    </text:list-item>
                    <text:list-item>
                      <text:p text:style-name="P46">Для выполнения пользовательского кода должны применяться ограничения времени выполнения;</text:p>
                    </text:list-item>
                    <text:list-item>
                      <text:p text:style-name="P46">Должно быть реализовано разграничение доступа по ролям и запрет несанкционированных операций.</text:p>
                    </text:list-item>
                  </text:list>
                </text:list-item>
              </text:list>
            </text:list-item>
            <text:list-item>
              <text:p text:style-name="P45">Специальные требования</text:p>
              <text:list>
                <text:list-item>
                  <text:p text:style-name="P46">Интерфейс должен поддерживать пользовательский сценарий без стандартной системной рамки окна (кастомный заголовок окна);</text:p>
                </text:list-item>
                <text:list-item>
                  <text:p text:style-name="P46">Должна поддерживаться стартовая заставка (Splash Screen);</text:p>
                </text:list-item>
                <text:list-item>
                  <text:p text:style-name="P46"><text:soft-page-break/>В профиле должен отображаться детализированный прогресс по темам и курсам;</text:p>
                </text:list-item>
                <text:list-item>
                  <text:p text:style-name="P46">Панель преподавателя должна быть доступна только после авторизации учётной записи с ролью teacher;</text:p>
                </text:list-item>
                <text:list-item>
                  <text:p text:style-name="P46">В программе должен быть реализован выход из аккаунта с очисткой локального состояния авторизации.</text:p>
                </text:list-item>
              </text:list>
            </text:list-item>
          </text:list>
        </text:list-item>
      </text:list>
      <text:p text:style-name="P50"/>
      <text:list text:continue-numbering="true" text:style-name="WWNum5">
        <text:list-item>
          <text:p text:style-name="P45">Требования к программной документации</text:p>
          <text:list>
            <text:list-item>
              <text:p text:style-name="P45">Состав программной документации</text:p>
              <text:list>
                <text:list-item>
                  <text:p text:style-name="P46">Техническое задание;</text:p>
                </text:list-item>
                <text:list-item>
                  <text:p text:style-name="P46">Руководство пользователя.</text:p>
                </text:list-item>
              </text:list>
            </text:list-item>
          </text:list>
        </text:list-item>
      </text:list>
      <text:p text:style-name="P50"/>
      <text:list text:continue-numbering="true" text:style-name="WWNum5">
        <text:list-item>
          <text:p text:style-name="P45">Технико-экономическое обоснование</text:p>
          <text:list>
            <text:list-item>
              <text:p text:style-name="P46">Разработка ориентирована на учебный процесс и не предполагает коммерческого лицензирования на этапе ВКР;</text:p>
            </text:list-item>
            <text:list-item>
              <text:p text:style-name="P46">Экономическая эффективность выражается в сокращении времени проверки типовых практических задач за счёт автоматизированной проверки;</text:p>
            </text:list-item>
            <text:list-item>
              <text:p text:style-name="P46">Использование открытых технологий (Qt, PHP, MySQL, компиляторы/интерпретаторы) снижает стоимость внедрения.</text:p>
            </text:list-item>
          </text:list>
        </text:list-item>
      </text:list>
      <text:p text:style-name="P50"/>
      <text:list text:continue-numbering="true" text:style-name="WWNum5">
        <text:list-item>
          <text:p text:style-name="P45">Стадии и этапы разработки</text:p>
          <text:list>
            <text:list-item>
              <text:p text:style-name="P45">Стадии разработки</text:p>
              <text:list>
                <text:list-item>
                  <text:p text:style-name="P46">Разработка технического задания;</text:p>
                </text:list-item>
                <text:list-item>
                  <text:p text:style-name="P46">Рабочее проектирование;</text:p>
                </text:list-item>
                <text:list-item>
                  <text:p text:style-name="P46">Внедрение.</text:p>
                </text:list-item>
              </text:list>
            </text:list-item>
            <text:list-item>
              <text:p text:style-name="P45">Этапы разработки</text:p>
              <text:list>
                <text:list-item>
                  <text:p text:style-name="P46">Разработка технического задания;</text:p>
                </text:list-item>
                <text:list-item>
                  <text:p text:style-name="P46">Разработка программы;</text:p>
                </text:list-item>
                <text:list-item>
                  <text:p text:style-name="P46">Разработка программной документации;</text:p>
                </text:list-item>
                <text:list-item>
                  <text:p text:style-name="P46">Испытания программы;</text:p>
                </text:list-item>
                <text:list-item>
                  <text:p text:style-name="P46">Подготовка и передача программы.</text:p>
                </text:list-item>
              </text:list>
            </text:list-item>
            <text:list-item>
              <text:p text:style-name="P45">Содержание работ по этапам</text:p>
              <text:list>
                <text:list-item>
                  <text:p text:style-name="P46">Разработка технического задания:</text:p>
                  <text:list>
                    <text:list-item>
                      <text:p text:style-name="P46">Постановка задачи;</text:p>
                    </text:list-item>
                    <text:list-item>
                      <text:p text:style-name="P46">Определение и уточнение требований к техническим средствам;</text:p>
                    </text:list-item>
                    <text:list-item>
                      <text:p text:style-name="P46">Определение требований к программе;</text:p>
                    </text:list-item>
                    <text:list-item>
                      <text:p text:style-name="P46">Определение стадий, этапов и сроков разработки программы и документации на неё;</text:p>
                    </text:list-item>
                    <text:list-item>
                      <text:p text:style-name="P46">Согласование и утверждение технического задания.</text:p>
                    </text:list-item>
                  </text:list>
                </text:list-item>
                <text:list-item>
                  <text:p text:style-name="P46">Разработка программы:</text:p>
                  <text:list>
                    <text:list-item>
                      <text:p text:style-name="P46">Программирование;</text:p>
                    </text:list-item>
                    <text:list-item>
                      <text:p text:style-name="P46">Отладка программы.</text:p>
                    </text:list-item>
                    <text:list-item>
                      <text:p text:style-name="P46">Разработка программной документации:</text:p>
                      <text:list>
                        <text:list-item>
                          <text:p text:style-name="P46">Разработка программных документов в соответствии с требованиями к составу документации.</text:p>
                        </text:list-item>
                      </text:list>
                    </text:list-item>
                  </text:list>
                </text:list-item>
                <text:list-item>
                  <text:p text:style-name="P46">Испытаний программы:</text:p>
                  <text:list>
                    <text:list-item>
                      <text:p text:style-name="P46">Разработка, согласование и утверждение и методики испытаний;</text:p>
                    </text:list-item>
                    <text:list-item>
                      <text:p text:style-name="P46"><text:s/>Проведение приемо-сдаточных испытаний;</text:p>
                    </text:list-item>
                    <text:list-item>
                      <text:p text:style-name="P46">Корректировка программы и программной документации по результатам испытаний.</text:p>
                    </text:list-item>
                  </text:list>
                </text:list-item>
                <text:list-item>
                  <text:p text:style-name="P46">Подготовка и передача программы:</text:p>
                  <text:list>
                    <text:list-item>
                      <text:p text:style-name="P46">Работа по подготовке и передаче программы и программной документации в эксплуатацию на объектах Заказчика.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text:continue-numbering="true" text:style-name="WWNum5">
        <text:list-item>
          <text:p text:style-name="P45">Порядок контроля и приемки<text:span text:style-name="T8"/></text:p>
          <text:list>
            <text:list-item>
              <text:p text:style-name="P47"><text:soft-page-break/><text:span text:style-name="T17">Предварительный контроль</text:span></text:p>
              <text:list>
                <text:list-item>
                  <text:p text:style-name="P46">Проверка соответствия функциональности приложения требованиям технического задания. Контроль качества кода и отсутствия ошибок.</text:p>
                </text:list-item>
              </text:list>
            </text:list-item>
            <text:list-item>
              <text:p text:style-name="P45">Тестирование</text:p>
              <text:list>
                <text:list-item>
                  <text:p text:style-name="P46">Проверка всех основных функций приложения;</text:p>
                </text:list-item>
                <text:list-item>
                  <text:p text:style-name="P46">Проверка стабильности работы приложения при различных нагрузках;</text:p>
                </text:list-item>
                <text:list-item>
                  <text:p text:style-name="P46">Проверка защиты данных пользователей.</text:p>
                </text:list-item>
              </text:list>
            </text:list-item>
            <text:list-item>
              <text:p text:style-name="P45">Приёмка</text:p>
              <text:list>
                <text:list-item>
                  <text:p text:style-name="P46">Проверка соответствия приложения требованиям безопасности и конфиденциальности данных;</text:p>
                </text:list-item>
                <text:list-item>
                  <text:p text:style-name="P46">Проверка оформления приложения в соответствии с корпоративным стилем компании;</text:p>
                </text:list-item>
                <text:list-item>
                  <text:p text:style-name="P46">Утверждение результатов тестирования.</text:p>
                </text:list-item>
              </text:list>
            </text:list-item>
          </text:list>
        </text:list-item>
      </text:list>
      <text:p text:style-name="P5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2">От ИСПОЛНИТЕЛЯ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2">От ЗАКАЗЧИКА</text:p>
          </table:table-cell>
        </table:table-row>
        <table:table-row>
          <table:table-cell table:style-name="Table4.A2" office:value-type="string">
            <text:p text:style-name="P52">Богодухов А.Г.</text:p>
          </table:table-cell>
          <table:table-cell table:style-name="Table4.A1" office:value-type="string">
            <text:p text:style-name="P53"/>
          </table:table-cell>
          <table:table-cell table:style-name="Table4.A2" office:value-type="string">
            <text:p text:style-name="P52"><text:span text:style-name="T20">ГАПОУ</text:span> «ЧПК»</text:p>
          </table:table-cell>
        </table:table-row>
        <table:table-row>
          <table:table-cell table:style-name="Table4.A1" office:value-type="string">
            <text:p text:style-name="P52">31 октября 2025 г.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2">31 октября 2025 г.</text:p>
          </table:table-cell>
        </table:table-row>
      </table:table>
      <text:p text:style-name="P50"/>
      <text:p text:style-name="P54">2. ПРОЕКТНАЯ ЧАСТЬ</text:p>
      <text:p text:style-name="P36"/>
      <text:p text:style-name="P25">2.1. Проектирование программного продукта</text:p>
      <text:p text:style-name="P55"/>
      <text:p text:style-name="P56">Разрабатываемое приложение предназначено для поддержки процесса обучения программированию в формате онлайн-школы. Продукт обеспечивает просмотр курсов (языков программирования), уроков (тем), теоретических материалов; <text:span text:style-name="T21">в</text:span>ыполнение практических заданий внутри приложения; отправку решений на сервер, запуск кода и проверку по автоматическим тестам; авторизацию пользователя и хранение прогресса. Программный продукт построен по клиент‑серверной архитектуре и состоит из следующих компонентов: <text:span text:style-name="T21">к</text:span>лиентское приложение - десктопное приложение на Qt + QML (Qt Quick Controls) с С++ модулем доступа к API; <text:span text:style-name="T21">с</text:span>ерверная часть (API) - набор PHP‑скриптов, предоставляющих HTTP‑интерфейс для клиента; <text:span text:style-name="T21">б</text:span>аза данных - схема и стартовые данные (курсы, темы, задания, тесты).</text:p>
      <text:p text:style-name="P56">Клиентская часть реализована на Qt с использованием QML‑интерфейсов и навигации через стек страниц. Основные особенности: единое окно приложения с пользовательской панелью заголовка и областью контента; навигация между страницами («Курсы» → «Уроки» → «Теория» → «Задание») через StackView; получение данных (курсы/темы/теория/задания) из API и отображение в виде списков и карточек; встроенный редактор кода и блоки для запуска/проверки решения. Также в приложении предусмотрена роль преподавателя (панель учителя), позволяющая создавать курсы, темы, задания и тесты через API.</text:p>
      <text:p text:style-name="P56">Сервер реализован на PHP и предоставляет отдельные конечные точки для функций приложения: авторизация и управление сессией; получение учебного контента; выполнение и проверка кода; функции преподавателя (создание контента). Выполнение кода организовано через временный каталог на сервере: исходный код сохраняется в файле с соответствующим расширением; для компилируемых языков запускается компиляция с ограничением по времени; запуск выполняется с ограничением по времени, входные данные передаются <text:soft-page-break/>через <text:span text:style-name="T22">стандартный вход</text:span>; вывод программы сравнивается с ожидаемым (для проверки по тестам).</text:p>
      <text:p text:style-name="P57">В приложении предусмотрена поддержка нескольких языков программирования: C++, Python, C#, Go. Выбор языка определяется курсом (языком), к которому относится тема и задание. База данных хранит учебный контент, пользователей и результаты обучения. Основные сущности: users - пользователи (логин, хэш пароля, роль); sessions - сессии авторизации (bearer‑токен с временем жизни); languages - курсы по языкам программирования (название, описание, изображение); themes - темы/уроки, привязанные к языку (lang_id), и теоретический материал; tasks - практические задания, привязанные к теме (theme_id); task_tests - набор тестов для задания (вход/ожидаемый вывод); user_theme_progress, user_task_solved - прогресс прохождения тем и решённых заданий. Такая структура позволяет расширять систему: добавлять новые языки, темы и задания без изменения логики клиента.</text:p>
      <text:p text:style-name="P56">При проектировании интерфейса был сделан акцент на следующих принципах: видимость контента: увеличенные шрифты и размеры элементов управления для более комфортного чтения теории и заданий; последовательная навигация: пользователь всегда понимает, где находится, и может вернуться на шаг назад; разделение теории и практики: теория отображается отдельной страницей, задания - отдельной страницей с редактором; оперативная обратная связь: после запуска кода и проверки по тестам пользователь получает статус выполнения.</text:p>
      <text:p text:style-name="P58"/>
      <text:p text:style-name="P59">2.2. Руководство пользователя</text:p>
      <text:p text:style-name="P6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span text:style-name="T23">Д</text:span>есктопно<text:span text:style-name="T23">е </text:span>приложени<text:span text:style-name="T23">е</text:span> для онлайн-школы по программированию</text:p>
      <text:p text:style-name="P62">Руководство пользователя</text:p>
      <text:p text:style-name="P62">Версия 1.0 </text:p>
      <text:p text:style-name="P62">2026 год</text:p>
      <text:p text:style-name="P63">СОДЕРЖАНИЕ</text:p>
      <text:p text:style-name="P6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5">1. Введение<text:span text:style-name="T6"> .........................................................................................................</text:span></text:p>
          </table:table-cell>
          <table:table-cell table:style-name="Table3.A1" office:value-type="string">
            <text:p text:style-name="P66">2<text:span text:style-name="T24">3</text:span></text:p>
          </table:table-cell>
        </table:table-row>
        <table:table-row>
          <table:table-cell table:style-name="Table3.A1" office:value-type="string">
            <text:p text:style-name="P65">2. Общие сведения о программе <text:span text:style-name="T6">....................................................................</text:span></text:p>
          </table:table-cell>
          <table:table-cell table:style-name="Table3.A1" office:value-type="string">
            <text:p text:style-name="P66">2<text:span text:style-name="T24">4</text:span></text:p>
          </table:table-cell>
        </table:table-row>
        <table:table-row>
          <table:table-cell table:style-name="Table3.A1" office:value-type="string">
            <text:p text:style-name="P65">3. Рекомендуемый первичный порядок действий <text:span text:style-name="T6">.....................................</text:span></text:p>
          </table:table-cell>
          <table:table-cell table:style-name="Table3.B3" office:value-type="float" office:value="26">
            <text:p text:style-name="P67">26</text:p>
          </table:table-cell>
        </table:table-row>
        <table:table-row>
          <table:table-cell table:style-name="Table3.A1" office:value-type="string">
            <text:p text:style-name="P68">3.1. <text:span text:style-name="T25">У</text:span><text:span text:style-name="T26">становка приложения </text:span><text:span text:style-name="T27">.....................................................................</text:span></text:p>
          </table:table-cell>
          <table:table-cell table:style-name="Table3.A1" office:value-type="string">
            <text:p text:style-name="P69">26</text:p>
          </table:table-cell>
        </table:table-row>
        <table:table-row>
          <table:table-cell table:style-name="Table3.A1" office:value-type="string">
            <text:p text:style-name="P65">4. Работа программы <text:span text:style-name="T6">.......................................................................................</text:span></text:p>
          </table:table-cell>
          <table:table-cell table:style-name="Table3.A1" office:value-type="string">
            <text:p text:style-name="P70">27</text:p>
          </table:table-cell>
        </table:table-row>
      </table:table>
      <text:p text:style-name="P71"/>
      <text:p text:style-name="P72">1. ВВЕДЕНИЕ</text:p>
      <text:p text:style-name="P55"/>
      <text:p text:style-name="P73">Цель данного руководства - помочь пользователю быстро освоить программный продукт «Школа программирования»: от первого запуска приложения и регистрации до изучения теоретических материалов, выполнения практических заданий и отслеживания личного прогресса. Продукт представляет собой учебную платформу с клиентским приложением на базе Qt/QML и серверной API-частью, которая обеспечивает хранение данных, авторизацию и работу с курсами, темами, заданиями и тестами. Данное руководство предназначено для студентов, преподавателей и администраторов учебного процесса, использующих систему как в учебной аудитории, так и при самостоятельной подготовке. Платформа позволяет выстроить последовательное обучение: пользователь выбирает курс (язык программирования), затем тему, изучает теорию, после чего переходит к практическому заданию. Такой подход помогает сочетать объяснение материала и немедленную практику, а также делает процесс обучения более наглядным и структурированным.</text:p>
      <text:p text:style-name="P61">В приложении предусмотрены отдельные сценарии работы для двух ролей - «студент» и «преподаватель». Студент получает доступ к каталогу курсов, разделам теории, практическим задачам и странице профиля с прогрессом обучения. Преподаватель, помимо стандартной навигации, может использовать специальную панель для наполнения системы: создавать новые курсы, темы, задания и тесты. Таким образом, продукт одновременно решает две задачи: обучение пользователей и удобное управление образовательным контентом.</text:p>
      <text:p text:style-name="P74">В настоящем руководстве подробно описаны общие сведения о программе, логика интерфейса и пошаговый порядок работы с основными функциями. Структура изложения построена таким образом, чтобы пользователь мог последовательно пройти все ключевые этапы: вход в систему, выбор разделов, выполнение заданий, восстановление пароля при необходимости и выход из учетной записи. Также приведены рекомендации по корректному использованию разделов и контролю результатов обучения.</text:p>
      <text:p text:style-name="P75">2. ОБЩИЕ СВЕДЕНИЯ О ПРОГРАММЕ</text:p>
      <text:p text:style-name="P76"/>
      <text:p text:style-name="P77">Программный продукт «Школа программирования» представляет собой клиент-серверную обучающую систему, ориентированную на изучение программирования по курсам и темам. Архитектура решения включает три основных уровня: серверные HTTP-endpoints, клиентский C++-слой взаимодействия с API и графический интерфейс пользователя на QML. Такое разделение обеспечивает удобство развития проекта: сервер отвечает за бизнес-логику и данные, а клиент - за отображение и взаимодействие с пользователем. Функционально система поддерживает: регистрацию и авторизацию пользователей; разделение прав по ролям «student» и «teacher»; просмотр списка курсов (языков программирования); переход к темам выбранного курса; просмотр теоретических материалов; выполнение практических заданий; просмотр прогресса прохождения; восстановление пароля; создание контента преподавателем (курс, тема, задание, тест).</text:p>
      <text:p text:style-name="P77">Серверная часть предоставляет набор API-методов для операций с пользователями, сессиями, курсами, темами, заданиями и прогрессом. Авторизация реализуется с помощью bearer-токена сессионного типа. При входе пользователя создается сессия, а устаревшие сессии удаляются автоматически. Это позволяет поддерживать контролируемый доступ к защищенным операциям и корректную работу личных данных в профиле. Клиентская часть запускается в окне приложения с пользовательской навигацией и поддерживает сценарий переходов через стек страниц. Основной маршрут пользователя: «Курсы → Темы → Теория → Задание». Если для выполнения целевого действия требуется авторизация, система перенаправляет на страницу входа/регистрации и после успешной аутентификации возвращает пользователя в нужный раздел.</text:p>
      <text:p text:style-name="P77">Для преподавателя доступна отдельная панель с вкладками управления контентом. В ней можно добавлять новые учебные сущности через формы ввода, выбирать существующие курсы и темы из выпадающих списков, а также заполнять текстовые поля теории и условий задач. Это дает возможность использовать систему как конструктор учебных материалов без изменения <text:soft-page-break/>исходного кода. Рекомендуемая среда эксплуатации: рабочее место пользователя с установленным клиентским приложением Qt/QML; стабильное сетевое <text:span text:style-name="T28">интернет-</text:span>соединение. Проект рассчитан на учебное применение, в том числе для сопровождения дисциплин по программированию, организации практических занятий, контроля прохождения тем и постепенного наращивания учебного контента силами преподавателей.</text:p>
      <text:p text:style-name="P78">3. РЕКОМЕНДУЕМЫЙ ПЕРВИЧНЫЙ ПОРЯДОК ДЕЙСТВИЙ</text:p>
      <text:p text:style-name="P79"/>
      <text:p text:style-name="P80">3.1 Установка приложения</text:p>
      <text:p text:style-name="P81"/>
      <text:p text:style-name="P82">Для установки приложения онлайн-школы <text:span text:style-name="T29">по </text:span>программировани<text:span text:style-name="T29">ю </text:span>необходимо перейти на официальный сайт проекта: <text:a xlink:type="simple" xlink:href="https://diploma.bogaledev.ru/" text:style-name="Internet_20_link" text:visited-style-name="Visited_20_Internet_20_Link">https://diploma.bogaledev.r<text:span text:style-name="T29">u</text:span></text:a><text:span text:style-name="T29"> (</text:span>Рисунок 1), выбрать версию для целевой операционной системы (Windows или Linux), загрузить архив и распаковать его в выбранный рабочий каталог.</text:p>
      <text:p text:style-name="P83"><draw:frame draw:style-name="fr1" draw:name="Image9" text:anchor-type="paragraph" svg:width="12cm" svg:height="8.25cm" draw:z-index="8"><draw:image xlink:href="Pictures/10000001000006040000041F50745D69.png" xlink:type="simple" xlink:show="embed" xlink:actuate="onLoad" draw:mime-type="image/png"/></draw:frame>Рисунок 1</text:p>
      <text:p text:style-name="P82">Для операционной системы Windows после распаковки архива приложение готово к запуску. В релизе предварительно выполнено развёртывание необходимых Qt-компонентов (windeployqt), поэтому запуск осуществляется непосредственно через исполняемый файл DiplomaApp.exe.</text:p>
      <text:p text:style-name="P82">Для операционной системы Linux после распаковки архива требуется установить недостающие системные зависимости и дополнительные пакеты Qt с использованием штатного пакетного менеджера дистрибутива. После установки зависимостей приложение запускается через исполняемый файл DiplomaApp.</text:p>
      <text:p text:style-name="P84"><text:span text:style-name="T26">4. </text:span>РАБОТА ПРОГРАММЫ</text:p>
      <text:p text:style-name="P85"/>
      <text:p text:style-name="P86">Пользовательский интерфейс приложения реализован в виде единого окна с последовательной навигацией по учебному сценарию: выбор курса → выбор темы → изучение теории → выполнение задания. В верхней части окна всегда доступна пользовательская кнопка профиля для быстрого перехода в личный кабинет и кнопка закрытия приложения. Сразу после запуска отображается заставка (Рисунок <text:span text:style-name="T29">2</text:span>), затем открывается основная рабочая область.</text:p>
      <text:p text:style-name="P87"><draw:frame draw:style-name="fr2" draw:name="Image1" text:anchor-type="paragraph" svg:width="12cm" svg:height="7.999cm" draw:z-index="0"><draw:image xlink:href="Pictures/10000001000005E3000003F4E19DD676.png" xlink:type="simple" xlink:show="embed" xlink:actuate="onLoad" draw:mime-type="image/png"/></draw:frame>Рисунок <text:span text:style-name="T29">2</text:span></text:p>
      <text:p text:style-name="P86">После завершения заставки пользователь попадает на первую рабочую страницу (Рисунок <text:span text:style-name="T29">3</text:span>) - список курсов (языков программирования). Каждый элемент списка содержит название и описание курса. <text:span text:style-name="T30">В</text:span>ыбор курса выполняется нажатием на карточку элемента. Эта страница является стартовой точкой пользовательского пути.</text:p>
      <text:p text:style-name="P87"><draw:frame draw:style-name="fr3" draw:name="Image2" text:anchor-type="paragraph" svg:width="12cm" svg:height="7.999cm" draw:z-index="1"><draw:image xlink:href="Pictures/10000001000005E3000003F465AC5D0C.png" xlink:type="simple" xlink:show="embed" xlink:actuate="onLoad" draw:mime-type="image/png"/></draw:frame><text:soft-page-break/>Рисунок <text:span text:style-name="T29">3</text:span></text:p>
      <text:p text:style-name="P86">После выбора курса открывается окно со списком тем (Рисунок <text:span text:style-name="T29">4</text:span>). На странице отображаются все темы по выбранному языку программирования; переход к следующему шагу выполняется выбором нужной темы. Для удобства каждая тема сопровождается кратким пояснением.</text:p>
      <text:p text:style-name="P88"/>
      <text:p text:style-name="P89"><draw:frame draw:style-name="fr3" draw:name="Image3" text:anchor-type="paragraph" svg:width="12cm" svg:height="7.999cm" draw:z-index="2"><draw:image xlink:href="Pictures/10000001000005E3000003F421C42F62.png" xlink:type="simple" xlink:show="embed" xlink:actuate="onLoad" draw:mime-type="image/png"/></draw:frame>Рисунок <text:span text:style-name="T29">4</text:span></text:p>
      <text:p text:style-name="P86">После выбора темы открывается <text:span text:style-name="T31">окно с</text:span> теоретическ<text:span text:style-name="T31">им</text:span> материа<text:span text:style-name="T31">лом</text:span> (Рисунок <text:span text:style-name="T29">5</text:span>). В верхней части отображается текст теории, а ниже - кнопки перехода к практическим заданиям темы. Выбор задания выполняется нажатием соответствующей кнопки.</text:p>
      <text:p text:style-name="P90"><draw:frame draw:style-name="fr3" draw:name="Image4" text:anchor-type="paragraph" svg:width="12cm" svg:height="7.999cm" draw:z-index="3"><draw:image xlink:href="Pictures/10000001000005E3000003F416332F05.png" xlink:type="simple" xlink:show="embed" xlink:actuate="onLoad" draw:mime-type="image/png"/></draw:frame><text:soft-page-break/>Рисунок <text:span text:style-name="T29">5</text:span></text:p>
      <text:p text:style-name="P86">Если пользователь пытается открыть задание или личный кабинет без входа в систему, приложение автоматически открывает окно авторизации (Рисунок <text:span text:style-name="T29">6</text:span>). В этом окне доступны стандартные режимы: вход, регистрация и восстановление пароля. После успешной авторизации пользователь возвращается к запрошенному ранее действию.</text:p>
      <text:p text:style-name="P90"><draw:frame draw:style-name="fr3" draw:name="Image5" text:anchor-type="paragraph" svg:width="12cm" svg:height="7.999cm" draw:z-index="4"><draw:image xlink:href="Pictures/10000001000005E3000003F4DE5E6B60.png" xlink:type="simple" xlink:show="embed" xlink:actuate="onLoad" draw:mime-type="image/png"/></draw:frame>Рисунок <text:span text:style-name="T29">6</text:span></text:p>
      <text:p text:style-name="P86">Окно задания (Рисунок <text:span text:style-name="T29">7</text:span>) содержит все основные элементы практической работы: текст условия задания; поле редактора кода; блок публичного примера (вход/выход); поле «Свой тест» для ввода пользовательских данных; кнопки «Запустить» <text:span text:style-name="T31">для</text:span> запуск решения на пользовательском вводе <text:span text:style-name="T31">и </text:span>«Отправить» <text:span text:style-name="T31">для</text:span> проверк<text:span text:style-name="T31">и</text:span> решения на автоматических тестах. Ниже выводится <text:span text:style-name="T31">блок с </text:span><text:soft-page-break/><text:span text:style-name="T31">результатом выполнения</text:span> (успешный запуск, ошибка компиляции/выполнения, число пройденных тестов, принятие решения). Таким образом, пользователь получает оперативную обратную связь после каждого действия.</text:p>
      <text:p text:style-name="P90"><draw:frame draw:style-name="fr3" draw:name="Image6" text:anchor-type="paragraph" svg:width="12cm" svg:height="7.999cm" draw:z-index="5"><draw:image xlink:href="Pictures/10000001000005E3000003F484B186BF.png" xlink:type="simple" xlink:show="embed" xlink:actuate="onLoad" draw:mime-type="image/png"/></draw:frame>Рисунок <text:span text:style-name="T29">7</text:span></text:p>
      <text:p text:style-name="P86">Окно личного кабинета открывается по кнопке профиля после авторизации (Рисунок <text:span text:style-name="T29">8</text:span>). Здесь отображаются: общий прогресс обучения в процентах; прогресс по каждому курсу в виде полосы заполнения; кнопка «Выйти из аккаунта» для завершения сессии. Страница используется для мониторинга результатов обучения и управления текущим входом пользователя.</text:p>
      <text:p text:style-name="P90"><draw:frame draw:style-name="fr3" draw:name="Image7" text:anchor-type="paragraph" svg:width="12cm" svg:height="7.999cm" draw:z-index="6"><draw:image xlink:href="Pictures/10000001000005E3000003F40E1DBFF7.png" xlink:type="simple" xlink:show="embed" xlink:actuate="onLoad" draw:mime-type="image/png"/></draw:frame>Рисунок <text:span text:style-name="T29">8</text:span></text:p>
      <text:p text:style-name="P91">Если аккаунт имеет роль <text:span text:style-name="T32">учителя</text:span>, вместо личного кабинета открывается окно «Панель учителя» (Рисунок <text:span text:style-name="T29">9</text:span>). Вкладки панели предоставляют <text:soft-page-break/>инструменты администрирования учебного контента: «Новый курс» - создание нового курса (языка); «Новая тема» - добавление темы и теоретического материала; «Новое задание» - создание практического задания; «Новый тест» - добавление теста для автоматической проверки; «Выйти» - выход из учётной записи преподавателя. Этот интерфейс обеспечивает полный цикл наполнения системы учебными материалами без перехода во внешние административные инструменты.</text:p>
      <text:p text:style-name="P92"><draw:frame draw:style-name="fr3" draw:name="Image8" text:anchor-type="paragraph" svg:width="12cm" svg:height="7.999cm" draw:z-index="7"><draw:image xlink:href="Pictures/10000001000005E3000003F4C418C31F.png" xlink:type="simple" xlink:show="embed" xlink:actuate="onLoad" draw:mime-type="image/png"/></draw:frame>Рисунок <text:span text:style-name="T29">9</text:span></text:p>
      <text:p text:style-name="P93"/>
      <text:p text:style-name="P93">2.3. Результаты апробации</text:p>
      <text:p text:style-name="P93"/>
      <text:p text:style-name="P91">Апробация разработанного программного приложения проводилась на заключительном этапе выполнения выпускной квалификационной работы и была направлена на проверку его практической применимости, устойчивости работы пользовательских сценариев и качества восприятия целевой аудиторией.</text:p>
      <text:p text:style-name="P91">В рамках внешней профессионально-ориентированной оценки проект был представлен 24 апреля 2026 года на XXII Межрегиональной студенческой научно-практической конференции «Студент. Образование. Общество XXI века: профессиональное становление в эпоху цифровой трансформации и искусственного интеллекта» в тематическом направлении «Цифровая трансформация общества: цифровые проекты, ИИ, Интернет вещей, большие данные, блокчейн». Демонстрация приложения в формате научного доклада <text:soft-page-break/>позволила получить экспертную обратную связь в академической среде и подтвердить актуальность выбранной темы исследования в контексте цифровизации образовательных и общественных процессов.</text:p>
      <text:p text:style-name="P91">Дополнительно была проведена пользовательская апробация с участием преподавателей и студентов: приложение протестировали несколько преподавателей и одногруппников. Проверка включала базовые сценарии взаимодействия с интерфейсом, навигацию по ключевым разделам, выполнение целевых действий пользователя и общую оценку удобства использования. По результатам тестирования существенных затруднений в работе с системой выявлено не было; участники отметили логичность структуры, понятность интерфейса и практическую полезность реализованного функционала.</text:p>
      <text:p text:style-name="P91">Содержательный анализ собранной обратной связи показал, что разработанное приложение корректно решает поставленные прикладные задачи и может быть рекомендовано к дальнейшему использованию и развитию. Положительные отзывы преподавателей и студентов свидетельствуют о соответствии реализованного решения ожиданиям потенциальных пользователей и подтверждают перспективность его дальнейшего внедрения в учебно-практическую деятельность.</text:p>
      <text:p text:style-name="P91">Таким образом, результаты апробации подтверждают работоспособность, востребованность и практическую значимость разработанного приложения. Полученные данные могут служить основанием для последующего расширения функциональных возможностей системы, углубления аналитических модулей и масштабирования опыта применения в смежных образовательных и проектных контекстах.</text:p>
      <text:p text:style-name="P94">ЗАКЛЮЧЕНИЕ</text:p>
      <text:p text:style-name="P95"/>
      <text:p text:style-name="P91">Выпускная квалификационная работа на тему «Разработка десктопного приложения для онлайн-школы по программированию» посвящена решению практико-ориентированной задачи повышения качества обучения в цифровой среде. Актуальность проекта обусловлена тем, что современное онлайн-обучение программированию требует не только доступа к теории, но и непрерывной практики, оперативной проверки решений и удобной учебной инфраструктуры. На этапе постановки задачи была определена ключевая проблема: разрыв между изучением материалов и выполнением программных заданий, а также высокая зависимость эффективности обучения от технической подготовки обучающихся.</text:p>
      <text:p text:style-name="P91">В соответствии с поставленной целью в проекте последовательно решены все запланированные задачи. <text:span text:style-name="T33">А</text:span>нализ предметной области выполнен через изучение специфики онлайн-обучения программированию, образовательных сценариев и потребностей целевых пользователей. В результате сформировано обоснование структуры будущей системы: единое приложение, объединяющее теоретический контент, практические задания и инструменты контроля результатов. <text:span text:style-name="T33">Т</text:span>ехническо<text:span text:style-name="T33">е</text:span> задани<text:span text:style-name="T33">е</text:span> <text:span text:style-name="T33">разработано </text:span>с определением функциональных и нефункциональных требований, ролей пользователей, ограничений и критериев качества. Это позволило сформировать прозрачную основу для проектирования и дальнейшей реализации решения, а также обеспечить проверяемость соответствия итогового продукта заявленным требованиям.</text:p>
      <text:p text:style-name="P91"><text:span text:style-name="T33">П</text:span>рограммно<text:span text:style-name="T33">е</text:span> обеспечени<text:span text:style-name="T33">е создано </text:span>через реализацию клиент-серверной архитектуры приложения. В ходе разработки обеспечено взаимодействие между пользовательским интерфейсом и серверной частью, реализованы механизмы аутентификации, управление учебным контентом, получение и обработка результатов выполнения заданий. Отдельное внимание уделено целостности данных и устойчивости основных пользовательских сценариев, что критически важно для образовательных систем, ориентированных на регулярную учебную работу.</text:p>
      <text:p text:style-name="P91"><text:soft-page-break/><text:span text:style-name="T33">Р</text:span>азработка пользовательского интерфейса выполнена с учётом принципов понятности, логичности и минимизации когнитивной нагрузки. В интерфейсе организована последовательная навигация по разделам «темы», «теория», «задания» и «результаты», что делает учебный процесс структурированным и предсказуемым для обучающегося. Для преподавателя обеспечены инструменты формирования и сопровождения учебных материалов. <text:span text:style-name="T33">Р</text:span>уководств<text:span text:style-name="T33">о</text:span> пользователя <text:span text:style-name="T33">п</text:span>одгото<text:span text:style-name="T33">влено</text:span>. Документация описывает ключевые сценарии работы с системой и снижает порог входа для разных категорий пользователей.</text:p>
      <text:p text:style-name="P91">В ходе проектирования и реализации подтверждена достижимость главного результата: создано работоспособное десктопное приложение для онлайн-школы по программированию, обеспечивающее интеграцию теоретической и практической составляющих обучения. Разработанное решение позволяет обучающемуся проходить материал последовательно, выполнять задания в единой среде, оперативно получать обратную связь и видеть динамику собственного прогресса. Для преподавателя система формирует удобный контур управления контентом и контроля учебной активности.</text:p>
      <text:p text:style-name="P91">Практическая значимость проекта заключается в возможности непосредственного внедрения результата в деятельность онлайн-школ, колледжей и иных образовательных организаций, реализующих подготовку в сфере программирования. Приложение может использоваться как самостоятельный учебный инструмент и как компонент существующей цифровой образовательной среды. В обоих случаях достигается снижение технических барьеров, сокращение времени на организацию учебной работы и повышение дисциплины прохождения материалов за счёт понятного маршрута обучения.</text:p>
      <text:p text:style-name="P91">Результаты апробации показали, что пользователи положительно оценивают удобство интерфейса, структурированность контента и полезность практических модулей. Это подтверждает корректность принятых архитектурных и интерфейсных решений, а также обоснованность выбранной концепции объединения теории и практики в едином приложении. Полученные <text:soft-page-break/>выводы позволяют рассматривать разработку как устойчивую основу для дальнейшего развития.</text:p>
      <text:p text:style-name="P91">Перспективы совершенствования проекта включают расширение набора поддерживаемых языков программирования, внедрение адаптивных траекторий обучения, развитие аналитических инструментов для преподавателя и интеграцию с внешними образовательными сервисами. Дополнительным направлением может стать углубление механизмов автоматизированной проверки кода, включая оценку качества решений по нескольким критериям и персонализированные рекомендации по улучшению.</text:p>
      <text:p text:style-name="P91">Таким образом, цель выпускной квалификационной работы достигнута в полном объёме, а все поставленные задачи последовательно решены. Разработанное десктопное приложение подтвердило работоспособность, методическую обоснованность и прикладную ценность. Итоговый результат имеет практическую применимость в образовательной сфере, способствует повышению качества обучения программированию и может быть масштабирован в рамках дальнейшей цифровой трансформации учебного процесса.</text:p>
      <text:p text:style-name="P94">СПИСОК ИСПОЛЬЗОВАННЫХ ИСТОЧНИКОВ</text:p>
      <text:p text:style-name="P95"/>
      <text:list text:style-name="L1">
        <text:list-item>
          <text:p text:style-name="P96">Российская Федерация. Законы. Об образовании в Российской Федерации : Федеральный закон от 29.12.2012 № 273-ФЗ (ред. от 28.12.2024).</text:p>
        </text:list-item>
        <text:list-item>
          <text:p text:style-name="P96">Российская Федерация. Правительство. Об утверждении Правил применения организациями, осуществляющими образовательную деятельность, электронного обучения, дистанционных образовательных технологий при реализации образовательных программ : Постановление Правительства РФ от 11.10.2023 № 1678.</text:p>
        </text:list-item>
        <text:list-item>
          <text:p text:style-name="P96">Российская Федерация. Правительство. Об утверждении Положения о государственной аккредитации образовательной деятельности : Постановление Правительства РФ от 19.05.2023 № 797.</text:p>
        </text:list-item>
        <text:list-item>
          <text:p text:style-name="P96">Российская Федерация. Министерство просвещения. Об утверждении федерального государственного образовательного стандарта среднего профессионального образования по специальности 09.02.07 Информационные системы и программирование : Приказ Минпросвещения России от 09.12.2016 № 1547 (ред. от 03.07.2024).</text:p>
        </text:list-item>
        <text:list-item>
          <text:p text:style-name="P96">ГОСТ Р 59795-2021. Информационные технологии. Комплекс стандартов на автоматизированные системы. Автоматизированные системы. Стадии создания.</text:p>
        </text:list-item>
        <text:list-item>
          <text:p text:style-name="P96">ГОСТ Р ИСО/МЭК 25010-2022. Системная и программная инженерия. Требования и оценка качества систем и программных продуктов (SQuaRE).</text:p>
        </text:list-item>
        <text:list-item>
          <text:p text:style-name="P96">ГОСТ Р 56939-2024. Защита информации. Разработка безопасного программного обеспечения. Общие требования.</text:p>
        </text:list-item>
        <text:list-item>
          <text:p text:style-name="P96">ГОСТ Р 59547-2021. Защита информации. Безопасность веб-приложений. Общие технические требования.</text:p>
        </text:list-item>
        <text:list-item>
          <text:p text:style-name="P96">Национальный проект «Экономика данных и цифровая трансформация государства» [Электронный ресурс]. URL: http://government.ru/rugovclassifier/923/about/ (дата обращения: <text:span text:style-name="T34">05.02</text:span>.2026).</text:p>
        </text:list-item>
        <text:list-item>
          <text:p text:style-name="P96"><text:soft-page-break/>Федеральный проект «Профессионалитет» [Электронный ресурс]. URL: https://firpo.ru/activities/projects/federalnyy-proekt-professionalitet/ (дата обращения: <text:span text:style-name="T34">15.02</text:span>.2026).</text:p>
        </text:list-item>
        <text:list-item>
          <text:p text:style-name="P97">Эффективные практики учителей по результатам анализа больших данных. 13 июня 2023 // Эльвира Сабирова [Электронный ресурс]. URL: https://instrao.ru/index.php/content-page/159-bank-praktik (дата обращения: <text:span text:style-name="T35">11.01</text:span>.2026).</text:p>
        </text:list-item>
        <text:list-item>
          <text:p text:style-name="P96">Цифровой образовательный контент. Региональный центр цифровой трансформации образования [Электронный ресурс]. URL: https://ct.rcoko65.ru/cifrovoy-obrazovatelnyy-kontent-cok (дата обращения: <text:span text:style-name="T35">19.02</text:span>.2026).</text:p>
        </text:list-item>
        <text:list-item>
          <text:p text:style-name="P96">Вайндорф-Сысоева М. Е., Субочева М. Л. Цифровая дидактика: теория и практика организации обучения : учебное пособие. Москва : Юрайт, 2022. 174 с.</text:p>
        </text:list-item>
        <text:list-item>
          <text:p text:style-name="P96">Блинов В. И., Есенина Е. Ю., Сергеев И. С. Профессиональное образование в условиях цифровой трансформации // Профессиональное образование и рынок труда. 2022. № 2. С. 6–19.</text:p>
        </text:list-item>
        <text:list-item>
          <text:p text:style-name="P96">Днепровская Н. В. Цифровая образовательная среда: риски, возможности, эффекты // Университетское управление: практика и анализ. 2021. Т. 25. № 4. С. 102–118.</text:p>
        </text:list-item>
        <text:list-item>
          <text:p text:style-name="P96">Qt Company. Qt 6 Documentation [Электронный ресурс]. URL: https://doc.qt.io/qt-6/ (дата обращения: 20.05.2026).</text:p>
        </text:list-item>
        <text:list-item>
          <text:p text:style-name="P96">Qt Company. QML and Qt Quick [Электронный ресурс]. URL: https://doc.qt.io/qt-6/qtquick-index.html (дата обращения: 20.05.2026).</text:p>
        </text:list-item>
        <text:list-item>
          <text:p text:style-name="P96">Qt Company. Qt Network [Электронный ресурс]. URL: https://doc.qt.io/qt-6/qtnetwork-index.html (дата обращения: 20.05.2026).</text:p>
        </text:list-item>
        <text:list-item>
          <text:p text:style-name="P96">PHP Documentation Group. PHP Manual [Электронный ресурс]. URL: https://www.php.net/docs.php (дата обращения: 20.05.2026).</text:p>
        </text:list-item>
        <text:list-item>
          <text:p text:style-name="P96">MariaDB Server Documentation [Электронный ресурс]. URL: https://mariadb.com/docs/server/ (дата обращения: 20.05.2026).</text:p>
        </text:list-item>
        <text:list-item>
          <text:p text:style-name="P96"><text:soft-page-break/>OpenAPI Initiative. OpenAPI Specification v3.1.1 [Электронный ресурс]. URL: https://spec.openapis.org/oas/latest.html (дата обращения: 20.05.2026).</text:p>
        </text:list-item>
        <text:list-item>
          <text:p text:style-name="P96">Mozilla Developer Network. HTTP overview [Электронный ресурс]. URL: https://developer.mozilla.org/en-US/docs/Web/HTTP/Overview (дата обращения: 20.05.2026).</text:p>
        </text:list-item>
        <text:list-item>
          <text:p text:style-name="P96">OWASP Foundation. OWASP Top 10:2021 Web Application Security Risks [Электронный ресурс]. URL: https://owasp.org/www-project-top-ten/ (дата обращения: 20.05.2026).</text:p>
        </text:list-item>
        <text:list-item>
          <text:p text:style-name="P96">NIST. Secure Software Development Framework (SSDF) Version 1.1: SP 800-218 [Электронный ресурс]. URL: https://csrc.nist.gov/pubs/sp/800/218/final (дата обращения: 20.05.2026).</text:p>
        </text:list-item>
        <text:list-item>
          <text:p text:style-name="P96">Docker Inc. Docker Docs [Электронный ресурс]. URL: https://docs.docker.com/ (дата обращения: 20.05.2026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line-height="100%" fo:text-indent="1.251cm" style:auto-text-indent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 fo:text-indent="0cm" style:auto-text-indent="false"/>
      <style:text-properties fo:font-weight="bold" style:letter-kerning="false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f53be" style:font-size-asian="14pt" style:font-name-complex="Times New Roman1" style:font-size-complex="14pt">
        <loext:char-complex-color loext:theme-type="dark1" loext:color-type="theme"/>
      </style:text-properties>
    </style:style>
    <style:style style:name="M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8</text:page-number></text:span></text:p>
      </style:footer>
      <style:footer-first>
        <text:h text:style-name="MP2" text:outline-level="2" loext:marker-style-name="MT1">Чита</text:h>
        <text:h text:style-name="MP2" text:outline-level="2" loext:marker-style-name="MT1">2026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14T10:11:00</meta:creation-date>
    <meta:initial-creator>bogale</meta:initial-creator>
    <dc:language>ru-RU</dc:language>
    <dc:date>2026-05-20T21:05:36.027706611</dc:date>
    <meta:editing-cycles>141</meta:editing-cycles>
    <meta:editing-duration>P2DT9H3M6S</meta:editing-duration>
    <meta:generator>LibreOffice/25.8.7.3$Linux_X86_64 LibreOffice_project/580$Build-3</meta:generator>
    <meta:print-date>2026-05-20T19:10:28.339352502</meta:print-date>
    <meta:printed-by>PDF files</meta:printed-by>
    <meta:document-statistic meta:table-count="4" meta:image-count="9" meta:object-count="0" meta:page-count="38" meta:paragraph-count="386" meta:word-count="6113" meta:character-count="54095" meta:non-whitespace-character-count="48362"/>
    <meta:user-defined meta:name="AppVersion">15.0000</meta:user-defined>
    <meta:template xlink:type="simple" xlink:actuate="onRequest" xlink:title="Normal.dotm" xlink:href=""/>
  </office:meta>
</office:document-meta>
</file>