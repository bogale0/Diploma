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7.001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6cm" style:rel-column-width="61278*"/>
    </style:style>
    <style:style style:name="Table2.B" style:family="table-column">
      <style:table-column-properties style:column-width="1.104cm" style:rel-column-width="4257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6cm" style:rel-column-width="61278*"/>
    </style:style>
    <style:style style:name="Table3.B" style:family="table-column">
      <style:table-column-properties style:column-width="1.104cm" style:rel-column-width="4257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end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</style:style>
    <style:style style:name="P10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Contents_20_1">
      <style:paragraph-properties fo:margin-top="0cm" fo:margin-bottom="0cm" style:contextual-spacing="false" fo:line-height="150%"/>
    </style:style>
    <style:style style:name="P12" style:family="paragraph" style:parent-style-name="Table_20_Contents">
      <style:text-properties style:font-name="Times New Roman" fo:font-size="14pt" officeooo:rsid="001015cf" officeooo:paragraph-rsid="001015cf" style:font-size-asian="14pt" style:font-size-complex="14pt"/>
    </style:style>
    <style:style style:name="P13" style:family="paragraph" style:parent-style-name="Contents_20_2">
      <style:paragraph-properties fo:margin-right="0cm" fo:margin-top="0cm" fo:margin-bottom="0cm" style:contextual-spacing="false" fo:line-height="15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015cf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Contents_20_2">
      <style:paragraph-properties fo:margin-left="0cm" fo:margin-top="0cm" fo:margin-bottom="0cm" style:contextual-spacing="false" fo:line-height="150%" fo:text-indent="1.249cm" style:auto-text-indent="false"/>
    </style:style>
    <style:style style:name="P15" style:family="paragraph" style:parent-style-name="Table_20_Contents">
      <style:text-properties style:font-name="Times New Roman" fo:font-size="14pt" officeooo:rsid="00132d4f" officeooo:paragraph-rsid="00132d4f" style:font-size-asian="14pt" style:font-size-complex="14pt"/>
    </style:style>
    <style:style style:name="P16" style:family="paragraph" style:parent-style-name="Table_20_Contents">
      <style:text-properties style:font-name="Times New Roman" fo:font-size="14pt" style:font-size-asian="14pt" style:font-size-complex="14pt"/>
    </style:style>
    <style:style style:name="P17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officeooo:paragraph-rsid="00135c9d"/>
    </style:style>
    <style:style style:name="P22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25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officeooo:paragraph-rsid="001015cf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officeooo:paragraph-rsid="001015cf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</style:style>
    <style:style style:name="P35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6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7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</style:style>
    <style:style style:name="P38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officeooo:paragraph-rsid="00152f05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57" style:family="paragraph" style:parent-style-name="Table_20_Contents">
      <style:text-properties style:font-name="Times New Roman" fo:font-size="14pt" officeooo:rsid="00152f05" officeooo:paragraph-rsid="00152f05" style:font-size-asian="14pt" style:font-size-complex="14pt"/>
    </style:style>
    <style:style style:name="P58" style:family="paragraph" style:parent-style-name="Standard">
      <style:paragraph-properties fo:margin-left="1.251cm" fo:margin-top="0cm" fo:margin-bottom="0cm" style:contextual-spacing="false" fo:line-height="150%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52f05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able_20_Contents">
      <style:text-properties style:font-name="Times New Roman" fo:font-size="14pt" officeooo:rsid="00132d4f" officeooo:paragraph-rsid="00152f05" style:font-size-asian="14pt" style:font-size-complex="14pt"/>
    </style:style>
    <style:style style:name="P60" style:family="paragraph" style:parent-style-name="Contents_20_1">
      <style:paragraph-properties fo:margin-left="1.251cm" fo:margin-top="0cm" fo:margin-bottom="0cm" style:contextual-spacing="false" fo:line-height="150%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52f05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Table_20_Contents">
      <style:text-properties style:font-name="Times New Roman" fo:font-size="14pt" officeooo:paragraph-rsid="00152f05" style:font-size-asian="14pt" style:font-size-complex="14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2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6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letter-kerning="tru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6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7" style:family="text">
      <style:text-properties style:text-position="super 58%" style:font-name="Times New Roman" fo:font-size="12pt" fo:language="ru" fo:country="RU" style:letter-kerning="tru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font-size-complex="14pt"/>
    </style:style>
    <style:style style:name="T12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6" style:family="text">
      <style:text-properties officeooo:rsid="00135c9d"/>
    </style:style>
    <style:style style:name="T17" style:family="text">
      <style:text-properties officeooo:rsid="0009e7a5"/>
    </style:style>
    <style:style style:name="T18" style:family="text">
      <style:text-properties officeooo:rsid="000d01d4"/>
    </style:style>
    <style:style style:name="T19" style:family="text">
      <style:text-properties officeooo:rsid="000ee979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Государственное автономное профессиональное</text:h>
      <text:h text:style-name="P1" text:outline-level="2" loext:marker-style-name="T1">образовательное учреждение</text:h>
      <text:h text:style-name="P1" text:outline-level="2" loext:marker-style-name="T1">«Читинский педагогический колледж»</text:h>
      <text:h text:style-name="P2" text:outline-level="2" loext:marker-style-name="T2"/>
      <text:h text:style-name="P3" text:outline-level="2" loext:marker-style-name="T3"><text:span text:style-name="T3">Кафедра информационных технологий и программирования</text:span><text:span text:style-name="T3"/></text:h>
      <text:h text:style-name="P2" text:outline-level="2" loext:marker-style-name="T2"/>
      <text:h text:style-name="P4" text:outline-level="2">Специальность 09.02.07 Информационные системы и программирование</text:h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3" text:outline-level="2" loext:marker-style-name="T1"><text:span text:style-name="T1">ВЫПУСКНАЯ КВАЛИФИКАЦИОННАЯ РАБОТА</text:span><text:span text:style-name="T1"/></text:h>
      <text:h text:style-name="P3" text:outline-level="2" loext:marker-style-name="T1"><text:span text:style-name="T1">Дипломный проект</text:span><text:span text:style-name="T1"/></text:h>
      <text:h text:style-name="P2" text:outline-level="2" loext:marker-style-name="T2"/>
      <text:h text:style-name="P3" text:outline-level="2" loext:marker-style-name="T1"><text:span text:style-name="T1">Разработка десктопного приложения для онлайн-школы по программированию</text:span><text:span text:style-name="T1"/></text:h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1" office:value-type="string">
            <text:h text:style-name="P6" text:outline-level="2" loext:marker-style-name="T4"><text:span text:style-name="T5">Выполнил: <text:s text:c="4"/>Богодухов А.Г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Студент 401 группы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Руководитель <text:s text:c="9"/>Трушина Е.Г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7" text:outline-level="2" loext:marker-style-name="T6"><text:span text:style-name="T7">подпись</text:span><text:span text:style-name="T7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« <text:s text:c="9"/>» <text:s text:c="39"/>20 <text:s text:c="6"/>г.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Допущен к защите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Зав. кафедрой <text:s text:c="4"/>Медведкова Ю.К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7" text:outline-level="2" loext:marker-style-name="T6"><text:span text:style-name="T7">подпись</text:span><text:span text:style-name="T7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« <text:s text:c="9"/>» <text:s text:c="39"/>20 <text:s text:c="6"/>г.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Оценка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« <text:s text:c="9"/>» <text:s text:c="39"/>20 <text:s text:c="6"/>г.</text:span><text:span text:style-name="T5"/></text:h>
          </table:table-cell>
        </table:table-row>
      </table:table>
      <text:p text:style-name="P8" loext:marker-style-name="T2"/>
      <text:p text:style-name="P9" loext:marker-style-name="T8"><text:span text:style-name="T8">СОДЕРЖАНИЕ</text:span><text:span text:style-name="T8"/></text:p>
      <text:p text:style-name="P10" loext:marker-style-name="T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 loext:marker-style-name="T10"><text:span text:style-name="T9">1. Пояснительная записка</text:span></text:p>
          </table:table-cell>
          <table:table-cell table:style-name="Table2.A1" office:value-type="string">
            <text:p text:style-name="P12">3</text:p>
          </table:table-cell>
        </table:table-row>
        <table:table-row>
          <table:table-cell table:style-name="Table2.A1" office:value-type="string">
            <text:p text:style-name="P13">1.1. Квалификационные характеристики проекта</text:p>
          </table:table-cell>
          <table:table-cell table:style-name="Table2.A1" office:value-type="string">
            <text:p text:style-name="P12">3</text:p>
          </table:table-cell>
        </table:table-row>
        <table:table-row>
          <table:table-cell table:style-name="Table2.A1" office:value-type="string">
            <text:p text:style-name="P14" loext:marker-style-name="T11"><text:span text:style-name="T10">1.2. Описание предметной области</text:span></text:p>
          </table:table-cell>
          <table:table-cell table:style-name="Table2.B3" office:value-type="float" office:value="5">
            <text:p text:style-name="P12">5</text:p>
          </table:table-cell>
        </table:table-row>
        <table:table-row>
          <table:table-cell table:style-name="Table2.A1" office:value-type="string">
            <text:p text:style-name="P14" loext:marker-style-name="T11"><text:span text:style-name="T10">1.</text:span><text:span text:style-name="T11">3</text:span><text:span text:style-name="T10">. Техническое задание</text:span></text:p>
          </table:table-cell>
          <table:table-cell table:style-name="Table2.A1" office:value-type="string">
            <text:p text:style-name="P15">12</text:p>
          </table:table-cell>
        </table:table-row>
        <table:table-row>
          <table:table-cell table:style-name="Table2.A1" office:value-type="string">
            <text:p text:style-name="P11" loext:marker-style-name="T11"><text:span text:style-name="T9">2. Проектная часть</text:span></text:p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4" loext:marker-style-name="T10"><text:span text:style-name="T10">2.1. Проектирование программного продукта</text:span></text:p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4" loext:marker-style-name="T10"><text:span text:style-name="T10">2.2. Руководство пользователя</text:span></text:p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4" loext:marker-style-name="T10"><text:span text:style-name="T10">2.3. Результаты апробации</text:span></text:p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1" loext:marker-style-name="T10"><text:span text:style-name="T9">Заключение</text:span></text:p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1" loext:marker-style-name="T10"><text:span text:style-name="T9">Список использованных источников</text:span></text:p>
          </table:table-cell>
          <table:table-cell table:style-name="Table2.A1" office:value-type="string">
            <text:p text:style-name="P16"/>
          </table:table-cell>
        </table:table-row>
      </table:table>
      <text:p text:style-name="P8" loext:marker-style-name="T2"/>
      <text:p text:style-name="P17" loext:marker-style-name="T1"><text:span text:style-name="T1">1. ПОЯСНИТЕЛЬНАЯ ЗАПИСКА</text:span><text:span text:style-name="T1"/></text:p>
      <text:p text:style-name="P18" loext:marker-style-name="T1"/>
      <text:p text:style-name="P19" loext:marker-style-name="T1"><text:span text:style-name="T1">1.1. Квалификационные характеристики проекта</text:span><text:span text:style-name="T1"/></text:p>
      <text:p text:style-name="P18" loext:marker-style-name="T1"/>
      <text:p text:style-name="P20" loext:marker-style-name="T12"><text:span text:style-name="T12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— ключевую роль играет регулярная практическая работа с кодом и получение оперативной обратной связи по результатам выполнения заданий.</text:span></text:p>
      <text:p text:style-name="P21" loext:marker-style-name="T12"><text:span text:style-name="T12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span></text:p>
      <text:p text:style-name="P21" loext:marker-style-name="T12"><text:span text:style-name="T12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качества формирования практических навыков программирования у обучающихся.</text:span></text:p>
      <text:p text:style-name="P20" loext:marker-style-name="T2"><text:soft-page-break/><text:span text:style-name="T1">Объектом</text:span><text:span text:style-name="T2"> дипломного проекта является процесс разработки приложения.</text:span></text:p>
      <text:p text:style-name="P20" loext:marker-style-name="T2"><text:span text:style-name="T1">Предметом</text:span><text:span text:style-name="T2"> дипломного проекта является создание десктопного приложения с клиент-серверной архитектурой с помощью </text:span><text:span text:style-name="T13">Qt</text:span><text:span text:style-name="T2"> на языке </text:span><text:span text:style-name="T13">C</text:span><text:span text:style-name="T2">++.</text:span></text:p>
      <text:p text:style-name="P20" loext:marker-style-name="T2"><text:span text:style-name="T1">Целью</text:span><text:span text:style-name="T2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0" loext:marker-style-name="T2"><text:span text:style-name="T2">В соответствии с поставленной целью в работе необходимо решить следующие </text:span><text:span text:style-name="T1">задачи</text:span><text:span text:style-name="T2">:</text:span></text:p>
      <text:list xml:id="list332553697" text:style-name="WWNum7">
        <text:list-item text:start-value="1">
          <text:p text:style-name="P22" loext:marker-style-name="T2"><text:span text:style-name="T2">Изучить и проанализировать предметную область.</text:span><text:span text:style-name="T2"/></text:p>
        </text:list-item>
        <text:list-item text:style-override="WWNum3">
          <text:p text:style-name="P23" loext:marker-style-name="T2"><text:span text:style-name="T2">Разработать техническое задание.</text:span><text:span text:style-name="T2"/></text:p>
        </text:list-item>
        <text:list-item text:style-override="WWNum3">
          <text:p text:style-name="P23" loext:marker-style-name="T2"><text:span text:style-name="T2">Создать программное обеспечение.</text:span><text:span text:style-name="T2"/></text:p>
        </text:list-item>
        <text:list-item text:style-override="WWNum3">
          <text:p text:style-name="P23" loext:marker-style-name="T2"><text:span text:style-name="T2">Разработать пользовательский интерфейс приложения.</text:span><text:span text:style-name="T2"/></text:p>
        </text:list-item>
        <text:list-item text:style-override="WWNum3">
          <text:p text:style-name="P23" loext:marker-style-name="T2"><text:span text:style-name="T2">Подготовить руководство пользователя.</text:span><text:span text:style-name="T2"/></text:p>
        </text:list-item>
      </text:list>
      <text:p text:style-name="P20" loext:marker-style-name="T12"><text:span text:style-name="T8">Тип проекта</text:span><text:span text:style-name="T12">: практико-ориентированный.</text:span></text:p>
      <text:p text:style-name="P20" loext:marker-style-name="T12"><text:span text:style-name="T8">Этапы работы над проектом</text:span><text:span text:style-name="T12">:</text:span></text:p>
      <text:list text:style-name="WWNum2">
        <text:list-item>
          <text:p text:style-name="P24" loext:marker-style-name="T12"><text:span text:style-name="T12">Аналитический этап: исследование предметной области, анализ требований</text:span><text:span text:style-name="T12"/></text:p>
        </text:list-item>
        <text:list-item>
          <text:p text:style-name="P24" loext:marker-style-name="T12"><text:span text:style-name="T12">Проектирование: разработка архитектуры, проектирование интерфейсов</text:span><text:span text:style-name="T12"/></text:p>
        </text:list-item>
        <text:list-item>
          <text:p text:style-name="P24" loext:marker-style-name="T12"><text:span text:style-name="T12">Реализация: программирование клиентской и серверной частей</text:span><text:span text:style-name="T12"/></text:p>
        </text:list-item>
        <text:list-item>
          <text:p text:style-name="P24" loext:marker-style-name="T12"><text:span text:style-name="T12">Интеграция: объединение компонентов</text:span><text:span text:style-name="T12"/></text:p>
        </text:list-item>
        <text:list-item>
          <text:p text:style-name="P24" loext:marker-style-name="T12"><text:span text:style-name="T12">Тестирование: функциональное и интеграционное тестирование</text:span><text:span text:style-name="T12"/></text:p>
        </text:list-item>
        <text:list-item>
          <text:p text:style-name="P24" loext:marker-style-name="T12"><text:span text:style-name="T12">Документирование: написание технической документации</text:span><text:span text:style-name="T12"/></text:p>
        </text:list-item>
      </text:list>
      <text:p text:style-name="P20" loext:marker-style-name="T2"><text:span text:style-name="T1">Прикладная ценность проекта</text:span><text:span text:style-name="T2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</text:span><text:soft-page-break/><text:span text:style-name="T2">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0" loext:marker-style-name="T2"><text:span text:style-name="T1">Критерии эффективности проекта</text:span><text:span text:style-name="T2">:</text:span></text:p>
      <text:list xml:id="list3942977670" text:style-name="WWNum8">
        <text:list-item text:start-value="1">
          <text:p text:style-name="P25" loext:marker-style-name="T2"><text:span text:style-name="T2">Корректность выполнения программных заданий и точность проверки результатов работы пользователей.</text:span><text:span text:style-name="T2"/></text:p>
        </text:list-item>
        <text:list-item text:style-override="WWNum4">
          <text:p text:style-name="P26" loext:marker-style-name="T2"><text:span text:style-name="T2">Понятность и простота использования приложения.</text:span><text:span text:style-name="T2"/></text:p>
        </text:list-item>
        <text:list-item text:style-override="WWNum4">
          <text:p text:style-name="P26" loext:marker-style-name="T2"><text:span text:style-name="T2">Стабильность работы системы при взаимодействии пользователей с учебными материалами и заданиями.</text:span><text:span text:style-name="T2"/></text:p>
        </text:list-item>
      </text:list>
      <text:p text:style-name="P20" loext:marker-style-name="T2"><text:span text:style-name="T2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span></text:p>
      <text:p text:style-name="P27" loext:marker-style-name="T1"/>
      <text:p text:style-name="P19" loext:marker-style-name="T2"><text:span text:style-name="T1">1.2. Описание предметной области</text:span><text:span text:style-name="T1"/></text:p>
      <text:p text:style-name="P28" loext:marker-style-name="T2"/>
      <text:p text:style-name="P20" loext:marker-style-name="T2"><text:span text:style-name="T2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быстрого развития информационных технологий и роста потребности в ИТ-специалистах.</text:span><text:span text:style-name="T2"/></text:p>
      <text:p text:style-name="P20" loext:marker-style-name="T2"><text:span text:style-name="T2">Особенностью онлайн-обучения является высокая степень самостоятельности обучающихся. Пользователь самостоятельно планирует темп </text:span><text:soft-page-break/><text:span text:style-name="T2">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text:span text:style-name="T2"/></text:p>
      <text:p text:style-name="P20" loext:marker-style-name="T2"><text:span text:style-name="T2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span><text:span text:style-name="T2"/></text:p>
      <text:p text:style-name="P20" loext:marker-style-name="T2"><text:span text:style-name="T2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span><text:span text:style-name="T2"/></text:p>
      <text:p text:style-name="P20" loext:marker-style-name="T2"><text:span text:style-name="T2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</text:span><text:soft-page-break/><text:span text:style-name="T2">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text:span text:style-name="T2"/></text:p>
      <text:p text:style-name="P20" loext:marker-style-name="T2"><text:span text:style-name="T2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span><text:span text:style-name="T2"/></text:p>
      <text:p text:style-name="P20" loext:marker-style-name="T2"><text:span text:style-name="T2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span></text:p>
      <text:p text:style-name="P20" loext:marker-style-name="T2"><text:span text:style-name="T2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</text:span><text:soft-page-break/><text:span text:style-name="T2">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/text:p>
      <text:p text:style-name="P20" loext:marker-style-name="T2"><text:span text:style-name="T2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span></text:p>
      <text:p text:style-name="P20" loext:marker-style-name="T2"><text:span text:style-name="T2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.</text:span></text:p>
      <text:p text:style-name="P20" loext:marker-style-name="T2"><text:span text:style-name="T2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</text:span><text:soft-page-break/><text:span text:style-name="T2">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text:span text:style-name="T2"/></text:p>
      <text:p text:style-name="P20" loext:marker-style-name="T2"><text:span text:style-name="T2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span></text:p>
      <text:p text:style-name="P20" loext:marker-style-name="T2"><text:span text:style-name="T2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 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span></text:p>
      <text:p text:style-name="P20" loext:marker-style-name="T2"><text:soft-page-break/><text:span text:style-name="T2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/text:p>
      <text:p text:style-name="P20" loext:marker-style-name="T2"><text:span text:style-name="T2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.</text:span></text:p>
      <text:p text:style-name="P20" loext:marker-style-name="T2"><text:span text:style-name="T2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span><text:span text:style-name="T2"/></text:p>
      <text:p text:style-name="P20" loext:marker-style-name="T2"><text:soft-page-break/><text:span text:style-name="T2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text:span text:style-name="T2"/></text:p>
      <text:p text:style-name="P20" loext:marker-style-name="T2"><text:span text:style-name="T2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span><text:span text:style-name="T2"/></text:p>
      <text:p text:style-name="P29" loext:marker-style-name="T2"><text:span text:style-name="T14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2">архитектуре системы, которые будут рассмотрены в последующих главах работы.</text:span></text:p>
      <text:p text:style-name="P30" loext:marker-style-name="T2"><text:span text:style-name="T1">1.3. Техническое задание</text:span></text:p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2" loext:marker-style-name="T15"><text:span text:style-name="T15">Техническое задание на разработку программы</text:span><text:span text:style-name="T15"/></text:p>
      <text:p text:style-name="P32" loext:marker-style-name="T15"><text:span text:style-name="T15">«Десктопное приложение для онлайн-школы по программированию»</text:span><text:span text:style-name="T15"/></text:p>
      <text:p text:style-name="P33" loext:marker-style-name="T15"/>
      <text:p text:style-name="P34" loext:marker-style-name="T15"><text:span text:style-name="T15">Содержание</text:span><text:span text:style-name="T15"/></text:p>
      <text:list xml:id="list2289298186" text:style-name="WWNum9">
        <text:list-item text:start-value="1">
          <text:p text:style-name="P35" loext:marker-style-name="T4"><text:span text:style-name="T4">Введение</text:span><text:span text:style-name="T4"/></text:p>
          <text:list text:style-name="WWNum1">
            <text:list-item>
              <text:p text:style-name="P36" loext:marker-style-name="T4"><text:span text:style-name="T4">Основание для разработки</text:span><text:span text:style-name="T4"/></text:p>
            </text:list-item>
            <text:list-item>
              <text:p text:style-name="P36" loext:marker-style-name="T4"><text:span text:style-name="T4">Назначение и область применения</text:span><text:span text:style-name="T4"/></text:p>
            </text:list-item>
          </text:list>
        </text:list-item>
        <text:list-item text:style-override="WWNum1">
          <text:p text:style-name="P36" loext:marker-style-name="T4"><text:span text:style-name="T4">Требования к программе</text:span><text:span text:style-name="T4"/></text:p>
          <text:list text:style-name="WWNum1">
            <text:list-item>
              <text:p text:style-name="P36" loext:marker-style-name="T4"><text:span text:style-name="T4">Требования к функциональным характеристикам</text:span><text:span text:style-name="T4"/></text:p>
            </text:list-item>
            <text:list-item>
              <text:p text:style-name="P36" loext:marker-style-name="T4"><text:span text:style-name="T4">Требования к надёжности</text:span><text:span text:style-name="T4"/></text:p>
              <text:list>
                <text:list-item>
                  <text:p text:style-name="P36" loext:marker-style-name="T4"><text:span text:style-name="T4">Требования к обеспечению надёжного функционирования программы</text:span><text:span text:style-name="T4"/></text:p>
                </text:list-item>
                <text:list-item>
                  <text:p text:style-name="P36" loext:marker-style-name="T4"><text:span text:style-name="T4">Время восстановления после отказа</text:span><text:span text:style-name="T4"/></text:p>
                </text:list-item>
                <text:list-item>
                  <text:p text:style-name="P36" loext:marker-style-name="T4"><text:span text:style-name="T4">Отказы из-за некорректных действий пользовательской системы</text:span><text:span text:style-name="T4"/></text:p>
                </text:list-item>
              </text:list>
            </text:list-item>
          </text:list>
        </text:list-item>
        <text:list-item text:style-override="WWNum1">
          <text:p text:style-name="P36" loext:marker-style-name="T4"><text:span text:style-name="T4">Условия эксплуатации</text:span><text:span text:style-name="T4"/></text:p>
          <text:list text:style-name="WWNum1">
            <text:list-item>
              <text:p text:style-name="P36" loext:marker-style-name="T4"><text:span text:style-name="T4">Климатические условия эксплуатации</text:span><text:span text:style-name="T4"/></text:p>
            </text:list-item>
            <text:list-item>
              <text:p text:style-name="P36" loext:marker-style-name="T4"><text:span text:style-name="T4">Требования к квалификации и численности персонала</text:span><text:span text:style-name="T4"/></text:p>
            </text:list-item>
            <text:list-item>
              <text:p text:style-name="P36" loext:marker-style-name="T4"><text:span text:style-name="T4">Требования к составу и параметрам технических средств</text:span><text:span text:style-name="T4"/></text:p>
            </text:list-item>
            <text:list-item>
              <text:p text:style-name="P36" loext:marker-style-name="T4"><text:span text:style-name="T4">Требования к информационной и программной совместимости</text:span><text:span text:style-name="T4"/></text:p>
              <text:list>
                <text:list-item>
                  <text:p text:style-name="P36" loext:marker-style-name="T4"><text:span text:style-name="T4">Требования к информационным структурам и методам решения</text:span><text:span text:style-name="T4"/></text:p>
                </text:list-item>
                <text:list-item>
                  <text:p text:style-name="P36" loext:marker-style-name="T4"><text:span text:style-name="T4">Требования к исходным кодам и языкам программирования</text:span><text:span text:style-name="T4"/></text:p>
                </text:list-item>
                <text:list-item>
                  <text:p text:style-name="P36" loext:marker-style-name="T4"><text:span text:style-name="T4">Требования к программным средствам, используемым программой</text:span><text:span text:style-name="T4"/></text:p>
                </text:list-item>
                <text:list-item>
                  <text:p text:style-name="P36" loext:marker-style-name="T4"><text:span text:style-name="T4">Требования к защите информации и программ</text:span><text:span text:style-name="T4"/></text:p>
                </text:list-item>
              </text:list>
            </text:list-item>
            <text:list-item>
              <text:p text:style-name="P36" loext:marker-style-name="T4"><text:span text:style-name="T4">Специальные требования</text:span><text:span text:style-name="T4"/></text:p>
            </text:list-item>
          </text:list>
        </text:list-item>
        <text:list-item text:style-override="WWNum1">
          <text:p text:style-name="P36" loext:marker-style-name="T4"><text:span text:style-name="T4">Требования к программной документации</text:span><text:span text:style-name="T4"/></text:p>
          <text:list text:style-name="WWNum1">
            <text:list-item>
              <text:p text:style-name="P36" loext:marker-style-name="T4"><text:span text:style-name="T4">Состав программной документации</text:span><text:span text:style-name="T4"/></text:p>
            </text:list-item>
          </text:list>
        </text:list-item>
        <text:list-item text:style-override="WWNum1">
          <text:p text:style-name="P36" loext:marker-style-name="T4"><text:span text:style-name="T4">Технико-экономическое обоснование</text:span><text:span text:style-name="T4"/></text:p>
        </text:list-item>
        <text:list-item text:style-override="WWNum1">
          <text:p text:style-name="P36" loext:marker-style-name="T4"><text:span text:style-name="T4">Стадии и этапы разработки</text:span><text:span text:style-name="T4"/></text:p>
          <text:list text:style-name="WWNum1">
            <text:list-item>
              <text:p text:style-name="P36" loext:marker-style-name="T4"><text:span text:style-name="T4">Стадии разработки</text:span><text:span text:style-name="T4"/></text:p>
            </text:list-item>
            <text:list-item>
              <text:p text:style-name="P36" loext:marker-style-name="T4"><text:span text:style-name="T4">Этапы разработки</text:span><text:span text:style-name="T4"/></text:p>
            </text:list-item>
            <text:list-item>
              <text:p text:style-name="P36" loext:marker-style-name="T4"><text:span text:style-name="T4">Содержание работ по этапам</text:span><text:span text:style-name="T4"/></text:p>
            </text:list-item>
          </text:list>
        </text:list-item>
        <text:list-item text:style-override="WWNum1">
          <text:p text:style-name="P36" loext:marker-style-name="T4"><text:span text:style-name="T4">Порядок контроля и приемки</text:span><text:span text:style-name="T4"/></text:p>
          <text:list text:style-name="WWNum1">
            <text:list-item>
              <text:p text:style-name="P36" loext:marker-style-name="T4"><text:span text:style-name="T4">Предварительный контроль</text:span><text:span text:style-name="T4"/></text:p>
            </text:list-item>
            <text:list-item>
              <text:p text:style-name="P36" loext:marker-style-name="T4"><text:span text:style-name="T4">Тестирование</text:span><text:span text:style-name="T4"/></text:p>
            </text:list-item>
            <text:list-item>
              <text:p text:style-name="P36" loext:marker-style-name="T4"><text:span text:style-name="T4">Приёмка</text:span><text:span text:style-name="T4"/></text:p>
            </text:list-item>
          </text:list>
        </text:list-item>
      </text:list>
      <text:list xml:id="list2875289521" text:style-name="WWNum10">
        <text:list-item text:start-value="1">
          <text:p text:style-name="P37" loext:marker-style-name="T15"><text:span text:style-name="T15">Введение</text:span><text:span text:style-name="T15"/></text:p>
          <text:list text:style-name="WWNum5">
            <text:list-item>
              <text:p text:style-name="P38" loext:marker-style-name="T15"><text:span text:style-name="T15">Основание для разработки</text:span><text:span text:style-name="T15"/></text:p>
              <text:list>
                <text:list-item>
                  <text:p text:style-name="P38" loext:marker-style-name="T4"><text:span text:style-name="T4">Наименование работы: «Десктопное приложение для онлайн-школы по программированию».</text:span><text:span text:style-name="T4"/></text:p>
                </text:list-item>
                <text:list-item>
                  <text:p text:style-name="P38" loext:marker-style-name="T4"><text:span text:style-name="T4">Основанием для разработки является задание на выпускную квалификационную работу.</text:span><text:span text:style-name="T4"/></text:p>
                </text:list-item>
                <text:list-item>
                  <text:p text:style-name="P38" loext:marker-style-name="T4"><text:span text:style-name="T4">Организация, утвердившая договор: Читинский Педагогический колледж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Назначение и область применения</text:span><text:span text:style-name="T15"/></text:p>
              <text:list>
                <text:list-item>
                  <text:p text:style-name="P38" loext:marker-style-name="T4"><text:span text:style-name="T4">Назначение разработки заключается в создании инструмента для обучения программированию, который объединяет теоретический материал и практические задания в одном приложении с безопасным выполнением кода пользователей.</text:span><text:span text:style-name="T4"/></text:p>
                </text:list-item>
                <text:list-item>
                  <text:p text:style-name="P38" loext:marker-style-name="T4"><text:span text:style-name="T4">Основные функциональные задачи приложения включают:</text:span><text:span text:style-name="T4"/></text:p>
                  <text:list>
                    <text:list-item>
                      <text:p text:style-name="P38" loext:marker-style-name="T4"><text:span text:style-name="T4">Просмотр теоретических материалов по темам программирования;</text:span><text:span text:style-name="T4"/></text:p>
                    </text:list-item>
                    <text:list-item>
                      <text:p text:style-name="P38" loext:marker-style-name="T4"><text:span text:style-name="T4">Выбор и выполнение практических заданий;</text:span><text:span text:style-name="T4"/></text:p>
                    </text:list-item>
                    <text:list-item>
                      <text:p text:style-name="P38" loext:marker-style-name="T4"><text:span text:style-name="T4">Редактирование и отправка кода на сервер для проверки;</text:span><text:span text:style-name="T4"/></text:p>
                    </text:list-item>
                    <text:list-item>
                      <text:p text:style-name="P38" loext:marker-style-name="T4"><text:span text:style-name="T4">Получение результатов выполнения и обратной связи;</text:span><text:span text:style-name="T4"/></text:p>
                    </text:list-item>
                    <text:list-item>
                      <text:p text:style-name="P38" loext:marker-style-name="T4"><text:span text:style-name="T4">Навигация по курсу обучения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9" loext:marker-style-name="T4"/>
      <text:list text:continue-list="list2875289521" text:style-name="WWNum5">
        <text:list-item>
          <text:p text:style-name="P38" loext:marker-style-name="T15"><text:span text:style-name="T15">Требования к программе</text:span><text:span text:style-name="T15"/></text:p>
          <text:list>
            <text:list-item>
              <text:p text:style-name="P38" loext:marker-style-name="T15"><text:span text:style-name="T15">Требования к функциональным характеристикам</text:span><text:span text:style-name="T15"/></text:p>
              <text:list>
                <text:list-item>
                  <text:p text:style-name="P38" loext:marker-style-name="T4"><text:span text:style-name="T4">Работа с курсами и темами:</text:span><text:span text:style-name="T4"/></text:p>
                  <text:list>
                    <text:list-item>
                      <text:p text:style-name="P38" loext:marker-style-name="T4"><text:span text:style-name="T4">Возможность загрузки списка тем и заданий с сервера;</text:span><text:span text:style-name="T4"/></text:p>
                    </text:list-item>
                    <text:list-item>
                      <text:p text:style-name="P38" loext:marker-style-name="T4"><text:span text:style-name="T4">Постраничное отображение теоретического материала;</text:span><text:span text:style-name="T4"/></text:p>
                    </text:list-item>
                    <text:list-item>
                      <text:p text:style-name="P38" loext:marker-style-name="T4"><text:span text:style-name="T4">Отслеживание прогресса пользователя по темам и заданиям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Редактор кода:</text:span><text:span text:style-name="T4"/></text:p>
                  <text:list>
                    <text:list-item>
                      <text:p text:style-name="P38" loext:marker-style-name="T4"><text:span text:style-name="T4">Встроенный редактор с подсветкой синтаксиса;</text:span><text:span text:style-name="T4"/></text:p>
                    </text:list-item>
                    <text:list-item>
                      <text:p text:style-name="P38" loext:marker-style-name="T4"><text:span text:style-name="T4">Возможность редактирования, сохранения и отправки кода на сервер;</text:span></text:p>
                    </text:list-item>
                    <text:list-item>
                      <text:p text:style-name="P38" loext:marker-style-name="T4"><text:span text:style-name="T4">Поддержка нескольких языков программирования (в будущем)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Система проверки решений:</text:span><text:span text:style-name="T4"/></text:p>
                  <text:list>
                    <text:list-item>
                      <text:p text:style-name="P38" loext:marker-style-name="T4"><text:span text:style-name="T4">Выполнение пользовательского кода на сервере в изолированной среде Docker;</text:span><text:span text:style-name="T4"/></text:p>
                    </text:list-item>
                    <text:list-item>
                      <text:p text:style-name="P38" loext:marker-style-name="T4"><text:span text:style-name="T4">Контроль ресурсов: память, CPU, время выполнения;</text:span><text:span text:style-name="T4"/></text:p>
                    </text:list-item>
                    <text:list-item>
                      <text:p text:style-name="P38" loext:marker-style-name="T4"><text:span text:style-name="T4">Сравнение результатов с эталонными значениями;</text:span><text:span text:style-name="T4"/></text:p>
                    </text:list-item>
                    <text:list-item>
                      <text:p text:style-name="P38" loext:marker-style-name="T4"><text:span text:style-name="T4">Формирование обратной связи для пользователя.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38" loext:marker-style-name="T15"><text:span text:style-name="T15">Требования к надёжности</text:span><text:span text:style-name="T15"/></text:p>
              <text:list>
                <text:list-item>
                  <text:p text:style-name="P38" loext:marker-style-name="T4"><text:span text:style-name="T4">Требования к обеспечению надежного функционирования программы:</text:span><text:span text:style-name="T4"/></text:p>
                  <text:list>
                    <text:list-item>
                      <text:p text:style-name="P38" loext:marker-style-name="T4"><text:span text:style-name="T4">Программа должна продолжать функционировать при сбоях оборудования или сетевого соединения;</text:span><text:span text:style-name="T4"/></text:p>
                    </text:list-item>
                    <text:list-item>
                      <text:p text:style-name="P38" loext:marker-style-name="T4"><text:span text:style-name="T4">Обеспечение сохранности и конфиденциальности данных через аутентификацию и шифрование;</text:span><text:span text:style-name="T4"/></text:p>
                    </text:list-item>
                    <text:list-item>
                      <text:p text:style-name="P38" loext:marker-style-name="T4"><text:span text:style-name="T4">Интуитивно понятный и удобный интерфейс для пользователя без специальных навыков;</text:span><text:span text:style-name="T4"/></text:p>
                    </text:list-item>
                    <text:list-item>
                      <text:p text:style-name="P38" loext:marker-style-name="T4"><text:span text:style-name="T4">Простота сопровождения и расширяемость системы;</text:span><text:span text:style-name="T4"/></text:p>
                    </text:list-item>
                    <text:list-item>
                      <text:p text:style-name="P38" loext:marker-style-name="T4"><text:span text:style-name="T4">Корректное и стабильное выполнение всех функций;</text:span><text:span text:style-name="T4"/></text:p>
                    </text:list-item>
                    <text:list-item>
                      <text:p text:style-name="P38" loext:marker-style-name="T4"><text:span text:style-name="T4">Совместимость с другими программами и операционными системами, поддерживающими стандарты HTTP и JSON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Время восстановления после отказа:</text:span><text:span text:style-name="T4"/></text:p>
                  <text:list>
                    <text:list-item>
                      <text:p text:style-name="P38" loext:marker-style-name="T4"><text:span text:style-name="T4">При отказе клиентской программы восстановление возможно через перезапуск приложения;</text:span><text:span text:style-name="T4"/></text:p>
                    </text:list-item>
                    <text:list-item>
                      <text:p text:style-name="P38" loext:marker-style-name="T4"><text:span text:style-name="T4">При сбое серверной части восстановление может потребовать нескольких минут до нескольких часов в зависимости от характера ошибки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Отказы из-за некорректных действий пользователей системы</text:span><text:span text:style-name="T4"/></text:p>
                  <text:list>
                    <text:list-item>
                      <text:p text:style-name="P38" loext:marker-style-name="T4"><text:span text:style-name="T4">Некорректный ввод данных в редакторе кода вызывает уведомление об ошибке;</text:span><text:span text:style-name="T4"/></text:p>
                    </text:list-item>
                    <text:list-item>
                      <text:p text:style-name="P38" loext:marker-style-name="T4"><text:soft-page-break/><text:span text:style-name="T4">Попытка выполнения запрещённых действий или превышение прав доступа блокируется системой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9" loext:marker-style-name="T4"/>
      <text:list text:continue-numbering="true" text:style-name="WWNum5">
        <text:list-item>
          <text:p text:style-name="P38" loext:marker-style-name="T15"><text:span text:style-name="T15">Условия эксплуатации</text:span><text:span text:style-name="T15"/></text:p>
          <text:list>
            <text:list-item>
              <text:p text:style-name="P38" loext:marker-style-name="T15"><text:span text:style-name="T15">Климатические условия эксплуатации</text:span><text:span text:style-name="T15"/></text:p>
              <text:list>
                <text:list-item>
                  <text:p text:style-name="P38" loext:marker-style-name="T4"><text:span text:style-name="T4">Рабочая температура должна находиться в диапазоне от 10 до 35 градусов Цельсия;</text:span><text:span text:style-name="T4"/></text:p>
                </text:list-item>
                <text:list-item>
                  <text:p text:style-name="P38" loext:marker-style-name="T4"><text:span text:style-name="T4">Рабочая влажность должна быть в диапазоне от 30% до 80%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Требования к квалификации и численности персонала</text:span><text:span text:style-name="T15"/></text:p>
              <text:list>
                <text:list-item>
                  <text:p text:style-name="P38" loext:marker-style-name="T4"><text:span text:style-name="T4">Требований к квалификации или численности персонала не предъявляется. Программа рассчитана на пользователя без специальных навыков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Требования к составу и параметрам технических средств</text:span><text:span text:style-name="T15"/></text:p>
              <text:list>
                <text:list-item>
                  <text:p text:style-name="P38" loext:marker-style-name="T4"><text:span text:style-name="T4">ОС: Windows 10 или выше / Linux;</text:span><text:span text:style-name="T4"/></text:p>
                </text:list-item>
                <text:list-item>
                  <text:p text:style-name="P38" loext:marker-style-name="T4"><text:span text:style-name="T4">Процессор: Intel Core i3 или выше;</text:span><text:span text:style-name="T4"/></text:p>
                </text:list-item>
                <text:list-item>
                  <text:p text:style-name="P38" loext:marker-style-name="T4"><text:span text:style-name="T4">ОЗУ: минимум 4 ГБ;</text:span><text:span text:style-name="T4"/></text:p>
                </text:list-item>
                <text:list-item>
                  <text:p text:style-name="P38" loext:marker-style-name="T4"><text:span text:style-name="T4">Свободное место на диске: 500 МБ;</text:span><text:span text:style-name="T4"/></text:p>
                </text:list-item>
                <text:list-item>
                  <text:p text:style-name="P38" loext:marker-style-name="T4"><text:span text:style-name="T4">Интернет-соединение для синхронизации с сервером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Требования к информационной и программной совместимости</text:span><text:span text:style-name="T15"/></text:p>
              <text:list>
                <text:list-item>
                  <text:p text:style-name="P38" loext:marker-style-name="T4"><text:span text:style-name="T4">Требования к информационным структурам и методам решения:</text:span><text:span text:style-name="T4"/></text:p>
                  <text:list>
                    <text:list-item>
                      <text:p text:style-name="P38" loext:marker-style-name="T4"><text:span text:style-name="T4">Серверная часть использует базу данных для хранения информации о пользователях, курсах и заданиях;</text:span><text:span text:style-name="T4"/></text:p>
                    </text:list-item>
                    <text:list-item>
                      <text:p text:style-name="P38" loext:marker-style-name="T4"><text:span text:style-name="T4">Клиент работает с API сервера через HTTP-запросы и JSON-ответы;</text:span><text:span text:style-name="T4"/></text:p>
                    </text:list-item>
                    <text:list-item>
                      <text:p text:style-name="P38" loext:marker-style-name="T4"><text:span text:style-name="T4">Структура базы данных должна поддерживать хранение пользователей, ролей, курсов и результатов выполнения заданий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Требования к исходным кодам и языкам программирования:</text:span><text:span text:style-name="T4"/></text:p>
                  <text:list>
                    <text:list-item>
                      <text:p text:style-name="P38" loext:marker-style-name="T4"><text:span text:style-name="T4">Проект разрабатывается на C++ с использованием Qt Quick для клиента и PHP для сервера;</text:span><text:span text:style-name="T4"/></text:p>
                    </text:list-item>
                    <text:list-item>
                      <text:p text:style-name="P38" loext:marker-style-name="T4"><text:span text:style-name="T4">Код должен быть чистым, структурированным и документированным;</text:span><text:span text:style-name="T4"/></text:p>
                    </text:list-item>
                    <text:list-item>
                      <text:p text:style-name="P38" loext:marker-style-name="T4"><text:span text:style-name="T4">Поддержка open-source разработки (по согласованию)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Требования к программным средствам, используемым программой:</text:span><text:span text:style-name="T4"/></text:p>
                  <text:list>
                    <text:list-item>
                      <text:p text:style-name="P38" loext:marker-style-name="T4"><text:span text:style-name="T4">Поддержка ОС Windows и Linux;</text:span><text:span text:style-name="T4"/></text:p>
                    </text:list-item>
                    <text:list-item>
                      <text:p text:style-name="P38" loext:marker-style-name="T4"><text:span text:style-name="T4">Использование Docker для безопасного выполнения кода;</text:span><text:span text:style-name="T4"/></text:p>
                    </text:list-item>
                    <text:list-item>
                      <text:p text:style-name="P38" loext:marker-style-name="T4"><text:span text:style-name="T4">Интеграция с веб-сервером Apache/Nginx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Требования к защите информации и программ:</text:span><text:span text:style-name="T4"/></text:p>
                  <text:list>
                    <text:list-item>
                      <text:p text:style-name="P38" loext:marker-style-name="T4"><text:span text:style-name="T4">Система аутентификации пользователей с разграничением прав доступа;</text:span><text:span text:style-name="T4"/></text:p>
                    </text:list-item>
                    <text:list-item>
                      <text:p text:style-name="P38" loext:marker-style-name="T4"><text:span text:style-name="T4">Шифрование конфиденциальной информации;</text:span><text:span text:style-name="T4"/></text:p>
                    </text:list-item>
                    <text:list-item>
                      <text:p text:style-name="P38" loext:marker-style-name="T4"><text:span text:style-name="T4">Ограничение прав и ресурсов при выполнении кода;</text:span><text:span text:style-name="T4"/></text:p>
                    </text:list-item>
                    <text:list-item>
                      <text:p text:style-name="P38" loext:marker-style-name="T4"><text:span text:style-name="T4">Регулярные обновления программного обеспечения.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38" loext:marker-style-name="T15"><text:span text:style-name="T15">Специальные требования</text:span><text:span text:style-name="T15"/></text:p>
              <text:list>
                <text:list-item>
                  <text:p text:style-name="P38" loext:marker-style-name="T4"><text:span text:style-name="T4">Авторизация по логину и паролю;</text:span><text:span text:style-name="T4"/></text:p>
                </text:list-item>
                <text:list-item>
                  <text:p text:style-name="P38" loext:marker-style-name="T4"><text:span text:style-name="T4">Разграничение прав пользователей: студент, преподаватель, администратор;</text:span><text:span text:style-name="T4"/></text:p>
                </text:list-item>
                <text:list-item>
                  <text:p text:style-name="P38" loext:marker-style-name="T4"><text:span text:style-name="T4">Возможность редактирования только допустимых разделов;</text:span><text:span text:style-name="T4"/></text:p>
                </text:list-item>
                <text:list-item>
                  <text:p text:style-name="P38" loext:marker-style-name="T4"><text:span text:style-name="T4">Защита данных при передаче и хранении;</text:span><text:span text:style-name="T4"/></text:p>
                </text:list-item>
                <text:list-item>
                  <text:p text:style-name="P38" loext:marker-style-name="T4"><text:span text:style-name="T4">Регулярное обновление и поддержка системы.</text:span><text:span text:style-name="T4"/></text:p>
                </text:list-item>
              </text:list>
            </text:list-item>
          </text:list>
        </text:list-item>
      </text:list>
      <text:p text:style-name="P39" loext:marker-style-name="T4"/>
      <text:list text:continue-numbering="true" text:style-name="WWNum5">
        <text:list-item>
          <text:p text:style-name="P38" loext:marker-style-name="T15"><text:span text:style-name="T15">Требования к программной документации</text:span><text:span text:style-name="T15"/></text:p>
          <text:list>
            <text:list-item>
              <text:p text:style-name="P38" loext:marker-style-name="T15"><text:span text:style-name="T15">Состав программной документации</text:span><text:span text:style-name="T15"/></text:p>
              <text:list>
                <text:list-item>
                  <text:p text:style-name="P38" loext:marker-style-name="T4"><text:span text:style-name="T4">Техническое задание;</text:span><text:span text:style-name="T4"/></text:p>
                </text:list-item>
                <text:list-item>
                  <text:p text:style-name="P38" loext:marker-style-name="T4"><text:span text:style-name="T4">Руководство пользователя.</text:span><text:span text:style-name="T4"/></text:p>
                </text:list-item>
              </text:list>
            </text:list-item>
          </text:list>
        </text:list-item>
      </text:list>
      <text:p text:style-name="P39" loext:marker-style-name="T4"/>
      <text:list text:continue-numbering="true" text:style-name="WWNum5">
        <text:list-item>
          <text:p text:style-name="P38" loext:marker-style-name="T15"><text:span text:style-name="T15">Технико-экономическое обоснование</text:span><text:span text:style-name="T15"/></text:p>
          <text:list>
            <text:list-item>
              <text:p text:style-name="P38" loext:marker-style-name="T4"><text:span text:style-name="T4">Экономическая эффективность ориентировочно не рассчитывается из-за уникальности требований к проекту.</text:span><text:span text:style-name="T4"/></text:p>
            </text:list-item>
          </text:list>
        </text:list-item>
      </text:list>
      <text:p text:style-name="P39" loext:marker-style-name="T4"><text:soft-page-break/></text:p>
      <text:list text:continue-numbering="true" text:style-name="WWNum5">
        <text:list-item>
          <text:p text:style-name="P38" loext:marker-style-name="T15"><text:span text:style-name="T15">Стадии и этапы разработки</text:span><text:span text:style-name="T15"/></text:p>
          <text:list>
            <text:list-item>
              <text:p text:style-name="P38" loext:marker-style-name="T15"><text:span text:style-name="T15">Стадии разработки</text:span><text:span text:style-name="T15"/></text:p>
              <text:list>
                <text:list-item>
                  <text:p text:style-name="P38" loext:marker-style-name="T4"><text:span text:style-name="T4">Разработка технического задания;</text:span><text:span text:style-name="T4"/></text:p>
                </text:list-item>
                <text:list-item>
                  <text:p text:style-name="P38" loext:marker-style-name="T4"><text:span text:style-name="T4">Рабочее проектирование;</text:span><text:span text:style-name="T4"/></text:p>
                </text:list-item>
                <text:list-item>
                  <text:p text:style-name="P38" loext:marker-style-name="T4"><text:span text:style-name="T4">Внедрение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Этапы разработки</text:span><text:span text:style-name="T15"/></text:p>
              <text:list>
                <text:list-item>
                  <text:p text:style-name="P38" loext:marker-style-name="T4"><text:span text:style-name="T4">Разработка технического задания;</text:span><text:span text:style-name="T4"/></text:p>
                </text:list-item>
                <text:list-item>
                  <text:p text:style-name="P38" loext:marker-style-name="T4"><text:span text:style-name="T4">Разработка программы;</text:span><text:span text:style-name="T4"/></text:p>
                </text:list-item>
                <text:list-item>
                  <text:p text:style-name="P38" loext:marker-style-name="T4"><text:span text:style-name="T4">Разработка программной документации;</text:span><text:span text:style-name="T4"/></text:p>
                </text:list-item>
                <text:list-item>
                  <text:p text:style-name="P38" loext:marker-style-name="T4"><text:span text:style-name="T4">Испытания программы;</text:span><text:span text:style-name="T4"/></text:p>
                </text:list-item>
                <text:list-item>
                  <text:p text:style-name="P38" loext:marker-style-name="T4"><text:span text:style-name="T4">Подготовка и передача программы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Содержание работ по этапам</text:span><text:span text:style-name="T15"/></text:p>
              <text:list>
                <text:list-item>
                  <text:p text:style-name="P38" loext:marker-style-name="T4"><text:span text:style-name="T4">Разработка технического задания:</text:span><text:span text:style-name="T4"/></text:p>
                  <text:list>
                    <text:list-item>
                      <text:p text:style-name="P38" loext:marker-style-name="T4"><text:span text:style-name="T4">Постановка задачи;</text:span><text:span text:style-name="T4"/></text:p>
                    </text:list-item>
                    <text:list-item>
                      <text:p text:style-name="P38" loext:marker-style-name="T4"><text:span text:style-name="T4">Определение и уточнение требований к техническим средствам;</text:span><text:span text:style-name="T4"/></text:p>
                    </text:list-item>
                    <text:list-item>
                      <text:p text:style-name="P38" loext:marker-style-name="T4"><text:span text:style-name="T4">Определение требований к программе;</text:span><text:span text:style-name="T4"/></text:p>
                    </text:list-item>
                    <text:list-item>
                      <text:p text:style-name="P38" loext:marker-style-name="T4"><text:span text:style-name="T4">Определение стадий, этапов и сроков разработки программы и документации на неё;</text:span><text:span text:style-name="T4"/></text:p>
                    </text:list-item>
                    <text:list-item>
                      <text:p text:style-name="P38" loext:marker-style-name="T4"><text:span text:style-name="T4">Согласование и утверждение технического задания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Разработка программы:</text:span><text:span text:style-name="T4"/></text:p>
                  <text:list>
                    <text:list-item>
                      <text:p text:style-name="P38" loext:marker-style-name="T4"><text:span text:style-name="T4">Программирование;</text:span><text:span text:style-name="T4"/></text:p>
                    </text:list-item>
                    <text:list-item>
                      <text:p text:style-name="P38" loext:marker-style-name="T4"><text:span text:style-name="T4">Отладка программы.</text:span><text:span text:style-name="T4"/></text:p>
                    </text:list-item>
                    <text:list-item>
                      <text:p text:style-name="P38" loext:marker-style-name="T4"><text:span text:style-name="T4">Разработка программной документации:</text:span><text:span text:style-name="T4"/></text:p>
                      <text:list>
                        <text:list-item>
                          <text:p text:style-name="P38" loext:marker-style-name="T4"><text:span text:style-name="T4">Разработка программных документов в соответствии с требованиями к составу документации.</text:span><text:span text:style-name="T4"/></text:p>
                        </text:list-item>
                      </text:list>
                    </text:list-item>
                  </text:list>
                </text:list-item>
                <text:list-item>
                  <text:p text:style-name="P38" loext:marker-style-name="T4"><text:span text:style-name="T4">Испытаний программы:</text:span><text:span text:style-name="T4"/></text:p>
                  <text:list>
                    <text:list-item>
                      <text:p text:style-name="P38" loext:marker-style-name="T4"><text:span text:style-name="T4">Разработка, согласование и утверждение и методики испытаний;</text:span><text:span text:style-name="T4"/></text:p>
                    </text:list-item>
                    <text:list-item>
                      <text:p text:style-name="P38" loext:marker-style-name="T4"><text:span text:style-name="T4"><text:s/>Проведение приемо-сдаточных испытаний;</text:span><text:span text:style-name="T4"/></text:p>
                    </text:list-item>
                    <text:list-item>
                      <text:p text:style-name="P38" loext:marker-style-name="T4"><text:span text:style-name="T4">Корректировка программы и программной документации по результатам испытаний.</text:span><text:span text:style-name="T4"/></text:p>
                    </text:list-item>
                  </text:list>
                </text:list-item>
                <text:list-item>
                  <text:p text:style-name="P38" loext:marker-style-name="T4"><text:span text:style-name="T4">Подготовка и передача программы:</text:span><text:span text:style-name="T4"/></text:p>
                  <text:list>
                    <text:list-item>
                      <text:p text:style-name="P38" loext:marker-style-name="T4"><text:span text:style-name="T4">Работа по подготовке и передаче программы и программной документации в эксплуатацию на объектах Заказчика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40" loext:marker-style-name="T4"/>
      <text:list text:continue-numbering="true" text:style-name="WWNum5">
        <text:list-item>
          <text:p text:style-name="P38" loext:marker-style-name="T15"><text:span text:style-name="T15">Порядок контроля и приемки</text:span><text:span text:style-name="T15"/></text:p>
          <text:list>
            <text:list-item>
              <text:p text:style-name="P38" loext:marker-style-name="T15"><text:span text:style-name="T15">Предварительный контроль</text:span><text:span text:style-name="T15"/></text:p>
              <text:list>
                <text:list-item>
                  <text:p text:style-name="P38" loext:marker-style-name="T4"><text:span text:style-name="T4">Проверка соответствия функциональности приложения требованиям технического задания. Контроль качества кода и отсутствия ошибок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Тестирование</text:span><text:span text:style-name="T15"/></text:p>
              <text:list>
                <text:list-item>
                  <text:p text:style-name="P38" loext:marker-style-name="T4"><text:span text:style-name="T4">Проверка всех основных функций приложения;</text:span><text:span text:style-name="T4"/></text:p>
                </text:list-item>
                <text:list-item>
                  <text:p text:style-name="P38" loext:marker-style-name="T4"><text:span text:style-name="T4">Проверка стабильности работы приложения при различных нагрузках;</text:span><text:span text:style-name="T4"/></text:p>
                </text:list-item>
                <text:list-item>
                  <text:p text:style-name="P38" loext:marker-style-name="T4"><text:span text:style-name="T4">Проверка защиты данных пользователей.</text:span><text:span text:style-name="T4"/></text:p>
                </text:list-item>
              </text:list>
            </text:list-item>
            <text:list-item>
              <text:p text:style-name="P38" loext:marker-style-name="T15"><text:span text:style-name="T15">Приёмка</text:span><text:span text:style-name="T15"/></text:p>
              <text:list>
                <text:list-item>
                  <text:p text:style-name="P38" loext:marker-style-name="T4"><text:span text:style-name="T4">Проверка соответствия приложения требованиям безопасности и конфиденциальности данных;</text:span><text:span text:style-name="T4"/></text:p>
                </text:list-item>
                <text:list-item>
                  <text:p text:style-name="P38" loext:marker-style-name="T4"><text:span text:style-name="T4">Проверка оформления приложения в соответствии с корпоративным стилем компании;</text:span><text:span text:style-name="T4"/></text:p>
                </text:list-item>
                <text:list-item>
                  <text:p text:style-name="P38" loext:marker-style-name="T4"><text:span text:style-name="T4">Утверждение результатов тестирования.</text:span><text:span text:style-name="T4"/></text:p>
                </text:list-item>
              </text:list>
            </text:list-item>
          </text:list>
        </text:list-item>
      </text:list>
      <text:p text:style-name="P41" loext:marker-style-name="T2"/>
      <text:p text:style-name="P42" loext:marker-style-name="T1"><text:span text:style-name="T1">2. ПРОЕКТНАЯ ЧАСТЬ</text:span><text:span text:style-name="T1"/></text:p>
      <text:p text:style-name="P28"/>
      <text:p text:style-name="P18">2.1. Проектирование программного продукта</text:p>
      <text:p text:style-name="P43"/>
      <text:p text:style-name="P44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16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16">к</text:span>лиентское приложение — десктопное приложение на Qt + QML (Qt Quick Controls) с С++ модулем доступа к API; <text:span text:style-name="T16">с</text:span>ерверная часть (API) — набор PHP‑скриптов, предоставляющих HTTP‑интерфейс для клиента; <text:span text:style-name="T16">б</text:span>аза данных — схема и стартовые данные (курсы, темы, задания, тесты).</text:p>
      <text:p text:style-name="P44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.</text:p>
      <text:p text:style-name="P44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запуск выполняется с ограничением по времени, входные данные передаются <text:soft-page-break/>через <text:span text:style-name="T17">стандартный вход</text:span>; вывод программы сравнивается с ожидаемым (для проверки по тестам).</text:p>
      <text:p text:style-name="P45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— пользователи (логин, хэш пароля, роль); sessions — сессии авторизации (bearer‑токен с временем жизни); languages — курсы по языкам программирования (название, описание, изображение); themes — темы/уроки, привязанные к языку (lang_id), и теоретический материал; tasks — практические задания, привязанные к теме (theme_id); task_tests — набор тестов для задания (вход/ожидаемый вывод); user_theme_progress, user_task_solved —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44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—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46"/>
      <text:p text:style-name="P47">2.2. Руководство пользователя</text:p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pan text:style-name="T18">Д</text:span>есктопно<text:span text:style-name="T18">е </text:span>приложени<text:span text:style-name="T18">е</text:span> для онлайн-школы по программированию</text:p>
      <text:p text:style-name="P50">Руководство пользователя</text:p>
      <text:p text:style-name="P50">Версия 1.0 </text:p>
      <text:p text:style-name="P50">2026 год</text:p>
      <text:p text:style-name="P51">СОДЕРЖАНИЕ</text:p>
      <text:p text:style-name="P52"/>
      <text:p text:style-name="P53"/>
      <text:p text:style-name="P53"/>
      <text:p text:style-name="P53"/>
      <text:p text:style-name="P54"><text:tab/></text:p>
      <text:p text:style-name="P55"><text:tab/></text:p>
      <text:p text:style-name="P55"><text:tab/></text:p>
      <text:p text:style-name="P5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<text:span text:style-name="T9">1. Введение</text:span></text:p>
          </table:table-cell>
          <table:table-cell table:style-name="Table3.A1" office:value-type="string">
            <text:p text:style-name="P57">21</text:p>
          </table:table-cell>
        </table:table-row>
        <table:table-row>
          <table:table-cell table:style-name="Table3.A1" office:value-type="string">
            <text:p text:style-name="P56">2. Общие сведения о программе</text:p>
          </table:table-cell>
          <table:table-cell table:style-name="Table3.A1" office:value-type="string">
            <text:p text:style-name="P57">22</text:p>
          </table:table-cell>
        </table:table-row>
        <table:table-row>
          <table:table-cell table:style-name="Table3.A1" office:value-type="string">
            <text:p text:style-name="P56"><text:span text:style-name="T10">3. Рекомендуемый первичный порядок действий</text:span></text:p>
          </table:table-cell>
          <table:table-cell table:style-name="Table3.B3">
            <text:p text:style-name="P57"/>
          </table:table-cell>
        </table:table-row>
        <table:table-row>
          <table:table-cell table:style-name="Table3.A1" office:value-type="string">
            <text:p text:style-name="P58">3.1. Скачивание продукта</text:p>
          </table:table-cell>
          <table:table-cell table:style-name="Table3.A1" office:value-type="string">
            <text:p text:style-name="P59"/>
          </table:table-cell>
        </table:table-row>
        <table:table-row>
          <table:table-cell table:style-name="Table3.A1" office:value-type="string">
            <text:p text:style-name="P60">3.2. Установка приложения на ПК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58">3.3. Открытие продукта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56"><text:span text:style-name="T10">4. Работа программы</text:span></text:p>
          </table:table-cell>
          <table:table-cell table:style-name="Table3.A1" office:value-type="string">
            <text:p text:style-name="P61"/>
          </table:table-cell>
        </table:table-row>
      </table:table>
      <text:p text:style-name="P56"/>
      <text:p text:style-name="P62">1. ВВЕДЕНИЕ</text:p>
      <text:p text:style-name="P43"/>
      <text:p text:style-name="P63">Цель данного руководства —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49">В приложении предусмотрены отдельные сценарии работы для двух ролей —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64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65">2. ОБЩИЕ СВЕДЕНИЯ О ПРОГРАММЕ</text:p>
      <text:p text:style-name="P66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—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 (языков программирования)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 (курс, тема, задание, тест).</text:p>
      <text:p text:style-name="P66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66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<text:soft-page-break/>исходного кода. Рекомендуемая среда эксплуатации: рабочее место пользователя с установленным клиентским приложением Qt/QML; стабильное сетевое <text:span text:style-name="T19">интернет-</text:span>соединение. 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.176cm" style:contextual-spacing="false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3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17T19:36:34.522246024</dc:date>
    <meta:editing-cycles>121</meta:editing-cycles>
    <meta:editing-duration>P2DT5H7M39S</meta:editing-duration>
    <meta:generator>LibreOffice/25.8.7.3$Linux_X86_64 LibreOffice_project/580$Build-3</meta:generator>
    <meta:document-statistic meta:table-count="3" meta:image-count="0" meta:object-count="0" meta:page-count="23" meta:paragraph-count="276" meta:word-count="3835" meta:character-count="33457" meta:non-whitespace-character-count="29864"/>
    <meta:user-defined meta:name="AppVersion">15.0000</meta:user-defined>
    <meta:template xlink:type="simple" xlink:actuate="onRequest" xlink:title="Normal.dotm" xlink:href=""/>
  </office:meta>
</office:document-meta>
</file>