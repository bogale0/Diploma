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Pictures/10000001000006040000041F50745D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cm" fo:margin-left="10.123cm" table:align="left" style:writing-mode="lr-tb"/>
    </style:style>
    <style:style style:name="Table5.A" style:family="table-column">
      <style:table-column-properties style:column-width="6.9cm"/>
    </style:style>
    <style:style style:name="Table5.A1" style:family="table-cell">
      <style:table-cell-properties fo:padding="0.097cm" fo:border="none"/>
    </style:style>
    <style:style style:name="Table5.7" style:family="table-row">
      <style:table-row-properties style:min-row-height="0.423cm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3ae849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3ae849" style:font-size-asian="12pt" style:font-size-complex="12pt"/>
    </style:style>
    <style:style style:name="P14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6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298290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2fade3" officeooo:paragraph-rsid="002fade3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397280" officeooo:paragraph-rsid="00397280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29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2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7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8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1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66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7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2fade3" officeooo:paragraph-rsid="002fade3" style:font-size-asian="14pt" style:font-size-complex="14pt"/>
    </style:style>
    <style:style style:name="P68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23587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Table_20_Contents">
      <style:paragraph-properties fo:margin-left="0cm" fo:margin-top="0cm" fo:margin-bottom="0cm" style:contextual-spacing="false" fo:line-height="100%" fo:text-indent="0cm" style:auto-text-indent="false"/>
      <style:text-properties style:font-name="Times New Roman" fo:font-size="14pt" officeooo:rsid="002fade3" officeooo:paragraph-rsid="002fade3" style:font-size-asian="14pt" style:font-size-complex="14pt"/>
    </style:style>
    <style:style style:name="P70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397280" officeooo:paragraph-rsid="00397280" style:font-size-asian="14pt" style:font-size-complex="14pt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82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35a6b1" style:font-size-asian="14pt" style:font-weight-asian="normal" style:font-name-complex="Times New Roman1" style:font-size-complex="14pt" style:font-weight-complex="normal"/>
    </style:style>
    <style:style style:name="P83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font-weight="normal" officeooo:rsid="003329bb" officeooo:paragraph-rsid="0035a6b1" style:font-size-asian="12pt" style:font-weight-asian="normal" style:font-name-complex="Times New Roman1" style:font-size-complex="12pt" style:font-weight-complex="normal"/>
    </style:style>
    <style:style style:name="P84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8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8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87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5d616" officeooo:paragraph-rsid="0025d616" style:font-size-asian="12pt" style:font-weight-asian="normal" style:font-name-complex="Times New Roman1" style:font-size-complex="12pt" style:font-weight-complex="normal"/>
    </style:style>
    <style:style style:name="P8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878" style:font-size-asian="14pt" style:font-weight-asian="bold" style:font-name-complex="Times New Roman1" style:font-size-complex="14pt" style:font-weight-complex="bold"/>
    </style:style>
    <style:style style:name="P89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6d7bc" officeooo:paragraph-rsid="0026d7bc" style:font-size-asian="12pt" style:font-weight-asian="normal" style:font-name-complex="Times New Roman1" style:font-size-complex="12pt" style:font-weight-complex="normal"/>
    </style:style>
    <style:style style:name="P90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9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92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9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T1" style:family="text">
      <style:text-properties officeooo:rsid="003ae8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3ae849"/>
    </style:style>
    <style:style style:name="T5" style:family="text">
      <style:text-properties officeooo:rsid="001d1e9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fad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10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style:font-size-asian="14pt" style:font-name-complex="Times New Roman1" style:font-size-complex="14pt"/>
    </style:style>
    <style:style style:name="T12" style:family="text">
      <style:text-properties fo:font-size="14pt" fo:language="en" fo:country="US" style:font-size-asian="14pt" style:font-name-complex="Times New Roman1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5" style:family="text">
      <style:text-properties officeooo:rsid="001f9141"/>
    </style:style>
    <style:style style:name="T16" style:family="text">
      <style:text-properties fo:font-size="14pt" style:letter-kerning="false" style:font-size-asian="14pt" style:font-name-complex="Times New Roman1" style:font-size-complex="14pt"/>
    </style:style>
    <style:style style:name="T17" style:family="text">
      <style:text-properties style:font-name-complex="Times New Roman1"/>
    </style:style>
    <style:style style:name="T18" style:family="text">
      <style:text-properties officeooo:rsid="001ca533" style:font-name-complex="Times New Roman1"/>
    </style:style>
    <style:style style:name="T19" style:family="text">
      <style:text-properties officeooo:rsid="00174b0a"/>
    </style:style>
    <style:style style:name="T20" style:family="text">
      <style:text-properties officeooo:rsid="001ca533"/>
    </style:style>
    <style:style style:name="T21" style:family="text">
      <style:text-properties officeooo:rsid="00135c9d"/>
    </style:style>
    <style:style style:name="T22" style:family="text">
      <style:text-properties officeooo:rsid="0009e7a5"/>
    </style:style>
    <style:style style:name="T23" style:family="text">
      <style:text-properties officeooo:rsid="000d01d4"/>
    </style:style>
    <style:style style:name="T24" style:family="text">
      <style:text-properties officeooo:rsid="0018f2a4"/>
    </style:style>
    <style:style style:name="T25" style:family="text">
      <style:text-properties officeooo:rsid="0027aad2"/>
    </style:style>
    <style:style style:name="T26" style:family="text">
      <style:text-properties officeooo:rsid="00235878"/>
    </style:style>
    <style:style style:name="T27" style:family="text">
      <style:text-properties fo:font-weight="normal" officeooo:rsid="00235878" style:font-weight-asian="normal" style:font-weight-complex="normal"/>
    </style:style>
    <style:style style:name="T28" style:family="text">
      <style:text-properties officeooo:rsid="000ee979"/>
    </style:style>
    <style:style style:name="T29" style:family="text">
      <style:text-properties officeooo:rsid="0035a6b1"/>
    </style:style>
    <style:style style:name="T30" style:family="text">
      <style:text-properties officeooo:rsid="002910d9"/>
    </style:style>
    <style:style style:name="T31" style:family="text">
      <style:text-properties officeooo:rsid="00235ef2"/>
    </style:style>
    <style:style style:name="T32" style:family="text">
      <style:text-properties officeooo:rsid="0023f2f2"/>
    </style:style>
    <style:style style:name="T33" style:family="text">
      <style:text-properties officeooo:rsid="002d0ac1"/>
    </style:style>
    <style:style style:name="T34" style:family="text">
      <style:text-properties officeooo:rsid="002ed432"/>
    </style:style>
    <style:style style:name="fr1" style:family="graphic" style:parent-style-name="Graphics">
      <style:graphic-properties style:protect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<text:span text:style-name="T1">Алексей Георгиевич</text:span></text:p>
          </table:table-cell>
        </table:table-row>
        <table:table-row>
          <table:table-cell table:style-name="Table5.A1" office:value-type="string">
            <text:p text:style-name="P8">Студент <text:s/><text:span text:style-name="T2"><text:s text:c="6"/>401 <text:s text:c="5"/></text:span><text:span text:style-name="T3"><text:s text:c="2"/>группы</text:span></text:p>
          </table:table-cell>
        </table:table-row>
        <table:table-row>
          <table:table-cell table:style-name="Table5.A1" office:value-type="string">
            <text:p text:style-name="P9">Руководитель <text:s/><text:span text:style-name="T1">________________</text:span></text:p>
          </table:table-cell>
        </table:table-row>
        <table:table-row>
          <table:table-cell table:style-name="Table5.A1" office:value-type="string">
            <text:p text:style-name="P10"><text:s text:c="38"/>подпись</text:p>
          </table:table-cell>
        </table:table-row>
        <table:table-row>
          <table:table-cell table:style-name="Table5.A1" office:value-type="string">
            <text:p text:style-name="P11">Трушина Е<text:span text:style-name="T1">лена Геннадьевна</text:span></text:p>
          </table:table-cell>
        </table:table-row>
        <table:table-row table:style-name="Table5.7"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text:span text:style-name="T5"> <text:s/></text:span><text:span text:style-name="T1">________________</text:span></text:p>
          </table:table-cell>
        </table:table-row>
        <table:table-row>
          <table:table-cell table:style-name="Table5.A1" office:value-type="string">
            <text:p text:style-name="P13"><text:s text:c="38"/>подпись</text:p>
          </table:table-cell>
        </table:table-row>
        <table:table-row>
          <table:table-cell table:style-name="Table5.A1" office:value-type="string">
            <text:p text:style-name="P11">Медведкова Ю<text:span text:style-name="T1">лия Константиновна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  <table:table-row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2">Оценка<text:span text:style-name="T5"> <text:s/></text:span><text:span text:style-name="T1">__________________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</table:table>
      <text:p text:style-name="P14"/>
      <text:p text:style-name="P15">СОДЕРЖАНИЕ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1. Пояснительная записка<text:span text:style-name="T6"> ..............................................................................</text:span></text:p>
          </table:table-cell>
          <table:table-cell table:style-name="Table2.A1" office:value-type="string">
            <text:p text:style-name="P18">3</text:p>
          </table:table-cell>
        </table:table-row>
        <table:table-row>
          <table:table-cell table:style-name="Table2.A1" office:value-type="string">
            <text:p text:style-name="P19">1.1. Квалификационные характеристики проекта ................................</text:p>
          </table:table-cell>
          <table:table-cell table:style-name="Table2.A1" office:value-type="string">
            <text:p text:style-name="P20">3</text:p>
          </table:table-cell>
        </table:table-row>
        <table:table-row>
          <table:table-cell table:style-name="Table2.A1" office:value-type="string">
            <text:p text:style-name="P19">1.2. Описание предметной области ........................................................</text:p>
          </table:table-cell>
          <table:table-cell table:style-name="Table2.B3" office:value-type="float" office:value="5">
            <text:p text:style-name="P20">5</text:p>
          </table:table-cell>
        </table:table-row>
        <table:table-row>
          <table:table-cell table:style-name="Table2.A1" office:value-type="string">
            <text:p text:style-name="P19">1.3. Техническое задание .........................................................................</text:p>
          </table:table-cell>
          <table:table-cell table:style-name="Table2.A1" office:value-type="string">
            <text:p text:style-name="P20">1<text:span text:style-name="T7">2</text:span></text:p>
          </table:table-cell>
        </table:table-row>
        <table:table-row>
          <table:table-cell table:style-name="Table2.A1" office:value-type="string">
            <text:p text:style-name="P17">2. Проектная часть<text:span text:style-name="T6"> ...........................................................................................</text:span></text:p>
          </table:table-cell>
          <table:table-cell table:style-name="Table2.A1" office:value-type="string">
            <text:p text:style-name="P18">19</text:p>
          </table:table-cell>
        </table:table-row>
        <table:table-row>
          <table:table-cell table:style-name="Table2.A1" office:value-type="string">
            <text:p text:style-name="P19">2.1. Проектирование программного продукта ......................................</text:p>
          </table:table-cell>
          <table:table-cell table:style-name="Table2.A1" office:value-type="string">
            <text:p text:style-name="P18">19</text:p>
          </table:table-cell>
        </table:table-row>
        <table:table-row>
          <table:table-cell table:style-name="Table2.A1" office:value-type="string">
            <text:p text:style-name="P19">2.2. Руководство пользователя ...............................................................</text:p>
          </table:table-cell>
          <table:table-cell table:style-name="Table2.A1" office:value-type="string">
            <text:p text:style-name="P18">20</text:p>
          </table:table-cell>
        </table:table-row>
        <table:table-row>
          <table:table-cell table:style-name="Table2.A1" office:value-type="string">
            <text:p text:style-name="P19">2.3. Результаты апробации ......................................................................</text:p>
          </table:table-cell>
          <table:table-cell table:style-name="Table2.A1" office:value-type="string">
            <text:p text:style-name="P21">31</text:p>
          </table:table-cell>
        </table:table-row>
        <table:table-row>
          <table:table-cell table:style-name="Table2.A1" office:value-type="string">
            <text:p text:style-name="P22"><text:span text:style-name="T8">Заключение </text:span><text:span text:style-name="T9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21">33</text:p>
          </table:table-cell>
        </table:table-row>
        <table:table-row>
          <table:table-cell table:style-name="Table2.A1" office:value-type="string">
            <text:p text:style-name="P22"><text:span text:style-name="T8">Список использованных источников </text:span><text:span text:style-name="T9">..........................................................</text:span></text:p>
          </table:table-cell>
          <table:table-cell table:style-name="Table2.A1" office:value-type="string">
            <text:p text:style-name="P21">36</text:p>
          </table:table-cell>
        </table:table-row>
      </table:table>
      <text:p text:style-name="P23"/>
      <text:p text:style-name="P24">1. ПОЯСНИТЕЛЬНАЯ ЗАПИСКА</text:p>
      <text:p text:style-name="P25"/>
      <text:p text:style-name="P25">1.1. Квалификационные характеристики проекта</text:p>
      <text:p text:style-name="P25"/>
      <text:p text:style-name="P26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.</text:p>
      <text:p text:style-name="P27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p>
      <text:p text:style-name="P27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p>
      <text:p text:style-name="P28"><text:soft-page-break/><text:span text:style-name="T10">Объектом</text:span><text:span text:style-name="T11"> дипломного проекта является процесс разработки приложения.</text:span></text:p>
      <text:p text:style-name="P28"><text:span text:style-name="T10">Предметом</text:span><text:span text:style-name="T11"> дипломного проекта является создание десктопного приложения с клиент-серверной архитектурой с помощью </text:span><text:span text:style-name="T12">Qt</text:span><text:span text:style-name="T11"> на языке </text:span><text:span text:style-name="T12">C</text:span><text:span text:style-name="T11">++.</text:span></text:p>
      <text:p text:style-name="P28"><text:span text:style-name="T10">Целью</text:span><text:span text:style-name="T11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8"><text:span text:style-name="T11">В соответствии с поставленной целью в работе необходимо решить следующие </text:span><text:span text:style-name="T10">задачи</text:span><text:span text:style-name="T11">:</text:span></text:p>
      <text:list xml:id="list21084617" text:style-name="WWNum7">
        <text:list-item text:start-value="1">
          <text:p text:style-name="P29">Изучить и проанализировать предметную область.</text:p>
        </text:list-item>
        <text:list-item text:style-override="WWNum3">
          <text:p text:style-name="P30">Разработать техническое задание.</text:p>
        </text:list-item>
        <text:list-item text:style-override="WWNum3">
          <text:p text:style-name="P30">Создать программное обеспечение.</text:p>
        </text:list-item>
        <text:list-item text:style-override="WWNum3">
          <text:p text:style-name="P30">Разработать пользовательский интерфейс приложения.</text:p>
        </text:list-item>
        <text:list-item text:style-override="WWNum3">
          <text:p text:style-name="P30">Подготовить руководство пользователя.</text:p>
        </text:list-item>
      </text:list>
      <text:p text:style-name="P28"><text:span text:style-name="T13">Тип проекта</text:span><text:span text:style-name="T14">: практико-ориентированный.</text:span></text:p>
      <text:p text:style-name="P28"><text:span text:style-name="T13">Этапы работы над проектом</text:span><text:span text:style-name="T14">:</text:span></text:p>
      <text:list text:style-name="WWNum2">
        <text:list-item>
          <text:p text:style-name="P31">Аналитический этап: исследование предметной области, анализ требований</text:p>
        </text:list-item>
        <text:list-item>
          <text:p text:style-name="P31">Проектирование: разработка архитектуры, проектирование интерфейсов</text:p>
        </text:list-item>
        <text:list-item>
          <text:p text:style-name="P31">Реализация: программирование клиентской и серверной частей</text:p>
        </text:list-item>
        <text:list-item>
          <text:p text:style-name="P31">Интеграция: объединение компонентов</text:p>
        </text:list-item>
        <text:list-item>
          <text:p text:style-name="P31">Тестирование: функциональное и интеграционное тестирование</text:p>
        </text:list-item>
        <text:list-item>
          <text:p text:style-name="P31">Документирование: написание технической документации</text:p>
        </text:list-item>
      </text:list>
      <text:p text:style-name="P28"><text:span text:style-name="T10">Прикладная ценность проекта</text:span><text:span text:style-name="T11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11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8"><text:span text:style-name="T10">Критерии эффективности проекта</text:span><text:span text:style-name="T11">:</text:span></text:p>
      <text:list xml:id="list3796921930" text:style-name="WWNum8">
        <text:list-item text:start-value="1">
          <text:p text:style-name="P32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3">Понятность и простота использования приложения.</text:p>
        </text:list-item>
        <text:list-item text:style-override="WWNum4">
          <text:p text:style-name="P33">Стабильность работы системы при взаимодействии пользователей с учебными материалами и заданиями.</text:p>
        </text:list-item>
      </text:list>
      <text:p text:style-name="P34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5"/>
      <text:p text:style-name="P25">1.2. Описание предметной области</text:p>
      <text:p text:style-name="P36"/>
      <text:p text:style-name="P34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<text:span text:style-name="T15">IT</text:span>-специалистах.</text:p>
      <text:p text:style-name="P28"><text:span text:style-name="T11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11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/text:p>
      <text:p text:style-name="P34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p>
      <text:p text:style-name="P34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p>
      <text:p text:style-name="P28"><text:span text:style-name="T11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11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4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p>
      <text:p text:style-name="P34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p>
      <text:p text:style-name="P28"><text:span text:style-name="T11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11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34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p>
      <text:p text:style-name="P34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p>
      <text:p text:style-name="P28"><text:span text:style-name="T11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11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/text:p>
      <text:p text:style-name="P34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p>
      <text:p text:style-name="P34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p>
      <text:p text:style-name="P28"><text:soft-page-break/><text:span text:style-name="T11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34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p>
      <text:p text:style-name="P34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p>
      <text:p text:style-name="P28"><text:soft-page-break/><text:span text:style-name="T11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/text:p>
      <text:p text:style-name="P34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p>
      <text:p text:style-name="P37"><text:span text:style-name="T16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11">архитектуре системы, которые будут рассмотрены в последующих главах работы.</text:span></text:p>
      <text:p text:style-name="P38">1.3. Техническое задание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Техническое задание на разработку программы</text:p>
      <text:p text:style-name="P40">«Десктопное приложение для онлайн-школы по программированию»</text:p>
      <text:p text:style-name="P40"/>
      <text:p text:style-name="P41">Содержание</text:p>
      <text:list xml:id="list2194610234" text:style-name="WWNum9">
        <text:list-item text:start-value="1">
          <text:p text:style-name="P42">Введение</text:p>
          <text:list text:style-name="WWNum1">
            <text:list-item>
              <text:p text:style-name="P43">Основание для разработки</text:p>
            </text:list-item>
            <text:list-item>
              <text:p text:style-name="P43">Назначение и область применения</text:p>
            </text:list-item>
          </text:list>
        </text:list-item>
        <text:list-item text:style-override="WWNum1">
          <text:p text:style-name="P43">Требования к программе</text:p>
          <text:list text:style-name="WWNum1">
            <text:list-item>
              <text:p text:style-name="P43">Требования к функциональным характеристикам</text:p>
            </text:list-item>
            <text:list-item>
              <text:p text:style-name="P43">Требования к надёжности</text:p>
              <text:list>
                <text:list-item>
                  <text:p text:style-name="P43">Требования к обеспечению надёжного функционирования программы</text:p>
                </text:list-item>
                <text:list-item>
                  <text:p text:style-name="P43">Время восстановления после отказа</text:p>
                </text:list-item>
                <text:list-item>
                  <text:p text:style-name="P43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3">Условия эксплуатации</text:p>
          <text:list text:style-name="WWNum1">
            <text:list-item>
              <text:p text:style-name="P43">Климатические условия эксплуатации</text:p>
            </text:list-item>
            <text:list-item>
              <text:p text:style-name="P43">Требования к квалификации и численности персонала</text:p>
            </text:list-item>
            <text:list-item>
              <text:p text:style-name="P43">Требования к составу и параметрам технических средств</text:p>
            </text:list-item>
            <text:list-item>
              <text:p text:style-name="P43">Требования к информационной и программной совместимости</text:p>
              <text:list>
                <text:list-item>
                  <text:p text:style-name="P43">Требования к информационным структурам и методам решения</text:p>
                </text:list-item>
                <text:list-item>
                  <text:p text:style-name="P43">Требования к исходным кодам и языкам программирования</text:p>
                </text:list-item>
                <text:list-item>
                  <text:p text:style-name="P43">Требования к программным средствам, используемым программой</text:p>
                </text:list-item>
                <text:list-item>
                  <text:p text:style-name="P43">Требования к защите информации и программ</text:p>
                </text:list-item>
              </text:list>
            </text:list-item>
            <text:list-item>
              <text:p text:style-name="P43">Специальные требования</text:p>
            </text:list-item>
          </text:list>
        </text:list-item>
        <text:list-item text:style-override="WWNum1">
          <text:p text:style-name="P43">Требования к программной документации</text:p>
          <text:list text:style-name="WWNum1">
            <text:list-item>
              <text:p text:style-name="P43">Состав программной документации</text:p>
            </text:list-item>
          </text:list>
        </text:list-item>
        <text:list-item text:style-override="WWNum1">
          <text:p text:style-name="P43">Технико-экономическое обоснование</text:p>
        </text:list-item>
        <text:list-item text:style-override="WWNum1">
          <text:p text:style-name="P43">Стадии и этапы разработки</text:p>
          <text:list text:style-name="WWNum1">
            <text:list-item>
              <text:p text:style-name="P43">Стадии разработки</text:p>
            </text:list-item>
            <text:list-item>
              <text:p text:style-name="P43">Этапы разработки</text:p>
            </text:list-item>
            <text:list-item>
              <text:p text:style-name="P43">Содержание работ по этапам</text:p>
            </text:list-item>
          </text:list>
        </text:list-item>
        <text:list-item text:style-override="WWNum1">
          <text:p text:style-name="P43">Порядок контроля и приемки</text:p>
          <text:list text:style-name="WWNum1">
            <text:list-item>
              <text:p text:style-name="P43">Предварительный контроль</text:p>
            </text:list-item>
            <text:list-item>
              <text:p text:style-name="P43">Тестирование</text:p>
            </text:list-item>
            <text:list-item>
              <text:p text:style-name="P43">Приёмка</text:p>
            </text:list-item>
          </text:list>
        </text:list-item>
      </text:list>
      <text:list xml:id="list2587445500" text:style-name="WWNum10">
        <text:list-item text:start-value="1">
          <text:p text:style-name="P44">Введение</text:p>
          <text:list text:style-name="WWNum5">
            <text:list-item>
              <text:p text:style-name="P45">Основание для разработки</text:p>
              <text:list>
                <text:list-item>
                  <text:p text:style-name="P46">Наименование работы: «Десктопное приложение для онлайн-школы по программированию».</text:p>
                </text:list-item>
                <text:list-item>
                  <text:p text:style-name="P46">Основанием для разработки является задание на выпускную квалификационную работу.</text:p>
                </text:list-item>
                <text:list-item>
                  <text:p text:style-name="P46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5">Назначение и область применения</text:p>
              <text:list>
                <text:list-item>
                  <text:p text:style-name="P46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6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6">Основные функциональные задачи приложения включают:</text:p>
                  <text:list>
                    <text:list-item>
                      <text:p text:style-name="P46">Регистрацию и авторизацию пользователей с разделением ролей (student, teacher);</text:p>
                    </text:list-item>
                    <text:list-item>
                      <text:p text:style-name="P46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6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6">Просмотр условия задания и публичного примера ввода/вывода;</text:p>
                    </text:list-item>
                    <text:list-item>
                      <text:p text:style-name="P46">Редактирование и запуск пользовательского кода с передачей входных данных;</text:p>
                    </text:list-item>
                    <text:list-item>
                      <text:p text:style-name="P46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6">Отображение прогресса обучения по темам и курсам в профиле пользователя;</text:p>
                    </text:list-item>
                    <text:list-item>
                      <text:p text:style-name="P46">Восстановление пароля по секретному восстановительному полю;</text:p>
                    </text:list-item>
                    <text:list-item>
                      <text:p text:style-name="P46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text:continue-list="list2587445500" text:style-name="WWNum5">
        <text:list-item>
          <text:p text:style-name="P47"><text:span text:style-name="T17">Требова</text:span><text:span text:style-name="T18">ния</text:span></text:p>
          <text:list>
            <text:list-item>
              <text:p text:style-name="P45">Требования к функциональным характеристикам</text:p>
              <text:list>
                <text:list-item>
                  <text:p text:style-name="P48">Работа с учетными записями и ролями:</text:p>
                  <text:list>
                    <text:list-item>
                      <text:p text:style-name="P48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8">Программа должна поддерживать вход по логину и паролю;</text:p>
                    </text:list-item>
                    <text:list-item>
                      <text:p text:style-name="P48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8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8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8">Работа с курсами, темами и заданиями:</text:p>
                  <text:list>
                    <text:list-item>
                      <text:p text:style-name="P48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8">Для выбранного курса должна быть реализована загрузка списка тем;</text:p>
                    </text:list-item>
                    <text:list-item>
                      <text:p text:style-name="P48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8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8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8">Редактор и выполнение кода:</text:p>
                  <text:list>
                    <text:list-item>
                      <text:p text:style-name="P48">В клиенте должен быть реализован встроенный редактор текста решения;</text:p>
                    </text:list-item>
                    <text:list-item>
                      <text:p text:style-name="P48"><text:soft-page-break/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8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8">Сервер должен поддерживать языки C++, Python, C# и Go;</text:p>
                    </text:list-item>
                    <text:list-item>
                      <text:p text:style-name="P48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8">Проверка решений и прогресс:</text:p>
                  <text:list>
                    <text:list-item>
                      <text:p text:style-name="P48">Проверка решения должна выполняться на сервере по набору тестов задания;</text:p>
                    </text:list-item>
                    <text:list-item>
                      <text:p text:style-name="P48">Результатом проверки должно быть количество пройденных тестов и общий итог;</text:p>
                    </text:list-item>
                    <text:list-item>
                      <text:p text:style-name="P48">При полном прохождении тестов задание должно помечаться как решённое;</text:p>
                    </text:list-item>
                    <text:list-item>
                      <text:p text:style-name="P48">При решении всех заданий темы прогресс темы должен устанавливаться в 100%;</text:p>
                    </text:list-item>
                    <text:list-item>
                      <text:p text:style-name="P48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8">Функции преподавателя:</text:p>
                  <text:list>
                    <text:list-item>
                      <text:p text:style-name="P48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8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8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8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8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5">Требования к надёжности</text:p>
              <text:list>
                <text:list-item>
                  <text:p text:style-name="P46">Требования к обеспечению надежного функционирования программы:</text:p>
                  <text:list>
                    <text:list-item>
                      <text:p text:style-name="P46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6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6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6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6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6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6">Время восстановления после отказа:</text:p>
                  <text:list>
                    <text:list-item>
                      <text:p text:style-name="P46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6">При истечении серверной сессии пользователь должен повторно авторизоваться;</text:p>
                    </text:list-item>
                    <text:list-item>
                      <text:p text:style-name="P46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6">Отказы из-за некорректных действий пользователей системы</text:p>
                  <text:list>
                    <text:list-item>
                      <text:p text:style-name="P46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6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6"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text:continue-numbering="true" text:style-name="WWNum5">
        <text:list-item>
          <text:p text:style-name="P47"><text:soft-page-break/><text:span text:style-name="T17">Условия эксплуатации</text:span></text:p>
          <text:list>
            <text:list-item>
              <text:p text:style-name="P45">Климатические условия эксплуатации</text:p>
              <text:list>
                <text:list-item>
                  <text:p text:style-name="P46">Рабочая температура должна находиться в диапазоне от 10 до 35 градусов Цельсия;</text:p>
                </text:list-item>
                <text:list-item>
                  <text:p text:style-name="P46">Рабочая влажность должна быть в диапазоне от 30% до 80%.</text:p>
                </text:list-item>
              </text:list>
            </text:list-item>
            <text:list-item>
              <text:p text:style-name="P45">Требования к квалификации и численности персонала</text:p>
              <text:list>
                <text:list-item>
                  <text:p text:style-name="P46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6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5">Требования к составу и параметрам технических средств</text:p>
              <text:list>
                <text:list-item>
                  <text:p text:style-name="P46">Клиентская ОС: Windows 10+ или Linux;</text:p>
                </text:list-item>
                <text:list-item>
                  <text:p text:style-name="P46">Процессор: Intel Core i3 или эквивалент;</text:p>
                </text:list-item>
                <text:list-item>
                  <text:p text:style-name="P46">ОЗУ: не менее <text:span text:style-name="T19">1</text:span> ГБ;</text:p>
                </text:list-item>
                <text:list-item>
                  <text:p text:style-name="P46">Свободное место на диске: не менее <text:span text:style-name="T19">2</text:span>00 МБ для клиента;</text:p>
                </text:list-item>
                <text:list-item>
                  <text:p text:style-name="P46">Постоянное интернет-соединение для работы с API;</text:p>
                </text:list-item>
                <text:list-item>
                  <text:p text:style-name="P46">Сервер: Linux/Unix-подобная ОС, PHP с PDO MySQL, СУБД MySQL/MariaDB;</text:p>
                </text:list-item>
                <text:list-item>
                  <text:p text:style-name="P46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5">Требования к информационной и программной совместимости</text:p>
              <text:list>
                <text:list-item>
                  <text:p text:style-name="P46">Требования к информационным структурам и методам решения:</text:p>
                  <text:list>
                    <text:list-item>
                      <text:p text:style-name="P46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6">Обмен между клиентом и сервером должен осуществляться по HTTP(S) с JSON-полями;</text:p>
                    </text:list-item>
                    <text:list-item>
                      <text:p text:style-name="P46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6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6">Требования к исходным кодам и языкам программирования:</text:p>
                  <text:list>
                    <text:list-item>
                      <text:p text:style-name="P46">Клиентская часть реализуется на C++ (Qt) и QML;</text:p>
                    </text:list-item>
                    <text:list-item>
                      <text:p text:style-name="P46">Серверная API-часть реализуется на PHP;</text:p>
                    </text:list-item>
                    <text:list-item>
                      <text:p text:style-name="P46">SQL-скрипт и структура БД должны быть совместимы с MySQL/MariaDB;</text:p>
                    </text:list-item>
                    <text:list-item>
                      <text:p text:style-name="P46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6">Требования к программным средствам, используемым программой:</text:p>
                  <text:list>
                    <text:list-item>
                      <text:p text:style-name="P46">Клиент использует Qt Quick / Qt Quick Controls / Qt Network;</text:p>
                    </text:list-item>
                    <text:list-item>
                      <text:p text:style-name="P46">Сервер использует PHP PDO и веб-сервер с поддержкой запуска PHP-скриптов;</text:p>
                    </text:list-item>
                    <text:list-item>
                      <text:p text:style-name="P46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6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6">Требования к защите информации и программ:</text:p>
                  <text:list>
                    <text:list-item>
                      <text:p text:style-name="P46">Пароли и восстановительные данные должны храниться в виде хэшей;</text:p>
                    </text:list-item>
                    <text:list-item>
                      <text:p text:style-name="P46">Доступ к защищённым API-методам должен осуществляться только по bearer-токену;</text:p>
                    </text:list-item>
                    <text:list-item>
                      <text:p text:style-name="P46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6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5">Специальные требования</text:p>
              <text:list>
                <text:list-item>
                  <text:p text:style-name="P46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6">Должна поддерживаться стартовая заставка (Splash Screen);</text:p>
                </text:list-item>
                <text:list-item>
                  <text:p text:style-name="P46"><text:soft-page-break/>В профиле должен отображаться детализированный прогресс по темам и курсам;</text:p>
                </text:list-item>
                <text:list-item>
                  <text:p text:style-name="P46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6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50"/>
      <text:list text:continue-numbering="true" text:style-name="WWNum5">
        <text:list-item>
          <text:p text:style-name="P45">Требования к программной документации</text:p>
          <text:list>
            <text:list-item>
              <text:p text:style-name="P45">Состав программной документации</text:p>
              <text:list>
                <text:list-item>
                  <text:p text:style-name="P46">Техническое задание;</text:p>
                </text:list-item>
                <text:list-item>
                  <text:p text:style-name="P46">Руководство пользователя.</text:p>
                </text:list-item>
              </text:list>
            </text:list-item>
          </text:list>
        </text:list-item>
      </text:list>
      <text:p text:style-name="P50"/>
      <text:list text:continue-numbering="true" text:style-name="WWNum5">
        <text:list-item>
          <text:p text:style-name="P45">Технико-экономическое обоснование</text:p>
          <text:list>
            <text:list-item>
              <text:p text:style-name="P46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6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6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50"/>
      <text:list text:continue-numbering="true" text:style-name="WWNum5">
        <text:list-item>
          <text:p text:style-name="P45">Стадии и этапы разработки</text:p>
          <text:list>
            <text:list-item>
              <text:p text:style-name="P45">Стадии разработки</text:p>
              <text:list>
                <text:list-item>
                  <text:p text:style-name="P46">Разработка технического задания;</text:p>
                </text:list-item>
                <text:list-item>
                  <text:p text:style-name="P46">Рабочее проектирование;</text:p>
                </text:list-item>
                <text:list-item>
                  <text:p text:style-name="P46">Внедрение.</text:p>
                </text:list-item>
              </text:list>
            </text:list-item>
            <text:list-item>
              <text:p text:style-name="P45">Этапы разработки</text:p>
              <text:list>
                <text:list-item>
                  <text:p text:style-name="P46">Разработка технического задания;</text:p>
                </text:list-item>
                <text:list-item>
                  <text:p text:style-name="P46">Разработка программы;</text:p>
                </text:list-item>
                <text:list-item>
                  <text:p text:style-name="P46">Разработка программной документации;</text:p>
                </text:list-item>
                <text:list-item>
                  <text:p text:style-name="P46">Испытания программы;</text:p>
                </text:list-item>
                <text:list-item>
                  <text:p text:style-name="P46">Подготовка и передача программы.</text:p>
                </text:list-item>
              </text:list>
            </text:list-item>
            <text:list-item>
              <text:p text:style-name="P45">Содержание работ по этапам</text:p>
              <text:list>
                <text:list-item>
                  <text:p text:style-name="P46">Разработка технического задания:</text:p>
                  <text:list>
                    <text:list-item>
                      <text:p text:style-name="P46">Постановка задачи;</text:p>
                    </text:list-item>
                    <text:list-item>
                      <text:p text:style-name="P46">Определение и уточнение требований к техническим средствам;</text:p>
                    </text:list-item>
                    <text:list-item>
                      <text:p text:style-name="P46">Определение требований к программе;</text:p>
                    </text:list-item>
                    <text:list-item>
                      <text:p text:style-name="P46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6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6">Разработка программы:</text:p>
                  <text:list>
                    <text:list-item>
                      <text:p text:style-name="P46">Программирование;</text:p>
                    </text:list-item>
                    <text:list-item>
                      <text:p text:style-name="P46">Отладка программы.</text:p>
                    </text:list-item>
                    <text:list-item>
                      <text:p text:style-name="P46">Разработка программной документации:</text:p>
                      <text:list>
                        <text:list-item>
                          <text:p text:style-name="P46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6">Испытаний программы:</text:p>
                  <text:list>
                    <text:list-item>
                      <text:p text:style-name="P46">Разработка, согласование и утверждение и методики испытаний;</text:p>
                    </text:list-item>
                    <text:list-item>
                      <text:p text:style-name="P46"><text:s/>Проведение приемо-сдаточных испытаний;</text:p>
                    </text:list-item>
                    <text:list-item>
                      <text:p text:style-name="P46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6">Подготовка и передача программы:</text:p>
                  <text:list>
                    <text:list-item>
                      <text:p text:style-name="P46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text:continue-numbering="true" text:style-name="WWNum5">
        <text:list-item>
          <text:p text:style-name="P45">Порядок контроля и приемки<text:span text:style-name="T8"/></text:p>
          <text:list>
            <text:list-item>
              <text:p text:style-name="P47"><text:soft-page-break/><text:span text:style-name="T17">Предварительный контроль</text:span></text:p>
              <text:list>
                <text:list-item>
                  <text:p text:style-name="P46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5">Тестирование</text:p>
              <text:list>
                <text:list-item>
                  <text:p text:style-name="P46">Проверка всех основных функций приложения;</text:p>
                </text:list-item>
                <text:list-item>
                  <text:p text:style-name="P46">Проверка стабильности работы приложения при различных нагрузках;</text:p>
                </text:list-item>
                <text:list-item>
                  <text:p text:style-name="P46">Проверка защиты данных пользователей.</text:p>
                </text:list-item>
              </text:list>
            </text:list-item>
            <text:list-item>
              <text:p text:style-name="P45">Приёмка</text:p>
              <text:list>
                <text:list-item>
                  <text:p text:style-name="P46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6">Проверка оформления приложения в соответствии с корпоративным стилем компании;</text:p>
                </text:list-item>
                <text:list-item>
                  <text:p text:style-name="P46">Утверждение результатов тестирования.</text:p>
                </text:list-item>
              </text:list>
            </text:list-item>
          </text:list>
        </text:list-item>
      </text:list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2">От ИСПОЛНИТЕЛЯ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2">От ЗАКАЗЧИКА</text:p>
          </table:table-cell>
        </table:table-row>
        <table:table-row>
          <table:table-cell table:style-name="Table4.A2" office:value-type="string">
            <text:p text:style-name="P52">Богодухов А.Г.</text:p>
          </table:table-cell>
          <table:table-cell table:style-name="Table4.A1" office:value-type="string">
            <text:p text:style-name="P53"/>
          </table:table-cell>
          <table:table-cell table:style-name="Table4.A2" office:value-type="string">
            <text:p text:style-name="P52"><text:span text:style-name="T20">ГАПОУ</text:span> «ЧПК»</text:p>
          </table:table-cell>
        </table:table-row>
        <table:table-row>
          <table:table-cell table:style-name="Table4.A1" office:value-type="string">
            <text:p text:style-name="P52">31 октября 2025 г.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2">31 октября 2025 г.</text:p>
          </table:table-cell>
        </table:table-row>
      </table:table>
      <text:p text:style-name="P50"/>
      <text:p text:style-name="P54">2. ПРОЕКТНАЯ ЧАСТЬ</text:p>
      <text:p text:style-name="P36"/>
      <text:p text:style-name="P25">2.1. Проектирование программного продукта</text:p>
      <text:p text:style-name="P55"/>
      <text:p text:style-name="P56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21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21">к</text:span>лиентское приложение - десктопное приложение на Qt + QML (Qt Quick Controls) с С++ модулем доступа к API; <text:span text:style-name="T21">с</text:span>ерверная часть (API) - набор PHP‑скриптов, предоставляющих HTTP‑интерфейс для клиента; <text:span text:style-name="T21">б</text:span>аза данных - схема и стартовые данные (курсы, темы, задания, тесты).</text:p>
      <text:p text:style-name="P56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56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22">стандартный вход</text:span>; вывод программы сравнивается с ожидаемым (для проверки по тестам).</text:p>
      <text:p text:style-name="P57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6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8"/>
      <text:p text:style-name="P59">2.2. Руководство пользователя</text:p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pan text:style-name="T23">Д</text:span>есктопно<text:span text:style-name="T23">е </text:span>приложени<text:span text:style-name="T23">е</text:span> для онлайн-школы по программированию</text:p>
      <text:p text:style-name="P62">Руководство пользователя</text:p>
      <text:p text:style-name="P62">Версия 1.0 </text:p>
      <text:p text:style-name="P62">2026 год</text:p>
      <text:p text:style-name="P63">СОДЕРЖАНИЕ</text:p>
      <text:p text:style-name="P6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5">1. Введение<text:span text:style-name="T6"> .........................................................................................................</text:span></text:p>
          </table:table-cell>
          <table:table-cell table:style-name="Table3.A1" office:value-type="string">
            <text:p text:style-name="P66">2<text:span text:style-name="T24">3</text:span></text:p>
          </table:table-cell>
        </table:table-row>
        <table:table-row>
          <table:table-cell table:style-name="Table3.A1" office:value-type="string">
            <text:p text:style-name="P65">2. Общие сведения о программе <text:span text:style-name="T6">....................................................................</text:span></text:p>
          </table:table-cell>
          <table:table-cell table:style-name="Table3.A1" office:value-type="string">
            <text:p text:style-name="P66">2<text:span text:style-name="T24">4</text:span></text:p>
          </table:table-cell>
        </table:table-row>
        <table:table-row>
          <table:table-cell table:style-name="Table3.A1" office:value-type="string">
            <text:p text:style-name="P65">3. Рекомендуемый первичный порядок действий <text:span text:style-name="T6">.....................................</text:span></text:p>
          </table:table-cell>
          <table:table-cell table:style-name="Table3.B3" office:value-type="float" office:value="26">
            <text:p text:style-name="P67">26</text:p>
          </table:table-cell>
        </table:table-row>
        <table:table-row>
          <table:table-cell table:style-name="Table3.A1" office:value-type="string">
            <text:p text:style-name="P68">3.1. <text:span text:style-name="T25">У</text:span><text:span text:style-name="T26">становка приложения </text:span><text:span text:style-name="T27">.....................................................................</text:span></text:p>
          </table:table-cell>
          <table:table-cell table:style-name="Table3.A1" office:value-type="string">
            <text:p text:style-name="P69">26</text:p>
          </table:table-cell>
        </table:table-row>
        <table:table-row>
          <table:table-cell table:style-name="Table3.A1" office:value-type="string">
            <text:p text:style-name="P65">4. Работа программы <text:span text:style-name="T6">.......................................................................................</text:span></text:p>
          </table:table-cell>
          <table:table-cell table:style-name="Table3.A1" office:value-type="string">
            <text:p text:style-name="P70">27</text:p>
          </table:table-cell>
        </table:table-row>
      </table:table>
      <text:p text:style-name="P71"/>
      <text:p text:style-name="P72">1. ВВЕДЕНИЕ</text:p>
      <text:p text:style-name="P55"/>
      <text:p text:style-name="P73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61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4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5">2. ОБЩИЕ СВЕДЕНИЯ О ПРОГРАММЕ</text:p>
      <text:p text:style-name="P76"/>
      <text:p text:style-name="P77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77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7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28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  <text:p text:style-name="P78">3. РЕКОМЕНДУЕМЫЙ ПЕРВИЧНЫЙ ПОРЯДОК ДЕЙСТВИЙ</text:p>
      <text:p text:style-name="P79"/>
      <text:p text:style-name="P80">3.1 Установка приложения</text:p>
      <text:p text:style-name="P81"/>
      <text:p text:style-name="P82">Для установки приложения онлайн-школы <text:span text:style-name="T29">по </text:span>программировани<text:span text:style-name="T29">ю </text:span>необходимо перейти на официальный сайт проекта: <text:a xlink:type="simple" xlink:href="https://diploma.bogaledev.ru/" text:style-name="Internet_20_link" text:visited-style-name="Visited_20_Internet_20_Link">https://diploma.bogaledev.r<text:span text:style-name="T29">u</text:span></text:a><text:span text:style-name="T29"> (</text:span>Рисунок 1), выбрать версию для целевой операционной системы (Windows или Linux), загрузить архив и распаковать его в выбранный рабочий каталог.</text:p>
      <text:p text:style-name="P83"><draw:frame draw:style-name="fr1" draw:name="Image9" text:anchor-type="paragraph" svg:width="12cm" svg:height="8.25cm" draw:z-index="8"><draw:image xlink:href="Pictures/10000001000006040000041F50745D69.png" xlink:type="simple" xlink:show="embed" xlink:actuate="onLoad" draw:mime-type="image/png"/></draw:frame>Рисунок 1</text:p>
      <text:p text:style-name="P82">Для операционной системы Windows после распаковки архива приложение готово к запуску. В релизе предварительно выполнено развёртывание необходимых Qt-компонентов (windeployqt), поэтому запуск осуществляется непосредственно через исполняемый файл DiplomaApp.exe.</text:p>
      <text:p text:style-name="P82">Для операционной системы Linux после распаковки архива требуется установить недостающие системные зависимости и дополнительные пакеты Qt с использованием штатного пакетного менеджера дистрибутива. После установки зависимостей приложение запускается через исполняемый файл DiplomaApp.</text:p>
      <text:p text:style-name="P84"><text:span text:style-name="T26">4. </text:span>РАБОТА ПРОГРАММЫ</text:p>
      <text:p text:style-name="P85"/>
      <text:p text:style-name="P86">Пользовательский интерфейс приложения реализован в виде единого окна с последовательной навигацией по учебному сценарию: выбор курса → выбор темы → изучение теории → выполнение задания. В верхней части окна всегда доступна пользовательская кнопка профиля для быстрого перехода в личный кабинет и кнопка закрытия приложения. Сразу после запуска отображается заставка (Рисунок <text:span text:style-name="T29">2</text:span>), затем открывается основная рабочая область.</text:p>
      <text:p text:style-name="P87"><draw:frame draw:style-name="fr2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<text:span text:style-name="T29">2</text:span></text:p>
      <text:p text:style-name="P86">После завершения заставки пользователь попадает на первую рабочую страницу (Рисунок <text:span text:style-name="T29">3</text:span>) - список курсов (языков программирования). Каждый элемент списка содержит название и описание курса. <text:span text:style-name="T30">В</text:span>ыбор курса выполняется нажатием на карточку элемента. Эта страница является стартовой точкой пользовательского пути.</text:p>
      <text:p text:style-name="P87"><draw:frame draw:style-name="fr3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<text:span text:style-name="T29">3</text:span></text:p>
      <text:p text:style-name="P86">После выбора курса открывается окно со списком тем (Рисунок <text:span text:style-name="T29">4</text:span>). На странице отображаются все темы по выбранному языку программирования; переход к следующему шагу выполняется выбором нужной темы. Для удобства каждая тема сопровождается кратким пояснением.</text:p>
      <text:p text:style-name="P88"/>
      <text:p text:style-name="P89"><draw:frame draw:style-name="fr3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<text:span text:style-name="T29">4</text:span></text:p>
      <text:p text:style-name="P86">После выбора темы открывается <text:span text:style-name="T31">окно с</text:span> теоретическ<text:span text:style-name="T31">им</text:span> материа<text:span text:style-name="T31">лом</text:span> (Рисунок <text:span text:style-name="T29">5</text:span>). В верхней части отображается текст теории, а ниже - кнопки перехода к практическим заданиям темы. Выбор задания выполняется нажатием соответствующей кнопки.</text:p>
      <text:p text:style-name="P90"><draw:frame draw:style-name="fr3" draw:name="Image4" text:anchor-type="paragraph" svg:width="12cm" svg:height="7.999cm" draw:z-index="3"><draw:image xlink:href="Pictures/10000001000005E3000003F416332F05.png" xlink:type="simple" xlink:show="embed" xlink:actuate="onLoad" draw:mime-type="image/png"/></draw:frame><text:soft-page-break/>Рисунок <text:span text:style-name="T29">5</text:span></text:p>
      <text:p text:style-name="P86">Если пользователь пытается открыть задание или личный кабинет без входа в систему, приложение автоматически открывает окно авторизации (Рисунок <text:span text:style-name="T29">6</text:span>). В этом окне доступны стандартные режимы: вход, регистрация и восстановление пароля. После успешной авторизации пользователь возвращается к запрошенному ранее действию.</text:p>
      <text:p text:style-name="P90"><draw:frame draw:style-name="fr3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<text:span text:style-name="T29">6</text:span></text:p>
      <text:p text:style-name="P86">Окно задания (Рисунок <text:span text:style-name="T29">7</text:span>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31">для</text:span> запуск решения на пользовательском вводе <text:span text:style-name="T31">и </text:span>«Отправить» <text:span text:style-name="T31">для</text:span> проверк<text:span text:style-name="T31">и</text:span> решения на автоматических тестах. Ниже выводится <text:span text:style-name="T31">блок с </text:span><text:soft-page-break/><text:span text:style-name="T31">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90"><draw:frame draw:style-name="fr3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<text:span text:style-name="T29">7</text:span></text:p>
      <text:p text:style-name="P86">Окно личного кабинета открывается по кнопке профиля после авторизации (Рисунок <text:span text:style-name="T29">8</text:span>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</text:p>
      <text:p text:style-name="P90"><draw:frame draw:style-name="fr3" draw:name="Image7" text:anchor-type="paragraph" svg:width="12cm" svg:height="7.999cm" draw:z-index="6"><draw:image xlink:href="Pictures/10000001000005E3000003F40E1DBFF7.png" xlink:type="simple" xlink:show="embed" xlink:actuate="onLoad" draw:mime-type="image/png"/></draw:frame>Рисунок <text:span text:style-name="T29">8</text:span></text:p>
      <text:p text:style-name="P91">Если аккаунт имеет роль <text:span text:style-name="T32">учителя</text:span>, вместо личного кабинета открывается окно «Панель учителя» (Рисунок <text:span text:style-name="T29">9</text:span>). Вкладки панели предоставляют <text:soft-page-break/>инструменты администрирования учебного контента: «Новый курс» - создание нового курса (языка); «Новая тема» - добавление темы и теоретического материала; «Новое задание» - создание практического задания; «Новый тест» - добавление теста для автоматической проверки; «Выйти» - выход из учётной записи преподавателя. Этот интерфейс обеспечивает полный цикл наполнения системы учебными материалами без перехода во внешние административные инструменты.</text:p>
      <text:p text:style-name="P92"><draw:frame draw:style-name="fr3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<text:span text:style-name="T29">9</text:span></text:p>
      <text:p text:style-name="P93"/>
      <text:p text:style-name="P93">2.3. Результаты апробации</text:p>
      <text:p text:style-name="P93"/>
      <text:p text:style-name="P91">Апробация разработанного программного приложения проводилась на заключительном этапе выполнения выпускной квалификационной работы и была направлена на проверку его практической применимости, устойчивости работы пользовательских сценариев и качества восприятия целевой аудиторией.</text:p>
      <text:p text:style-name="P91">В рамках внешней профессионально-ориентированной оценки проект был представлен 24 апреля 2026 года на XXII Межрегиональной студенческой научно-практической конференции «Студент. Образование. Общество XXI века: профессиональное становление в эпоху цифровой трансформации и искусственного интеллекта» в тематическом направлении «Цифровая трансформация общества: цифровые проекты, ИИ, Интернет вещей, большие данные, блокчейн». Демонстрация приложения в формате научного доклада <text:soft-page-break/>позволила получить экспертную обратную связь в академической среде и подтвердить актуальность выбранной темы исследования в контексте цифровизации образовательных и общественных процессов.</text:p>
      <text:p text:style-name="P91">Дополнительно была проведена пользовательская апробация с участием преподавателей и студентов: приложение протестировали несколько преподавателей и одногруппников. Проверка включала базовые сценарии взаимодействия с интерфейсом, навигацию по ключевым разделам, выполнение целевых действий пользователя и общую оценку удобства использования. По результатам тестирования существенных затруднений в работе с системой выявлено не было; участники отметили логичность структуры, понятность интерфейса и практическую полезность реализованного функционала.</text:p>
      <text:p text:style-name="P91">Содержательный анализ собранной обратной связи показал, что разработанное приложение корректно решает поставленные прикладные задачи и может быть рекомендовано к дальнейшему использованию и развитию. Положительные отзывы преподавателей и студентов свидетельствуют о соответствии реализованного решения ожиданиям потенциальных пользователей и подтверждают перспективность его дальнейшего внедрения в учебно-практическую деятельность.</text:p>
      <text:p text:style-name="P91">Таким образом, результаты апробации подтверждают работоспособность, востребованность и практическую значимость разработанного приложения. Полученные данные могут служить основанием для последующего расширения функциональных возможностей системы, углубления аналитических модулей и масштабирования опыта применения в смежных образовательных и проектных контекстах.</text:p>
      <text:p text:style-name="P94">ЗАКЛЮЧЕНИЕ</text:p>
      <text:p text:style-name="P95"/>
      <text:p text:style-name="P91">Выпускная квалификационная работа на тему «Разработка десктопного приложения для онлайн-школы по программированию» посвящена решению практико-ориентированной задачи повышения качества обучения в цифровой среде. Актуальность проекта обусловлена тем, что современное онлайн-обучение программированию требует не только доступа к теории, но и непрерывной практики, оперативной проверки решений и удобной учебной инфраструктуры. На этапе постановки задачи была определена ключевая проблема: разрыв между изучением материалов и выполнением программных заданий, а также высокая зависимость эффективности обучения от технической подготовки обучающихся.</text:p>
      <text:p text:style-name="P91">В соответствии с поставленной целью в проекте последовательно решены все запланированные задачи. <text:span text:style-name="T33">А</text:span>нализ предметной области выполнен через изучение специфики онлайн-обучения программированию, образовательных сценариев и потребностей целевых пользователей. В результате сформировано обоснование структуры будущей системы: единое приложение, объединяющее теоретический контент, практические задания и инструменты контроля результатов. <text:span text:style-name="T33">Т</text:span>ехническо<text:span text:style-name="T33">е</text:span> задани<text:span text:style-name="T33">е</text:span> <text:span text:style-name="T33">разработано </text:span>с определением функциональных и нефункциональных требований, ролей пользователей, ограничений и критериев качества. Это позволило сформировать прозрачную основу для проектирования и дальнейшей реализации решения, а также обеспечить проверяемость соответствия итогового продукта заявленным требованиям.</text:p>
      <text:p text:style-name="P91"><text:span text:style-name="T33">П</text:span>рограммно<text:span text:style-name="T33">е</text:span> обеспечени<text:span text:style-name="T33">е создано </text:span>через реализацию клиент-серверной архитектуры приложения. В ходе разработки обеспечено взаимодействие между пользовательским интерфейсом и серверной частью, реализованы механизмы аутентификации, управление учебным контентом, получение и обработка результатов выполнения заданий. Отдельное внимание уделено целостности данных и устойчивости основных пользовательских сценариев, что критически важно для образовательных систем, ориентированных на регулярную учебную работу.</text:p>
      <text:p text:style-name="P91"><text:soft-page-break/><text:span text:style-name="T33">Р</text:span>азработка пользовательского интерфейса выполнена с учётом принципов понятности, логичности и минимизации когнитивной нагрузки. В интерфейсе организована последовательная навигация по разделам «темы», «теория», «задания» и «результаты», что делает учебный процесс структурированным и предсказуемым для обучающегося. Для преподавателя обеспечены инструменты формирования и сопровождения учебных материалов. <text:span text:style-name="T33">Р</text:span>уководств<text:span text:style-name="T33">о</text:span> пользователя <text:span text:style-name="T33">п</text:span>одгото<text:span text:style-name="T33">влено</text:span>. Документация описывает ключевые сценарии работы с системой и снижает порог входа для разных категорий пользователей.</text:p>
      <text:p text:style-name="P91">В ходе проектирования и реализации подтверждена достижимость главного результата: создано работоспособное десктопное приложение для онлайн-школы по программированию, обеспечивающее интеграцию теоретической и практической составляющих обучения. Разработанное решение позволяет обучающемуся проходить материал последовательно, выполнять задания в единой среде, оперативно получать обратную связь и видеть динамику собственного прогресса. Для преподавателя система формирует удобный контур управления контентом и контроля учебной активности.</text:p>
      <text:p text:style-name="P91">Практическая значимость проекта заключается в возможности непосредственного внедрения результата в деятельность онлайн-школ, колледжей и иных образовательных организаций, реализующих подготовку в сфере программирования. Приложение может использоваться как самостоятельный учебный инструмент и как компонент существующей цифровой образовательной среды. В обоих случаях достигается снижение технических барьеров, сокращение времени на организацию учебной работы и повышение дисциплины прохождения материалов за счёт понятного маршрута обучения.</text:p>
      <text:p text:style-name="P91">Результаты апробации показали, что пользователи положительно оценивают удобство интерфейса, структурированность контента и полезность практических модулей. Это подтверждает корректность принятых архитектурных и интерфейсных решений, а также обоснованность выбранной концепции объединения теории и практики в едином приложении. Полученные <text:soft-page-break/>выводы позволяют рассматривать разработку как устойчивую основу для дальнейшего развития.</text:p>
      <text:p text:style-name="P91">Перспективы совершенствования проекта включают расширение набора поддерживаемых языков программирования, внедрение адаптивных траекторий обучения, развитие аналитических инструментов для преподавателя и интеграцию с внешними образовательными сервисами. Дополнительным направлением может стать углубление механизмов автоматизированной проверки кода, включая оценку качества решений по нескольким критериям и персонализированные рекомендации по улучшению.</text:p>
      <text:p text:style-name="P91">Таким образом, цель выпускной квалификационной работы достигнута в полном объёме, а все поставленные задачи последовательно решены. Разработанное десктопное приложение подтвердило работоспособность, методическую обоснованность и прикладную ценность. Итоговый результат имеет практическую применимость в образовательной сфере, способствует повышению качества обучения программированию и может быть масштабирован в рамках дальнейшей цифровой трансформации учебного процесса.</text:p>
      <text:p text:style-name="P94">СПИСОК ИСПОЛЬЗОВАННЫХ ИСТОЧНИКОВ</text:p>
      <text:p text:style-name="P95"/>
      <text:list text:style-name="L1">
        <text:list-item>
          <text:p text:style-name="P96">Российская Федерация. Законы. Об образовании в Российской Федерации : Федеральный закон от 29.12.2012 № 273-ФЗ (ред. от 29.12.2025).</text:p>
        </text:list-item>
        <text:list-item>
          <text:p text:style-name="P96">Российская Федерация. Правительство. Об утверждении Правил применения организациями, осуществляющими образовательную деятельность, электронного обучения, дистанционных образовательных технологий при реализации образовательных программ : Постановление Правительства РФ от 11.10.2023 № 1678.</text:p>
        </text:list-item>
        <text:list-item>
          <text:p text:style-name="P96">Российская Федерация. Правительство. Об утверждении Положения о государственной аккредитации образовательной деятельности : Постановление Правительства РФ от 19.05.2023 № 797.</text:p>
        </text:list-item>
        <text:list-item>
          <text:p text:style-name="P96">Российская Федерация. Министерство просвещения. Об утверждении федерального государственного образовательного стандарта среднего профессионального образования по специальности 09.02.07 Информационные системы и программирование : Приказ Минобрнауки России от 09.12.2016 № 1547 (ред. от 03.07.2024).</text:p>
        </text:list-item>
        <text:list-item>
          <text:p text:style-name="P96">ГОСТ Р 56939-2024. Защита информации. Разработка безопасного программного обеспечения. Общие требования.</text:p>
        </text:list-item>
        <text:list-item>
          <text:p text:style-name="P96">ГОСТ Р ИСО/МЭК 25010-2022. Системная и программная инженерия. Требования и оценка качества систем и программных продуктов (SQuaRE).</text:p>
        </text:list-item>
        <text:list-item>
          <text:p text:style-name="P96">ГОСТ Р 59795-2021. Информационные технологии. Комплекс стандартов на автоматизированные системы. Автоматизированные системы. Стадии создания.</text:p>
        </text:list-item>
        <text:list-item>
          <text:p text:style-name="P96">Алтухова Н. Ф. Цифровая трансформация образования: подходы, модели, инструменты // Открытое образование. 2022. Т. 26. № 6. С. 4–15.</text:p>
        </text:list-item>
        <text:list-item>
          <text:p text:style-name="P96">Андреев А. А., Солдаткин В. И. Дистанционное обучение в цифровой образовательной среде: современное состояние и тенденции // Высшее образование в России. 2021. Т. 30. № 3. С. 9–24.</text:p>
        </text:list-item>
        <text:list-item>
          <text:p text:style-name="P96"><text:soft-page-break/>Блинов В. И., Есенина Е. Ю., Сергеев И. С. Профессиональное образование в условиях цифровой трансформации // Профессиональное образование и рынок труда. 2022. № 2. С. 6–19.</text:p>
        </text:list-item>
        <text:list-item>
          <text:p text:style-name="P96">Вайндорф-Сысоева М. Е., Субочева М. Л. Цифровая дидактика: теория и практика организации обучения : учебное пособие. Москва : Юрайт, 2022. 174 с.</text:p>
        </text:list-item>
        <text:list-item>
          <text:p text:style-name="P96">Днепровская Н. В. Цифровая образовательная среда: риски, возможности, эффекты // Университетское управление: практика и анализ. 2021. Т. 25. № 4. С. 102–118.</text:p>
        </text:list-item>
        <text:list-item>
          <text:p text:style-name="P96">Ильин В. В., Киселёв М. В. Архитектура клиент-серверных приложений : учебное пособие. Москва : КНОРУС, 2023. 256 с.</text:p>
        </text:list-item>
        <text:list-item>
          <text:p text:style-name="P96">Карпов В. Э., Кузнецов С. Д. Введение в анализ данных для образования : учебник. Санкт-Петербург : Питер, 2024. 320 с.</text:p>
        </text:list-item>
        <text:list-item>
          <text:p text:style-name="P96">Кулямин В. В., Петренко А. К. Инженерия требований в программных проектах : учебное пособие. Москва : Бином, 2021. 288 с.</text:p>
        </text:list-item>
        <text:list-item>
          <text:p text:style-name="P96">Лапчик М. П., Хеннер Е. К. Методика обучения программированию в цифровой школе : учебное пособие. Москва : БИНОМ. Лаборатория знаний, 2022. 240 с.</text:p>
        </text:list-item>
        <text:list-item>
          <text:p text:style-name="P96">Леонтьев А. Н. Проектирование пользовательских интерфейсов цифровых образовательных систем // Информатика и образование. 2023. № 8. С. 17–29.</text:p>
        </text:list-item>
        <text:list-item>
          <text:p text:style-name="P96">Монахов В. М., Гриншкун В. В. Цифровые образовательные технологии: педагогический дизайн и сопровождение : монография. Москва : МПГУ, 2024. 312 с.</text:p>
        </text:list-item>
        <text:list-item>
          <text:p text:style-name="P96">Поляков К. Ю., Еремин Е. А. Практикум по программированию на C++ для СПО : учебное пособие. Москва : Юрайт, 2025. 286 с.</text:p>
        </text:list-item>
        <text:list-item>
          <text:p text:style-name="P96">Рудаков А. В. Технологии разработки программных продуктов : учебник для СПО. Москва : Академия, 2023. 352 с.</text:p>
        </text:list-item>
        <text:list-item>
          <text:p text:style-name="P96">Тихомирова Н. В. Оценка качества цифровых образовательных продуктов // Стандарты и качество. 2022. № 10. С. 66–73.</text:p>
        </text:list-item>
        <text:list-item>
          <text:p text:style-name="P96"><text:soft-page-break/>Филимонова Е. В., Панфилова А. П. Электронное обучение и дистанционные образовательные технологии в СПО : практическое руководство. Санкт-Петербург : Лань, 2021. 198 с.</text:p>
        </text:list-item>
        <text:list-item>
          <text:p text:style-name="P96">Федеральный институт развития образования РАНХиГС. Цифровая образовательная среда: методические рекомендации [Электронный ресурс]. URL: https://firo.ranepa.ru/metodicheskie-materialy (дата обращения: 20.<text:span text:style-name="T34">02</text:span>.2026).</text:p>
        </text:list-item>
        <text:list-item>
          <text:p text:style-name="P96">Институт стратегии развития образования. Банк цифровых образовательных практик [Электронный ресурс]. URL: https://instrao.ru/index.php/content-page/159-bank-praktik (дата обращения: 2<text:span text:style-name="T34">2</text:span>.0<text:span text:style-name="T34">2</text:span>.2026).</text:p>
        </text:list-item>
        <text:list-item>
          <text:p text:style-name="P96">Цифровой образовательный контент. Федеральная платформа ЦОК [Электронный ресурс]. URL: https://educont.ru/ (дата обращения: <text:span text:style-name="T34">04.03</text:span>.2026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8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20T19:11:39.748785280</dc:date>
    <meta:editing-cycles>139</meta:editing-cycles>
    <meta:editing-duration>P2DT8H35M48S</meta:editing-duration>
    <meta:generator>LibreOffice/25.8.7.3$Linux_X86_64 LibreOffice_project/580$Build-3</meta:generator>
    <meta:print-date>2026-05-20T19:10:28.339352502</meta:print-date>
    <meta:printed-by>PDF files</meta:printed-by>
    <meta:document-statistic meta:table-count="4" meta:image-count="9" meta:object-count="0" meta:page-count="38" meta:paragraph-count="386" meta:word-count="6211" meta:character-count="54035" meta:non-whitespace-character-count="48208"/>
    <meta:user-defined meta:name="AppVersion">15.0000</meta:user-defined>
    <meta:template xlink:type="simple" xlink:actuate="onRequest" xlink:title="Normal.dotm" xlink:href=""/>
  </office:meta>
</office:document-meta>
</file>