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7.001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end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</style:style>
    <style:style style:name="P8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Contents_20_1">
      <style:paragraph-properties fo:margin-top="0cm" fo:margin-bottom="0cm" style:contextual-spacing="false" fo:line-height="150%"/>
    </style:style>
    <style:style style:name="P10" style:family="paragraph" style:parent-style-name="Contents_20_2">
      <style:paragraph-properties fo:margin-left="0cm" fo:margin-top="0cm" fo:margin-bottom="0cm" style:contextual-spacing="false" fo:line-height="150%"/>
    </style:style>
    <style:style style:name="P11" style:family="paragraph" style:parent-style-name="Contents_20_2">
      <style:paragraph-properties fo:margin-left="0cm" fo:margin-top="0cm" fo:margin-bottom="0cm" style:contextual-spacing="false" fo:line-height="150%" fo:text-indent="1.249cm" style:auto-text-indent="false"/>
    </style:style>
    <style:style style:name="P12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16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19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8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29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0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</style:style>
    <style:style style:name="P31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 style:list-style-name="L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 style:list-style-name="L3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L4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L5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 style:list-style-name="L6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 style:list-style-name="L7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letter-kerning="tru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6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7" style:family="text">
      <style:text-properties style:text-position="super 58%" style:font-name="Times New Roman" fo:font-size="12pt" fo:language="ru" fo:country="RU" style:letter-kerning="tru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font-size-complex="14pt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1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7" style:family="text">
      <style:text-properties officeooo:rsid="0009e7a5"/>
    </style:style>
    <style:style style:name="T18" style:family="text">
      <style:text-properties officeooo:rsid="000d01d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Государственное автономное профессиональное образовательное учреждение «Читинский педагогический колледж»</text:span><text:span text:style-name="T1"/></text:h>
      <text:h text:style-name="P2" text:outline-level="2" loext:marker-style-name="T2"/>
      <text:h text:style-name="P1" text:outline-level="2" loext:marker-style-name="T3"><text:span text:style-name="T3">Кафедра информационных технологий и программирования</text:span><text:span text:style-name="T3"/></text:h>
      <text:h text:style-name="P2" text:outline-level="2" loext:marker-style-name="T2"/>
      <text:h text:style-name="P1" text:outline-level="2" loext:marker-style-name="T2"><text:span text:style-name="T2">Специальность 09.02.07 Информационные системы и программирование</text:span><text:span text:style-name="T2"/></text:h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1" text:outline-level="2" loext:marker-style-name="T1"><text:span text:style-name="T1">ВЫПУСКНАЯ КВАЛИФИКАЦИОННАЯ РАБОТА</text:span><text:span text:style-name="T1"/></text:h>
      <text:h text:style-name="P1" text:outline-level="2" loext:marker-style-name="T1"><text:span text:style-name="T1">Дипломный проект</text:span><text:span text:style-name="T1"/></text:h>
      <text:h text:style-name="P2" text:outline-level="2" loext:marker-style-name="T2"/>
      <text:h text:style-name="P1" text:outline-level="2" loext:marker-style-name="T1"><text:span text:style-name="T1">Разработка десктопного приложения для онлайн-школы по программированию</text:span><text:span text:style-name="T1"/></text:h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ext:h text:style-name="P2" text:outline-level="2" loext:marker-style-name="T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1" office:value-type="string">
            <text:h text:style-name="P4" text:outline-level="2" loext:marker-style-name="T4"><text:span text:style-name="T5">Выполнил: <text:s text:c="4"/>Богодухов А.Г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Студент 401 группы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Руководитель <text:s text:c="9"/>Трушина Е.Г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5" text:outline-level="2" loext:marker-style-name="T6"><text:span text:style-name="T7">подпись</text:span><text:span text:style-name="T7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« <text:s text:c="9"/>» <text:s text:c="39"/>20 <text:s text:c="6"/>г.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Допущен к защите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Зав. кафедрой <text:s text:c="4"/>Медведкова Ю.К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5" text:outline-level="2" loext:marker-style-name="T6"><text:span text:style-name="T7">подпись</text:span><text:span text:style-name="T7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« <text:s text:c="9"/>» <text:s text:c="39"/>20 <text:s text:c="6"/>г.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Оценка</text:span><text:span text:style-name="T5"/></text:h>
          </table:table-cell>
        </table:table-row>
        <table:table-row table:style-name="Table1.1">
          <table:table-cell table:style-name="Table1.A1" office:value-type="string">
            <text:h text:style-name="P3" text:outline-level="2" loext:marker-style-name="T2"/>
          </table:table-cell>
          <table:table-cell table:style-name="Table1.B2" office:value-type="string">
            <text:h text:style-name="P4" text:outline-level="2" loext:marker-style-name="T4"><text:span text:style-name="T5">« <text:s text:c="9"/>» <text:s text:c="39"/>20 <text:s text:c="6"/>г.</text:span><text:span text:style-name="T5"/></text:h>
          </table:table-cell>
        </table:table-row>
      </table:table>
      <text:p text:style-name="P6" loext:marker-style-name="T2"/>
      <text:p text:style-name="P7" loext:marker-style-name="T8"><text:span text:style-name="T8">СОДЕРЖАНИЕ</text:span><text:span text:style-name="T8"/></text:p>
      <text:p text:style-name="P8" loext:marker-style-name="T9"/>
      <text:p text:style-name="P9" loext:marker-style-name="T10"><text:span text:style-name="T9">1. Пояснительная записка</text:span><text:span text:style-name="T9"/></text:p>
      <text:p text:style-name="P10" loext:marker-style-name="T10"><text:span text:style-name="T10"><text:tab/>1.1. Квалификационные характеристики проекта</text:span><text:span text:style-name="T10"/></text:p>
      <text:p text:style-name="P11" loext:marker-style-name="T11"><text:span text:style-name="T10">1.2. Описание предметной области</text:span><text:span text:style-name="T11"/></text:p>
      <text:p text:style-name="P11" loext:marker-style-name="T11"><text:span text:style-name="T10">1.</text:span><text:span text:style-name="T11">3</text:span><text:span text:style-name="T10">. Техническое задание</text:span></text:p>
      <text:p text:style-name="P9" loext:marker-style-name="T11"><text:span text:style-name="T9">2. Проектная часть</text:span><text:span text:style-name="T12"/></text:p>
      <text:p text:style-name="P11" loext:marker-style-name="T10"><text:span text:style-name="T10">2.1. Проектирование программного продукта</text:span><text:span text:style-name="T10"/></text:p>
      <text:p text:style-name="P11" loext:marker-style-name="T10"><text:span text:style-name="T10">2.2. Руководство пользователя</text:span><text:span text:style-name="T10"/></text:p>
      <text:p text:style-name="P11" loext:marker-style-name="T10"><text:span text:style-name="T10">2.3. Результаты апробации</text:span><text:span text:style-name="T10"/></text:p>
      <text:p text:style-name="P9" loext:marker-style-name="T10"><text:span text:style-name="T9">Заключение</text:span><text:span text:style-name="T9"/></text:p>
      <text:p text:style-name="P9" loext:marker-style-name="T10"><text:span text:style-name="T9">Список использованных источников</text:span><text:span text:style-name="T9"/></text:p>
      <text:p text:style-name="P6" loext:marker-style-name="T2"/>
      <text:p text:style-name="P12" loext:marker-style-name="T1"><text:span text:style-name="T1">1. ПОЯСНИТЕЛЬНАЯ ЗАПИСКА</text:span><text:span text:style-name="T1"/></text:p>
      <text:p text:style-name="P13" loext:marker-style-name="T1"/>
      <text:p text:style-name="P14" loext:marker-style-name="T1"><text:span text:style-name="T1">1.1. Квалификационные характеристики проекта</text:span><text:span text:style-name="T1"/></text:p>
      <text:p text:style-name="P13" loext:marker-style-name="T1"/>
      <text:p text:style-name="P15" loext:marker-style-name="T13"><text:span text:style-name="T13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— ключевую роль играет регулярная практическая работа с кодом и получение оперативной обратной связи по результатам выполнения заданий.</text:span><text:span text:style-name="T13"/></text:p>
      <text:p text:style-name="P15" loext:marker-style-name="T13"><text:span text:style-name="T13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span><text:span text:style-name="T13"/></text:p>
      <text:p text:style-name="P15" loext:marker-style-name="T13"><text:span text:style-name="T13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</text:span><text:span text:style-name="T13"/></text:p>
      <text:p text:style-name="P15" loext:marker-style-name="T13"><text:span text:style-name="T13">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</text:span><text:soft-page-break/><text:span text:style-name="T13">качества формирования практических навыков программирования у обучающихся.</text:span><text:span text:style-name="T13"/></text:p>
      <text:p text:style-name="P15" loext:marker-style-name="T2"><text:span text:style-name="T1">Объектом</text:span><text:span text:style-name="T2"> дипломного проекта является процесс разработки приложения.</text:span></text:p>
      <text:p text:style-name="P15" loext:marker-style-name="T2"><text:span text:style-name="T1">Предметом</text:span><text:span text:style-name="T2"> дипломного проекта является создание десктопного приложения с клиент-серверной архитектурой с помощью </text:span><text:span text:style-name="T14">Qt</text:span><text:span text:style-name="T2"> на языке </text:span><text:span text:style-name="T14">C</text:span><text:span text:style-name="T2">++.</text:span></text:p>
      <text:p text:style-name="P15" loext:marker-style-name="T2"><text:span text:style-name="T1">Целью</text:span><text:span text:style-name="T2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15" loext:marker-style-name="T2"><text:span text:style-name="T2">В соответствии с поставленной целью в работе необходимо решить следующие </text:span><text:span text:style-name="T1">задачи</text:span><text:span text:style-name="T2">:</text:span></text:p>
      <text:list xml:id="list891671238" text:style-name="WWNum7">
        <text:list-item text:start-value="1">
          <text:p text:style-name="P16" loext:marker-style-name="T2"><text:span text:style-name="T2">Изучить и проанализировать предметную область.</text:span><text:span text:style-name="T2"/></text:p>
        </text:list-item>
        <text:list-item text:style-override="WWNum3">
          <text:p text:style-name="P17" loext:marker-style-name="T2"><text:span text:style-name="T2">Разработать техническое задание.</text:span><text:span text:style-name="T2"/></text:p>
        </text:list-item>
        <text:list-item text:style-override="WWNum3">
          <text:p text:style-name="P17" loext:marker-style-name="T2"><text:span text:style-name="T2">Создать программное обеспечение.</text:span><text:span text:style-name="T2"/></text:p>
        </text:list-item>
        <text:list-item text:style-override="WWNum3">
          <text:p text:style-name="P17" loext:marker-style-name="T2"><text:span text:style-name="T2">Разработать пользовательский интерфейс приложения.</text:span><text:span text:style-name="T2"/></text:p>
        </text:list-item>
        <text:list-item text:style-override="WWNum3">
          <text:p text:style-name="P17" loext:marker-style-name="T2"><text:span text:style-name="T2">Подготовить руководство пользователя.</text:span><text:span text:style-name="T2"/></text:p>
        </text:list-item>
      </text:list>
      <text:p text:style-name="P15" loext:marker-style-name="T13"><text:span text:style-name="T8">Тип проекта</text:span><text:span text:style-name="T13">: практико-ориентированный.</text:span></text:p>
      <text:p text:style-name="P15" loext:marker-style-name="T13"><text:span text:style-name="T8">Этапы работы над проектом</text:span><text:span text:style-name="T13">:</text:span></text:p>
      <text:list text:style-name="WWNum2">
        <text:list-item>
          <text:p text:style-name="P18" loext:marker-style-name="T13"><text:span text:style-name="T13">Аналитический этап: исследование предметной области, анализ требований</text:span><text:span text:style-name="T13"/></text:p>
        </text:list-item>
        <text:list-item>
          <text:p text:style-name="P18" loext:marker-style-name="T13"><text:span text:style-name="T13">Проектирование: разработка архитектуры, проектирование интерфейсов</text:span><text:span text:style-name="T13"/></text:p>
        </text:list-item>
        <text:list-item>
          <text:p text:style-name="P18" loext:marker-style-name="T13"><text:span text:style-name="T13">Реализация: программирование клиентской и серверной частей</text:span><text:span text:style-name="T13"/></text:p>
        </text:list-item>
        <text:list-item>
          <text:p text:style-name="P18" loext:marker-style-name="T13"><text:span text:style-name="T13">Интеграция: объединение компонентов</text:span><text:span text:style-name="T13"/></text:p>
        </text:list-item>
        <text:list-item>
          <text:p text:style-name="P18" loext:marker-style-name="T13"><text:span text:style-name="T13">Тестирование: функциональное и интеграционное тестирование</text:span><text:span text:style-name="T13"/></text:p>
        </text:list-item>
        <text:list-item>
          <text:p text:style-name="P18" loext:marker-style-name="T13"><text:span text:style-name="T13">Документирование: написание технической документации</text:span><text:span text:style-name="T13"/></text:p>
        </text:list-item>
      </text:list>
      <text:p text:style-name="P15" loext:marker-style-name="T2"><text:span text:style-name="T1">Прикладная ценность проекта</text:span><text:span text:style-name="T2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</text:span><text:soft-page-break/><text:span text:style-name="T2">теоретические материалы и практические задания объединены в одном интерфейсе. Такой подход упрощает процесс обучения, повышает вовлечённость 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15" loext:marker-style-name="T2"><text:span text:style-name="T1">Критерии эффективности проекта</text:span><text:span text:style-name="T2">:</text:span></text:p>
      <text:list xml:id="list42773260" text:style-name="WWNum8">
        <text:list-item text:start-value="1">
          <text:p text:style-name="P19" loext:marker-style-name="T2"><text:span text:style-name="T2">Корректность выполнения программных заданий и точность проверки результатов работы пользователей.</text:span><text:span text:style-name="T2"/></text:p>
        </text:list-item>
        <text:list-item text:style-override="WWNum4">
          <text:p text:style-name="P20" loext:marker-style-name="T2"><text:span text:style-name="T2">Понятность и простота использования приложения.</text:span><text:span text:style-name="T2"/></text:p>
        </text:list-item>
        <text:list-item text:style-override="WWNum4">
          <text:p text:style-name="P20" loext:marker-style-name="T2"><text:span text:style-name="T2">Стабильность работы системы при взаимодействии пользователей с учебными материалами и заданиями.</text:span><text:span text:style-name="T2"/></text:p>
        </text:list-item>
      </text:list>
      <text:p text:style-name="P15" loext:marker-style-name="T2"><text:span text:style-name="T2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</text:span><text:span text:style-name="T2"/></text:p>
      <text:p text:style-name="P15" loext:marker-style-name="T2"><text:span text:style-name="T2">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span><text:span text:style-name="T2"/></text:p>
      <text:p text:style-name="P21" loext:marker-style-name="T1"/>
      <text:p text:style-name="P14" loext:marker-style-name="T2"><text:span text:style-name="T1">1.2. Описание предметной области</text:span><text:span text:style-name="T1"/></text:p>
      <text:p text:style-name="P22" loext:marker-style-name="T2"/>
      <text:p text:style-name="P15" loext:marker-style-name="T2"><text:span text:style-name="T2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</text:span><text:soft-page-break/><text:span text:style-name="T2">быстрого развития информационных технологий и роста потребности в ИТ-специалистах.</text:span><text:span text:style-name="T2"/></text:p>
      <text:p text:style-name="P15" loext:marker-style-name="T2"><text:span text:style-name="T2">Особенностью онлайн-обучения является высокая степень самостоятельности обучающихся. Пользователь самостоятельно планирует темп 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text:span text:style-name="T2"/></text:p>
      <text:p text:style-name="P15" loext:marker-style-name="T2"><text:span text:style-name="T2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span><text:span text:style-name="T2"/></text:p>
      <text:p text:style-name="P15" loext:marker-style-name="T2"><text:span text:style-name="T2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span><text:span text:style-name="T2"/></text:p>
      <text:p text:style-name="P15" loext:marker-style-name="T2"><text:span text:style-name="T2">Процесс обучения программированию предполагает активное взаимодействие обучающегося с программной средой. В ходе выполнения </text:span><text:soft-page-break/><text:span text:style-name="T2">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text:span text:style-name="T2"/></text:p>
      <text:p text:style-name="P15" loext:marker-style-name="T2"><text:span text:style-name="T2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span><text:span text:style-name="T2"/></text:p>
      <text:p text:style-name="P15" loext:marker-style-name="T2"><text:span text:style-name="T2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</text:span><text:span text:style-name="T2"/></text:p>
      <text:p text:style-name="P15" loext:marker-style-name="T2"><text:span text:style-name="T2">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span><text:span text:style-name="T2"/></text:p>
      <text:p text:style-name="P15" loext:marker-style-name="T2"><text:soft-page-break/><text:span text:style-name="T2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text:span text:style-name="T2"/></text:p>
      <text:p text:style-name="P15" loext:marker-style-name="T2"><text:span text:style-name="T2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</text:span><text:span text:style-name="T2"/></text:p>
      <text:p text:style-name="P15" loext:marker-style-name="T2"><text:span text:style-name="T2">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span><text:span text:style-name="T2"/></text:p>
      <text:p text:style-name="P15" loext:marker-style-name="T2"><text:span text:style-name="T2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</text:span><text:span text:style-name="T2"/></text:p>
      <text:p text:style-name="P15" loext:marker-style-name="T2"><text:span text:style-name="T2">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</text:span><text:soft-page-break/><text:span text:style-name="T2">реализация данных процессов является ключевым фактором успешного формирования практических навыков программирования в онлайн-среде.</text:span><text:span text:style-name="T2"/></text:p>
      <text:p text:style-name="P15" loext:marker-style-name="T2"><text:span text:style-name="T2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text:span text:style-name="T2"/></text:p>
      <text:p text:style-name="P15" loext:marker-style-name="T2"><text:span text:style-name="T2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</text:span><text:span text:style-name="T2"/></text:p>
      <text:p text:style-name="P15" loext:marker-style-name="T2"><text:span text:style-name="T2">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span><text:span text:style-name="T2"/></text:p>
      <text:p text:style-name="P15" loext:marker-style-name="T2"><text:span text:style-name="T2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</text:span><text:span text:style-name="T2"/></text:p>
      <text:p text:style-name="P15" loext:marker-style-name="T2"><text:soft-page-break/><text:span text:style-name="T2">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span><text:span text:style-name="T2"/></text:p>
      <text:p text:style-name="P15" loext:marker-style-name="T2"><text:span text:style-name="T2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</text:span><text:span text:style-name="T2"/></text:p>
      <text:p text:style-name="P15" loext:marker-style-name="T2"><text:span text:style-name="T2">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text:span text:style-name="T2"/></text:p>
      <text:p text:style-name="P15" loext:marker-style-name="T2"><text:span text:style-name="T2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</text:span><text:span text:style-name="T2"/></text:p>
      <text:p text:style-name="P15" loext:marker-style-name="T2"><text:span text:style-name="T2">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</text:span><text:soft-page-break/><text:span text:style-name="T2">практическому применению. Это снижает разрыв между теорией и практикой и способствует более осознанному усвоению материала.</text:span><text:span text:style-name="T2"/></text:p>
      <text:p text:style-name="P15" loext:marker-style-name="T2"><text:span text:style-name="T2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span><text:span text:style-name="T2"/></text:p>
      <text:p text:style-name="P15" loext:marker-style-name="T2"><text:span text:style-name="T2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text:span text:style-name="T2"/></text:p>
      <text:p text:style-name="P15" loext:marker-style-name="T2"><text:span text:style-name="T2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span><text:span text:style-name="T2"/></text:p>
      <text:p text:style-name="P15" loext:marker-style-name="T2"><text:span text:style-name="T15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2">архитектуре системы, которые будут рассмотрены в последующих главах работы.</text:span></text:p>
      <text:p text:style-name="P23" loext:marker-style-name="T1"/>
      <text:p text:style-name="P24" loext:marker-style-name="T1"><text:span text:style-name="T1">1.3.</text:span> <text:span text:style-name="T1">Техническое задание</text:span></text:p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5" loext:marker-style-name="T16"/>
      <text:p text:style-name="P26" loext:marker-style-name="T16"><text:span text:style-name="T16">Техническое задание на разработку программы</text:span><text:span text:style-name="T16"/></text:p>
      <text:p text:style-name="P26" loext:marker-style-name="T16"><text:span text:style-name="T16">«Десктопное приложение для онлайн-школы по программированию»</text:span><text:span text:style-name="T16"/></text:p>
      <text:p text:style-name="P27" loext:marker-style-name="T16"/>
      <text:p text:style-name="P24" loext:marker-style-name="T16"><text:span text:style-name="T16">Содержание</text:span><text:span text:style-name="T16"/></text:p>
      <text:list xml:id="list1653960552" text:style-name="WWNum9">
        <text:list-item text:start-value="1">
          <text:p text:style-name="P28" loext:marker-style-name="T4"><text:span text:style-name="T4">Введение</text:span><text:span text:style-name="T4"/></text:p>
          <text:list text:style-name="WWNum1">
            <text:list-item>
              <text:p text:style-name="P29" loext:marker-style-name="T4"><text:span text:style-name="T4">Основание для разработки</text:span><text:span text:style-name="T4"/></text:p>
            </text:list-item>
            <text:list-item>
              <text:p text:style-name="P29" loext:marker-style-name="T4"><text:span text:style-name="T4">Назначение и область применения</text:span><text:span text:style-name="T4"/></text:p>
            </text:list-item>
          </text:list>
        </text:list-item>
        <text:list-item text:style-override="WWNum1">
          <text:p text:style-name="P29" loext:marker-style-name="T4"><text:span text:style-name="T4">Требования к программе</text:span><text:span text:style-name="T4"/></text:p>
          <text:list text:style-name="WWNum1">
            <text:list-item>
              <text:p text:style-name="P29" loext:marker-style-name="T4"><text:span text:style-name="T4">Требования к функциональным характеристикам</text:span><text:span text:style-name="T4"/></text:p>
            </text:list-item>
            <text:list-item>
              <text:p text:style-name="P29" loext:marker-style-name="T4"><text:span text:style-name="T4">Требования к надёжности</text:span><text:span text:style-name="T4"/></text:p>
              <text:list>
                <text:list-item>
                  <text:p text:style-name="P29" loext:marker-style-name="T4"><text:span text:style-name="T4">Требования к обеспечению надёжного функционирования программы</text:span><text:span text:style-name="T4"/></text:p>
                </text:list-item>
                <text:list-item>
                  <text:p text:style-name="P29" loext:marker-style-name="T4"><text:span text:style-name="T4">Время восстановления после отказа</text:span><text:span text:style-name="T4"/></text:p>
                </text:list-item>
                <text:list-item>
                  <text:p text:style-name="P29" loext:marker-style-name="T4"><text:span text:style-name="T4">Отказы из-за некорректных действий пользовательской системы</text:span><text:span text:style-name="T4"/></text:p>
                </text:list-item>
              </text:list>
            </text:list-item>
          </text:list>
        </text:list-item>
        <text:list-item text:style-override="WWNum1">
          <text:p text:style-name="P29" loext:marker-style-name="T4"><text:span text:style-name="T4">Условия эксплуатации</text:span><text:span text:style-name="T4"/></text:p>
          <text:list text:style-name="WWNum1">
            <text:list-item>
              <text:p text:style-name="P29" loext:marker-style-name="T4"><text:span text:style-name="T4">Климатические условия эксплуатации</text:span><text:span text:style-name="T4"/></text:p>
            </text:list-item>
            <text:list-item>
              <text:p text:style-name="P29" loext:marker-style-name="T4"><text:span text:style-name="T4">Требования к квалификации и численности персонала</text:span><text:span text:style-name="T4"/></text:p>
            </text:list-item>
            <text:list-item>
              <text:p text:style-name="P29" loext:marker-style-name="T4"><text:span text:style-name="T4">Требования к составу и параметрам технических средств</text:span><text:span text:style-name="T4"/></text:p>
            </text:list-item>
            <text:list-item>
              <text:p text:style-name="P29" loext:marker-style-name="T4"><text:span text:style-name="T4">Требования к информационной и программной совместимости</text:span><text:span text:style-name="T4"/></text:p>
              <text:list>
                <text:list-item>
                  <text:p text:style-name="P29" loext:marker-style-name="T4"><text:span text:style-name="T4">Требования к информационным структурам и методам решения</text:span><text:span text:style-name="T4"/></text:p>
                </text:list-item>
                <text:list-item>
                  <text:p text:style-name="P29" loext:marker-style-name="T4"><text:span text:style-name="T4">Требования к исходным кодам и языкам программирования</text:span><text:span text:style-name="T4"/></text:p>
                </text:list-item>
                <text:list-item>
                  <text:p text:style-name="P29" loext:marker-style-name="T4"><text:span text:style-name="T4">Требования к программным средствам, используемым программой</text:span><text:span text:style-name="T4"/></text:p>
                </text:list-item>
                <text:list-item>
                  <text:p text:style-name="P29" loext:marker-style-name="T4"><text:span text:style-name="T4">Требования к защите информации и программ</text:span><text:span text:style-name="T4"/></text:p>
                </text:list-item>
              </text:list>
            </text:list-item>
            <text:list-item>
              <text:p text:style-name="P29" loext:marker-style-name="T4"><text:span text:style-name="T4">Специальные требования</text:span><text:span text:style-name="T4"/></text:p>
            </text:list-item>
          </text:list>
        </text:list-item>
        <text:list-item text:style-override="WWNum1">
          <text:p text:style-name="P29" loext:marker-style-name="T4"><text:span text:style-name="T4">Требования к программной документации</text:span><text:span text:style-name="T4"/></text:p>
          <text:list text:style-name="WWNum1">
            <text:list-item>
              <text:p text:style-name="P29" loext:marker-style-name="T4"><text:span text:style-name="T4">Состав программной документации</text:span><text:span text:style-name="T4"/></text:p>
            </text:list-item>
          </text:list>
        </text:list-item>
        <text:list-item text:style-override="WWNum1">
          <text:p text:style-name="P29" loext:marker-style-name="T4"><text:span text:style-name="T4">Технико-экономическое обоснование</text:span><text:span text:style-name="T4"/></text:p>
        </text:list-item>
        <text:list-item text:style-override="WWNum1">
          <text:p text:style-name="P29" loext:marker-style-name="T4"><text:span text:style-name="T4">Стадии и этапы разработки</text:span><text:span text:style-name="T4"/></text:p>
          <text:list text:style-name="WWNum1">
            <text:list-item>
              <text:p text:style-name="P29" loext:marker-style-name="T4"><text:span text:style-name="T4">Стадии разработки</text:span><text:span text:style-name="T4"/></text:p>
            </text:list-item>
            <text:list-item>
              <text:p text:style-name="P29" loext:marker-style-name="T4"><text:span text:style-name="T4">Этапы разработки</text:span><text:span text:style-name="T4"/></text:p>
            </text:list-item>
            <text:list-item>
              <text:p text:style-name="P29" loext:marker-style-name="T4"><text:span text:style-name="T4">Содержание работ по этапам</text:span><text:span text:style-name="T4"/></text:p>
            </text:list-item>
          </text:list>
        </text:list-item>
        <text:list-item text:style-override="WWNum1">
          <text:p text:style-name="P29" loext:marker-style-name="T4"><text:span text:style-name="T4">Порядок контроля и приемки</text:span><text:span text:style-name="T4"/></text:p>
          <text:list text:style-name="WWNum1">
            <text:list-item>
              <text:p text:style-name="P29" loext:marker-style-name="T4"><text:span text:style-name="T4">Предварительный контроль</text:span><text:span text:style-name="T4"/></text:p>
            </text:list-item>
            <text:list-item>
              <text:p text:style-name="P29" loext:marker-style-name="T4"><text:span text:style-name="T4">Тестирование</text:span><text:span text:style-name="T4"/></text:p>
            </text:list-item>
            <text:list-item>
              <text:p text:style-name="P29" loext:marker-style-name="T4"><text:span text:style-name="T4">Приёмка</text:span><text:span text:style-name="T4"/></text:p>
            </text:list-item>
          </text:list>
        </text:list-item>
      </text:list>
      <text:list xml:id="list453431196" text:style-name="WWNum10">
        <text:list-item text:start-value="1">
          <text:p text:style-name="P30" loext:marker-style-name="T16"><text:span text:style-name="T16">Введение</text:span><text:span text:style-name="T16"/></text:p>
          <text:list text:style-name="WWNum5">
            <text:list-item>
              <text:p text:style-name="P31" loext:marker-style-name="T16"><text:span text:style-name="T16">Основание для разработки</text:span><text:span text:style-name="T16"/></text:p>
              <text:list>
                <text:list-item>
                  <text:p text:style-name="P31" loext:marker-style-name="T4"><text:span text:style-name="T4">Наименование работы: «Десктопное приложение для онлайн-школы по программированию».</text:span><text:span text:style-name="T4"/></text:p>
                </text:list-item>
                <text:list-item>
                  <text:p text:style-name="P31" loext:marker-style-name="T4"><text:span text:style-name="T4">Основанием для разработки является задание на выпускную квалификационную работу.</text:span><text:span text:style-name="T4"/></text:p>
                </text:list-item>
                <text:list-item>
                  <text:p text:style-name="P31" loext:marker-style-name="T4"><text:span text:style-name="T4">Организация, утвердившая договор: Читинский Педагогический колледж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Назначение и область применения</text:span><text:span text:style-name="T16"/></text:p>
              <text:list>
                <text:list-item>
                  <text:p text:style-name="P31" loext:marker-style-name="T4"><text:span text:style-name="T4">Назначение разработки заключается в создании инструмента для обучения программированию, который объединяет теоретический материал и практические задания в одном приложении с безопасным выполнением кода пользователей.</text:span><text:span text:style-name="T4"/></text:p>
                </text:list-item>
                <text:list-item>
                  <text:p text:style-name="P31" loext:marker-style-name="T4"><text:span text:style-name="T4">Основные функциональные задачи приложения включают:</text:span><text:span text:style-name="T4"/></text:p>
                  <text:list>
                    <text:list-item>
                      <text:p text:style-name="P31" loext:marker-style-name="T4"><text:span text:style-name="T4">Просмотр теоретических материалов по темам программирования;</text:span><text:span text:style-name="T4"/></text:p>
                    </text:list-item>
                    <text:list-item>
                      <text:p text:style-name="P31" loext:marker-style-name="T4"><text:span text:style-name="T4">Выбор и выполнение практических заданий;</text:span><text:span text:style-name="T4"/></text:p>
                    </text:list-item>
                    <text:list-item>
                      <text:p text:style-name="P31" loext:marker-style-name="T4"><text:span text:style-name="T4">Редактирование и отправка кода на сервер для проверки;</text:span><text:span text:style-name="T4"/></text:p>
                    </text:list-item>
                    <text:list-item>
                      <text:p text:style-name="P31" loext:marker-style-name="T4"><text:span text:style-name="T4">Получение результатов выполнения и обратной связи;</text:span><text:span text:style-name="T4"/></text:p>
                    </text:list-item>
                    <text:list-item>
                      <text:p text:style-name="P31" loext:marker-style-name="T4"><text:span text:style-name="T4">Навигация по курсу обучения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2" loext:marker-style-name="T4"/>
      <text:list text:continue-list="list453431196" text:style-name="WWNum5">
        <text:list-item>
          <text:p text:style-name="P31" loext:marker-style-name="T16"><text:span text:style-name="T16">Требования к программе</text:span><text:span text:style-name="T16"/></text:p>
          <text:list>
            <text:list-item>
              <text:p text:style-name="P31" loext:marker-style-name="T16"><text:span text:style-name="T16">Требования к функциональным характеристикам</text:span><text:span text:style-name="T16"/></text:p>
              <text:list>
                <text:list-item>
                  <text:p text:style-name="P31" loext:marker-style-name="T4"><text:span text:style-name="T4">Работа с курсами и темами:</text:span><text:span text:style-name="T4"/></text:p>
                  <text:list>
                    <text:list-item>
                      <text:p text:style-name="P31" loext:marker-style-name="T4"><text:span text:style-name="T4">Возможность загрузки списка тем и заданий с сервера;</text:span><text:span text:style-name="T4"/></text:p>
                    </text:list-item>
                    <text:list-item>
                      <text:p text:style-name="P31" loext:marker-style-name="T4"><text:span text:style-name="T4">Постраничное отображение теоретического материала;</text:span><text:span text:style-name="T4"/></text:p>
                    </text:list-item>
                    <text:list-item>
                      <text:p text:style-name="P31" loext:marker-style-name="T4"><text:span text:style-name="T4">Отслеживание прогресса пользователя по темам и заданиям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Редактор кода:</text:span><text:span text:style-name="T4"/></text:p>
                  <text:list>
                    <text:list-item>
                      <text:p text:style-name="P31" loext:marker-style-name="T4"><text:span text:style-name="T4">Встроенный редактор с подсветкой синтаксиса;</text:span><text:span text:style-name="T4"/></text:p>
                    </text:list-item>
                    <text:list-item>
                      <text:p text:style-name="P31" loext:marker-style-name="T4"><text:span text:style-name="T4">Возможность редактирования, сохранения и отправки кода на сервер;</text:span><text:span text:style-name="T4"/></text:p>
                    </text:list-item>
                    <text:list-item>
                      <text:p text:style-name="P31" loext:marker-style-name="T4"><text:span text:style-name="T4">Поддержка нескольких языков программирования (в будущем)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Система проверки решений:</text:span><text:span text:style-name="T4"/></text:p>
                  <text:list>
                    <text:list-item>
                      <text:p text:style-name="P31" loext:marker-style-name="T4"><text:span text:style-name="T4">Выполнение пользовательского кода на сервере в изолированной среде Docker;</text:span><text:span text:style-name="T4"/></text:p>
                    </text:list-item>
                    <text:list-item>
                      <text:p text:style-name="P31" loext:marker-style-name="T4"><text:span text:style-name="T4">Контроль ресурсов: память, CPU, время выполнения;</text:span><text:span text:style-name="T4"/></text:p>
                    </text:list-item>
                    <text:list-item>
                      <text:p text:style-name="P31" loext:marker-style-name="T4"><text:span text:style-name="T4">Сравнение результатов с эталонными значениями;</text:span><text:span text:style-name="T4"/></text:p>
                    </text:list-item>
                    <text:list-item>
                      <text:p text:style-name="P31" loext:marker-style-name="T4"><text:span text:style-name="T4">Формирование обратной связи для пользователя.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31" loext:marker-style-name="T16"><text:span text:style-name="T16">Требования к надёжности</text:span><text:span text:style-name="T16"/></text:p>
              <text:list>
                <text:list-item>
                  <text:p text:style-name="P31" loext:marker-style-name="T4"><text:span text:style-name="T4">Требования к обеспечению надежного функционирования программы:</text:span><text:span text:style-name="T4"/></text:p>
                  <text:list>
                    <text:list-item>
                      <text:p text:style-name="P31" loext:marker-style-name="T4"><text:span text:style-name="T4">Программа должна продолжать функционировать при сбоях оборудования или сетевого соединения;</text:span><text:span text:style-name="T4"/></text:p>
                    </text:list-item>
                    <text:list-item>
                      <text:p text:style-name="P31" loext:marker-style-name="T4"><text:span text:style-name="T4">Обеспечение сохранности и конфиденциальности данных через аутентификацию и шифрование;</text:span><text:span text:style-name="T4"/></text:p>
                    </text:list-item>
                    <text:list-item>
                      <text:p text:style-name="P31" loext:marker-style-name="T4"><text:span text:style-name="T4">Интуитивно понятный и удобный интерфейс для пользователя без специальных навыков;</text:span><text:span text:style-name="T4"/></text:p>
                    </text:list-item>
                    <text:list-item>
                      <text:p text:style-name="P31" loext:marker-style-name="T4"><text:span text:style-name="T4">Простота сопровождения и расширяемость системы;</text:span><text:span text:style-name="T4"/></text:p>
                    </text:list-item>
                    <text:list-item>
                      <text:p text:style-name="P31" loext:marker-style-name="T4"><text:span text:style-name="T4">Корректное и стабильное выполнение всех функций;</text:span><text:span text:style-name="T4"/></text:p>
                    </text:list-item>
                    <text:list-item>
                      <text:p text:style-name="P31" loext:marker-style-name="T4"><text:span text:style-name="T4">Совместимость с другими программами и операционными системами, поддерживающими стандарты HTTP и JSON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Время восстановления после отказа:</text:span><text:span text:style-name="T4"/></text:p>
                  <text:list>
                    <text:list-item>
                      <text:p text:style-name="P31" loext:marker-style-name="T4"><text:span text:style-name="T4">При отказе клиентской программы восстановление возможно через перезапуск приложения;</text:span><text:span text:style-name="T4"/></text:p>
                    </text:list-item>
                    <text:list-item>
                      <text:p text:style-name="P31" loext:marker-style-name="T4"><text:span text:style-name="T4">При сбое серверной части восстановление может потребовать нескольких минут до нескольких часов в зависимости от характера ошибки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Отказы из-за некорректных действий пользователей системы</text:span><text:span text:style-name="T4"/></text:p>
                  <text:list>
                    <text:list-item>
                      <text:p text:style-name="P31" loext:marker-style-name="T4"><text:span text:style-name="T4">Некорректный ввод данных в редакторе кода вызывает уведомление об ошибке;</text:span><text:span text:style-name="T4"/></text:p>
                    </text:list-item>
                    <text:list-item>
                      <text:p text:style-name="P31" loext:marker-style-name="T4"><text:soft-page-break/><text:span text:style-name="T4">Попытка выполнения запрещённых действий или превышение прав доступа блокируется системой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2" loext:marker-style-name="T4"/>
      <text:list text:continue-numbering="true" text:style-name="WWNum5">
        <text:list-item>
          <text:p text:style-name="P31" loext:marker-style-name="T16"><text:span text:style-name="T16">Условия эксплуатации</text:span><text:span text:style-name="T16"/></text:p>
          <text:list>
            <text:list-item>
              <text:p text:style-name="P31" loext:marker-style-name="T16"><text:span text:style-name="T16">Климатические условия эксплуатации</text:span><text:span text:style-name="T16"/></text:p>
              <text:list>
                <text:list-item>
                  <text:p text:style-name="P31" loext:marker-style-name="T4"><text:span text:style-name="T4">Рабочая температура должна находиться в диапазоне от 10 до 35 градусов Цельсия;</text:span><text:span text:style-name="T4"/></text:p>
                </text:list-item>
                <text:list-item>
                  <text:p text:style-name="P31" loext:marker-style-name="T4"><text:span text:style-name="T4">Рабочая влажность должна быть в диапазоне от 30% до 80%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Требования к квалификации и численности персонала</text:span><text:span text:style-name="T16"/></text:p>
              <text:list>
                <text:list-item>
                  <text:p text:style-name="P31" loext:marker-style-name="T4"><text:span text:style-name="T4">Требований к квалификации или численности персонала не предъявляется. Программа рассчитана на пользователя без специальных навыков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Требования к составу и параметрам технических средств</text:span><text:span text:style-name="T16"/></text:p>
              <text:list>
                <text:list-item>
                  <text:p text:style-name="P31" loext:marker-style-name="T4"><text:span text:style-name="T4">ОС: Windows 10 или выше / Linux;</text:span><text:span text:style-name="T4"/></text:p>
                </text:list-item>
                <text:list-item>
                  <text:p text:style-name="P31" loext:marker-style-name="T4"><text:span text:style-name="T4">Процессор: Intel Core i3 или выше;</text:span><text:span text:style-name="T4"/></text:p>
                </text:list-item>
                <text:list-item>
                  <text:p text:style-name="P31" loext:marker-style-name="T4"><text:span text:style-name="T4">ОЗУ: минимум 4 ГБ;</text:span><text:span text:style-name="T4"/></text:p>
                </text:list-item>
                <text:list-item>
                  <text:p text:style-name="P31" loext:marker-style-name="T4"><text:span text:style-name="T4">Свободное место на диске: 500 МБ;</text:span><text:span text:style-name="T4"/></text:p>
                </text:list-item>
                <text:list-item>
                  <text:p text:style-name="P31" loext:marker-style-name="T4"><text:span text:style-name="T4">Интернет-соединение для синхронизации с сервером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Требования к информационной и программной совместимости</text:span><text:span text:style-name="T16"/></text:p>
              <text:list>
                <text:list-item>
                  <text:p text:style-name="P31" loext:marker-style-name="T4"><text:span text:style-name="T4">Требования к информационным структурам и методам решения:</text:span><text:span text:style-name="T4"/></text:p>
                  <text:list>
                    <text:list-item>
                      <text:p text:style-name="P31" loext:marker-style-name="T4"><text:span text:style-name="T4">Серверная часть использует базу данных для хранения информации о пользователях, курсах и заданиях;</text:span><text:span text:style-name="T4"/></text:p>
                    </text:list-item>
                    <text:list-item>
                      <text:p text:style-name="P31" loext:marker-style-name="T4"><text:span text:style-name="T4">Клиент работает с API сервера через HTTP-запросы и JSON-ответы;</text:span><text:span text:style-name="T4"/></text:p>
                    </text:list-item>
                    <text:list-item>
                      <text:p text:style-name="P31" loext:marker-style-name="T4"><text:span text:style-name="T4">Структура базы данных должна поддерживать хранение пользователей, ролей, курсов и результатов выполнения заданий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Требования к исходным кодам и языкам программирования:</text:span><text:span text:style-name="T4"/></text:p>
                  <text:list>
                    <text:list-item>
                      <text:p text:style-name="P31" loext:marker-style-name="T4"><text:span text:style-name="T4">Проект разрабатывается на C++ с использованием Qt Quick для клиента и PHP для сервера;</text:span><text:span text:style-name="T4"/></text:p>
                    </text:list-item>
                    <text:list-item>
                      <text:p text:style-name="P31" loext:marker-style-name="T4"><text:span text:style-name="T4">Код должен быть чистым, структурированным и документированным;</text:span><text:span text:style-name="T4"/></text:p>
                    </text:list-item>
                    <text:list-item>
                      <text:p text:style-name="P31" loext:marker-style-name="T4"><text:span text:style-name="T4">Поддержка open-source разработки (по согласованию)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Требования к программным средствам, используемым программой:</text:span><text:span text:style-name="T4"/></text:p>
                  <text:list>
                    <text:list-item>
                      <text:p text:style-name="P31" loext:marker-style-name="T4"><text:span text:style-name="T4">Поддержка ОС Windows и Linux;</text:span><text:span text:style-name="T4"/></text:p>
                    </text:list-item>
                    <text:list-item>
                      <text:p text:style-name="P31" loext:marker-style-name="T4"><text:span text:style-name="T4">Использование Docker для безопасного выполнения кода;</text:span><text:span text:style-name="T4"/></text:p>
                    </text:list-item>
                    <text:list-item>
                      <text:p text:style-name="P31" loext:marker-style-name="T4"><text:span text:style-name="T4">Интеграция с веб-сервером Apache/Nginx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Требования к защите информации и программ:</text:span><text:span text:style-name="T4"/></text:p>
                  <text:list>
                    <text:list-item>
                      <text:p text:style-name="P31" loext:marker-style-name="T4"><text:span text:style-name="T4">Система аутентификации пользователей с разграничением прав доступа;</text:span><text:span text:style-name="T4"/></text:p>
                    </text:list-item>
                    <text:list-item>
                      <text:p text:style-name="P31" loext:marker-style-name="T4"><text:span text:style-name="T4">Шифрование конфиденциальной информации;</text:span><text:span text:style-name="T4"/></text:p>
                    </text:list-item>
                    <text:list-item>
                      <text:p text:style-name="P31" loext:marker-style-name="T4"><text:span text:style-name="T4">Ограничение прав и ресурсов при выполнении кода;</text:span><text:span text:style-name="T4"/></text:p>
                    </text:list-item>
                    <text:list-item>
                      <text:p text:style-name="P31" loext:marker-style-name="T4"><text:span text:style-name="T4">Регулярные обновления программного обеспечения.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31" loext:marker-style-name="T16"><text:span text:style-name="T16">Специальные требования</text:span><text:span text:style-name="T16"/></text:p>
              <text:list>
                <text:list-item>
                  <text:p text:style-name="P31" loext:marker-style-name="T4"><text:span text:style-name="T4">Авторизация по логину и паролю;</text:span><text:span text:style-name="T4"/></text:p>
                </text:list-item>
                <text:list-item>
                  <text:p text:style-name="P31" loext:marker-style-name="T4"><text:span text:style-name="T4">Разграничение прав пользователей: студент, преподаватель, администратор;</text:span><text:span text:style-name="T4"/></text:p>
                </text:list-item>
                <text:list-item>
                  <text:p text:style-name="P31" loext:marker-style-name="T4"><text:span text:style-name="T4">Возможность редактирования только допустимых разделов;</text:span><text:span text:style-name="T4"/></text:p>
                </text:list-item>
                <text:list-item>
                  <text:p text:style-name="P31" loext:marker-style-name="T4"><text:span text:style-name="T4">Защита данных при передаче и хранении;</text:span><text:span text:style-name="T4"/></text:p>
                </text:list-item>
                <text:list-item>
                  <text:p text:style-name="P31" loext:marker-style-name="T4"><text:span text:style-name="T4">Регулярное обновление и поддержка системы.</text:span><text:span text:style-name="T4"/></text:p>
                </text:list-item>
              </text:list>
            </text:list-item>
          </text:list>
        </text:list-item>
      </text:list>
      <text:p text:style-name="P32" loext:marker-style-name="T4"/>
      <text:list text:continue-numbering="true" text:style-name="WWNum5">
        <text:list-item>
          <text:p text:style-name="P31" loext:marker-style-name="T16"><text:span text:style-name="T16">Требования к программной документации</text:span><text:span text:style-name="T16"/></text:p>
          <text:list>
            <text:list-item>
              <text:p text:style-name="P31" loext:marker-style-name="T16"><text:span text:style-name="T16">Состав программной документации</text:span><text:span text:style-name="T16"/></text:p>
              <text:list>
                <text:list-item>
                  <text:p text:style-name="P31" loext:marker-style-name="T4"><text:span text:style-name="T4">Техническое задание;</text:span><text:span text:style-name="T4"/></text:p>
                </text:list-item>
                <text:list-item>
                  <text:p text:style-name="P31" loext:marker-style-name="T4"><text:span text:style-name="T4">Руководство пользователя.</text:span><text:span text:style-name="T4"/></text:p>
                </text:list-item>
              </text:list>
            </text:list-item>
          </text:list>
        </text:list-item>
      </text:list>
      <text:p text:style-name="P32" loext:marker-style-name="T4"/>
      <text:list text:continue-numbering="true" text:style-name="WWNum5">
        <text:list-item>
          <text:p text:style-name="P31" loext:marker-style-name="T16"><text:span text:style-name="T16">Технико-экономическое обоснование</text:span><text:span text:style-name="T16"/></text:p>
          <text:list>
            <text:list-item>
              <text:p text:style-name="P31" loext:marker-style-name="T4"><text:span text:style-name="T4">Экономическая эффективность ориентировочно не рассчитывается из-за уникальности требований к проекту.</text:span><text:span text:style-name="T4"/></text:p>
            </text:list-item>
          </text:list>
        </text:list-item>
      </text:list>
      <text:p text:style-name="P32" loext:marker-style-name="T4"><text:soft-page-break/></text:p>
      <text:list text:continue-numbering="true" text:style-name="WWNum5">
        <text:list-item>
          <text:p text:style-name="P31" loext:marker-style-name="T16"><text:span text:style-name="T16">Стадии и этапы разработки</text:span><text:span text:style-name="T16"/></text:p>
          <text:list>
            <text:list-item>
              <text:p text:style-name="P31" loext:marker-style-name="T16"><text:span text:style-name="T16">Стадии разработки</text:span><text:span text:style-name="T16"/></text:p>
              <text:list>
                <text:list-item>
                  <text:p text:style-name="P31" loext:marker-style-name="T4"><text:span text:style-name="T4">Разработка технического задания;</text:span><text:span text:style-name="T4"/></text:p>
                </text:list-item>
                <text:list-item>
                  <text:p text:style-name="P31" loext:marker-style-name="T4"><text:span text:style-name="T4">Рабочее проектирование;</text:span><text:span text:style-name="T4"/></text:p>
                </text:list-item>
                <text:list-item>
                  <text:p text:style-name="P31" loext:marker-style-name="T4"><text:span text:style-name="T4">Внедрение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Этапы разработки</text:span><text:span text:style-name="T16"/></text:p>
              <text:list>
                <text:list-item>
                  <text:p text:style-name="P31" loext:marker-style-name="T4"><text:span text:style-name="T4">Разработка технического задания;</text:span><text:span text:style-name="T4"/></text:p>
                </text:list-item>
                <text:list-item>
                  <text:p text:style-name="P31" loext:marker-style-name="T4"><text:span text:style-name="T4">Разработка программы;</text:span><text:span text:style-name="T4"/></text:p>
                </text:list-item>
                <text:list-item>
                  <text:p text:style-name="P31" loext:marker-style-name="T4"><text:span text:style-name="T4">Разработка программной документации;</text:span><text:span text:style-name="T4"/></text:p>
                </text:list-item>
                <text:list-item>
                  <text:p text:style-name="P31" loext:marker-style-name="T4"><text:span text:style-name="T4">Испытания программы;</text:span><text:span text:style-name="T4"/></text:p>
                </text:list-item>
                <text:list-item>
                  <text:p text:style-name="P31" loext:marker-style-name="T4"><text:span text:style-name="T4">Подготовка и передача программы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Содержание работ по этапам</text:span><text:span text:style-name="T16"/></text:p>
              <text:list>
                <text:list-item>
                  <text:p text:style-name="P31" loext:marker-style-name="T4"><text:span text:style-name="T4">Разработка технического задания:</text:span><text:span text:style-name="T4"/></text:p>
                  <text:list>
                    <text:list-item>
                      <text:p text:style-name="P31" loext:marker-style-name="T4"><text:span text:style-name="T4">Постановка задачи;</text:span><text:span text:style-name="T4"/></text:p>
                    </text:list-item>
                    <text:list-item>
                      <text:p text:style-name="P31" loext:marker-style-name="T4"><text:span text:style-name="T4">Определение и уточнение требований к техническим средствам;</text:span><text:span text:style-name="T4"/></text:p>
                    </text:list-item>
                    <text:list-item>
                      <text:p text:style-name="P31" loext:marker-style-name="T4"><text:span text:style-name="T4">Определение требований к программе;</text:span><text:span text:style-name="T4"/></text:p>
                    </text:list-item>
                    <text:list-item>
                      <text:p text:style-name="P31" loext:marker-style-name="T4"><text:span text:style-name="T4">Определение стадий, этапов и сроков разработки программы и документации на неё;</text:span><text:span text:style-name="T4"/></text:p>
                    </text:list-item>
                    <text:list-item>
                      <text:p text:style-name="P31" loext:marker-style-name="T4"><text:span text:style-name="T4">Согласование и утверждение технического задания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Разработка программы:</text:span><text:span text:style-name="T4"/></text:p>
                  <text:list>
                    <text:list-item>
                      <text:p text:style-name="P31" loext:marker-style-name="T4"><text:span text:style-name="T4">Программирование;</text:span><text:span text:style-name="T4"/></text:p>
                    </text:list-item>
                    <text:list-item>
                      <text:p text:style-name="P31" loext:marker-style-name="T4"><text:span text:style-name="T4">Отладка программы.</text:span><text:span text:style-name="T4"/></text:p>
                    </text:list-item>
                    <text:list-item>
                      <text:p text:style-name="P31" loext:marker-style-name="T4"><text:span text:style-name="T4">Разработка программной документации:</text:span><text:span text:style-name="T4"/></text:p>
                      <text:list>
                        <text:list-item>
                          <text:p text:style-name="P31" loext:marker-style-name="T4"><text:span text:style-name="T4">Разработка программных документов в соответствии с требованиями к составу документации.</text:span><text:span text:style-name="T4"/></text:p>
                        </text:list-item>
                      </text:list>
                    </text:list-item>
                  </text:list>
                </text:list-item>
                <text:list-item>
                  <text:p text:style-name="P31" loext:marker-style-name="T4"><text:span text:style-name="T4">Испытаний программы:</text:span><text:span text:style-name="T4"/></text:p>
                  <text:list>
                    <text:list-item>
                      <text:p text:style-name="P31" loext:marker-style-name="T4"><text:span text:style-name="T4">Разработка, согласование и утверждение и методики испытаний;</text:span><text:span text:style-name="T4"/></text:p>
                    </text:list-item>
                    <text:list-item>
                      <text:p text:style-name="P31" loext:marker-style-name="T4"><text:span text:style-name="T4"><text:s/>Проведение приемо-сдаточных испытаний;</text:span><text:span text:style-name="T4"/></text:p>
                    </text:list-item>
                    <text:list-item>
                      <text:p text:style-name="P31" loext:marker-style-name="T4"><text:span text:style-name="T4">Корректировка программы и программной документации по результатам испытаний.</text:span><text:span text:style-name="T4"/></text:p>
                    </text:list-item>
                  </text:list>
                </text:list-item>
                <text:list-item>
                  <text:p text:style-name="P31" loext:marker-style-name="T4"><text:span text:style-name="T4">Подготовка и передача программы:</text:span><text:span text:style-name="T4"/></text:p>
                  <text:list>
                    <text:list-item>
                      <text:p text:style-name="P31" loext:marker-style-name="T4"><text:span text:style-name="T4">Работа по подготовке и передаче программы и программной документации в эксплуатацию на объектах Заказчика.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3" loext:marker-style-name="T4"/>
      <text:list text:continue-numbering="true" text:style-name="WWNum5">
        <text:list-item>
          <text:p text:style-name="P31" loext:marker-style-name="T16"><text:span text:style-name="T16">Порядок контроля и приемки</text:span><text:span text:style-name="T16"/></text:p>
          <text:list>
            <text:list-item>
              <text:p text:style-name="P31" loext:marker-style-name="T16"><text:span text:style-name="T16">Предварительный контроль</text:span><text:span text:style-name="T16"/></text:p>
              <text:list>
                <text:list-item>
                  <text:p text:style-name="P31" loext:marker-style-name="T4"><text:span text:style-name="T4">Проверка соответствия функциональности приложения требованиям технического задания. Контроль качества кода и отсутствия ошибок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Тестирование</text:span><text:span text:style-name="T16"/></text:p>
              <text:list>
                <text:list-item>
                  <text:p text:style-name="P31" loext:marker-style-name="T4"><text:span text:style-name="T4">Проверка всех основных функций приложения;</text:span><text:span text:style-name="T4"/></text:p>
                </text:list-item>
                <text:list-item>
                  <text:p text:style-name="P31" loext:marker-style-name="T4"><text:span text:style-name="T4">Проверка стабильности работы приложения при различных нагрузках;</text:span><text:span text:style-name="T4"/></text:p>
                </text:list-item>
                <text:list-item>
                  <text:p text:style-name="P31" loext:marker-style-name="T4"><text:span text:style-name="T4">Проверка защиты данных пользователей.</text:span><text:span text:style-name="T4"/></text:p>
                </text:list-item>
              </text:list>
            </text:list-item>
            <text:list-item>
              <text:p text:style-name="P31" loext:marker-style-name="T16"><text:span text:style-name="T16">Приёмка</text:span><text:span text:style-name="T16"/></text:p>
              <text:list>
                <text:list-item>
                  <text:p text:style-name="P31" loext:marker-style-name="T4"><text:span text:style-name="T4">Проверка соответствия приложения требованиям безопасности и конфиденциальности данных;</text:span><text:span text:style-name="T4"/></text:p>
                </text:list-item>
                <text:list-item>
                  <text:p text:style-name="P31" loext:marker-style-name="T4"><text:span text:style-name="T4">Проверка оформления приложения в соответствии с корпоративным стилем компании;</text:span><text:span text:style-name="T4"/></text:p>
                </text:list-item>
                <text:list-item>
                  <text:p text:style-name="P31" loext:marker-style-name="T4"><text:span text:style-name="T4">Утверждение результатов тестирования.</text:span><text:span text:style-name="T4"/></text:p>
                </text:list-item>
              </text:list>
            </text:list-item>
          </text:list>
        </text:list-item>
      </text:list>
      <text:p text:style-name="P34" loext:marker-style-name="T2"/>
      <text:p text:style-name="P35" loext:marker-style-name="T1"><text:span text:style-name="T1">2. ПРОЕКТНАЯ ЧАСТЬ</text:span><text:span text:style-name="T1"/></text:p>
      <text:p text:style-name="P22"/>
      <text:p text:style-name="P14"><text:span text:style-name="T1">2.1. Проектирование программного продукта</text:span></text:p>
      <text:p text:style-name="P36"/>
      <text:p text:style-name="P37">Разрабатываемое приложение предназначено для поддержки процесса обучения программированию в формате онлайн-школы. Продукт обеспечивает:</text:p>
      <text:list text:style-name="L1">
        <text:list-item>
          <text:p text:style-name="P38">просмотр курсов (языков программирования), уроков (тем), теоретических материалов;</text:p>
        </text:list-item>
        <text:list-item>
          <text:p text:style-name="P38">выполнение практических заданий внутри приложения;</text:p>
        </text:list-item>
        <text:list-item>
          <text:p text:style-name="P38">отправку решений на сервер, запуск кода и проверку по автоматическим тестам;</text:p>
        </text:list-item>
        <text:list-item>
          <text:p text:style-name="P38">авторизацию пользователя и хранение прогресса.</text:p>
        </text:list-item>
      </text:list>
      <text:p text:style-name="P37">Программный продукт построен по клиент‑серверной архитектуре и состоит из следующих компонентов:</text:p>
      <text:list text:style-name="L2">
        <text:list-item>
          <text:p text:style-name="P39">Клиентское приложение: десктопное приложение на Qt + QML (Qt Quick Controls) с С++ модулем доступа к API;</text:p>
        </text:list-item>
        <text:list-item>
          <text:p text:style-name="P39">Серверная часть (API): набор PHP‑скриптов, предоставляющих HTTP‑интерфейс для клиента;</text:p>
        </text:list-item>
        <text:list-item>
          <text:p text:style-name="P39">База данных: схема и стартовые данные (курсы, темы, задания, тесты).</text:p>
        </text:list-item>
      </text:list>
      <text:p text:style-name="P37">Клиентская часть реализована на Qt с использованием QML‑интерфейсов и навигации через стек страниц. Основные особенности:</text:p>
      <text:list text:style-name="L3">
        <text:list-item>
          <text:p text:style-name="P40">единое окно приложения с пользовательской панелью заголовка и областью контента;</text:p>
        </text:list-item>
        <text:list-item>
          <text:p text:style-name="P40">навигация между страницами («Курсы» → «Уроки» → «Теория» → «Задание») через StackView;</text:p>
        </text:list-item>
        <text:list-item>
          <text:p text:style-name="P40">получение данных (курсы/темы/теория/задания) из API и отображение в виде списков и карточек;</text:p>
        </text:list-item>
        <text:list-item>
          <text:p text:style-name="P40">встроенный редактор кода и блоки для запуска/проверки решения.</text:p>
        </text:list-item>
      </text:list>
      <text:p text:style-name="P37">Также в приложении предусмотрена роль преподавателя (панель учителя), позволяющая создавать курсы, темы, задания и тесты через API.</text:p>
      <text:p text:style-name="P37"><text:soft-page-break/>Сервер реализован на PHP и предоставляет отдельные конечные точки для функций приложения:</text:p>
      <text:list text:style-name="L4">
        <text:list-item>
          <text:p text:style-name="P41">авторизация и управление сессией: login.php, signup.php, recover_password.php;</text:p>
        </text:list-item>
        <text:list-item>
          <text:p text:style-name="P41">получение учебного контента: languages.php, themes.php, theory.php, tasks.php, task.php, progress.php;</text:p>
        </text:list-item>
        <text:list-item>
          <text:p text:style-name="P41">выполнение и проверка кода: run_task.php, check_task.php;</text:p>
        </text:list-item>
        <text:list-item>
          <text:p text:style-name="P41">функции преподавателя (создание контента): create_language.php, create_theme.php, create_task.php, create_test.php.</text:p>
        </text:list-item>
      </text:list>
      <text:p text:style-name="P37">Выполнение кода организовано через временный каталог на сервере:</text:p>
      <text:list text:style-name="L5">
        <text:list-item>
          <text:p text:style-name="P42">исходный код сохраняется в файле с соответствующим расширением;</text:p>
        </text:list-item>
        <text:list-item>
          <text:p text:style-name="P42">для компилируемых языков запускается компиляция с ограничением по времени;</text:p>
        </text:list-item>
        <text:list-item>
          <text:p text:style-name="P42">запуск выполняется с ограничением по времени, входные данные передаются через <text:span text:style-name="T17">стандартный вход</text:span>;</text:p>
        </text:list-item>
        <text:list-item>
          <text:p text:style-name="P42">вывод программы сравнивается с ожидаемым (для проверки по тестам).</text:p>
        </text:list-item>
      </text:list>
      <text:p text:style-name="P37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</text:p>
      <text:p text:style-name="P37">База данных хранит учебный контент, пользователей и результаты обучения. Основные сущности:</text:p>
      <text:list text:style-name="L6">
        <text:list-item>
          <text:p text:style-name="P43">users: пользователи (логин, хэш пароля, роль);</text:p>
        </text:list-item>
        <text:list-item>
          <text:p text:style-name="P43">sessions: сессии авторизации (bearer‑токен с временем жизни);</text:p>
        </text:list-item>
        <text:list-item>
          <text:p text:style-name="P43">languages: курсы по языкам программирования (название, описание, изображение);</text:p>
        </text:list-item>
        <text:list-item>
          <text:p text:style-name="P43">themes: темы/уроки, привязанные к языку (lang_id), и теоретический материал;</text:p>
        </text:list-item>
        <text:list-item>
          <text:p text:style-name="P43">tasks: практические задания, привязанные к теме (theme_id);</text:p>
        </text:list-item>
        <text:list-item>
          <text:p text:style-name="P43"><text:soft-page-break/>task_tests: набор тестов для задания (вход/ожидаемый вывод);</text:p>
        </text:list-item>
        <text:list-item>
          <text:p text:style-name="P43">user_theme_progress, user_task_solved: прогресс прохождения тем и решённых заданий.</text:p>
        </text:list-item>
      </text:list>
      <text:p text:style-name="P37">Такая структура позволяет расширять систему: добавлять новые языки, темы и задания без изменения логики клиента.</text:p>
      <text:p text:style-name="P37">При проектировании интерфейса был сделан акцент на следующих принципах:</text:p>
      <text:list text:style-name="L7">
        <text:list-item>
          <text:p text:style-name="P44">видимость контента: увеличенные шрифты и размеры элементов управления для более комфортного чтения теории и заданий;</text:p>
        </text:list-item>
        <text:list-item>
          <text:p text:style-name="P44">последовательная навигация: пользователь всегда понимает, где находится, и может вернуться на шаг назад;</text:p>
        </text:list-item>
        <text:list-item>
          <text:p text:style-name="P44">разделение теории и практики: теория отображается отдельной страницей, задания — отдельной страницей с редактором;</text:p>
        </text:list-item>
        <text:list-item>
          <text:p text:style-name="P44">оперативная обратная связь: после запуска кода и проверки по тестам пользователь получает статус выполнения.</text:p>
        </text:list-item>
      </text:list>
      <text:p text:style-name="P45"/>
      <text:p text:style-name="P46">2.2. Руководство пользователя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18">Д</text:span>есктопно<text:span text:style-name="T18">е </text:span>приложени<text:span text:style-name="T18">е</text:span> для онлайн-школы по программированию</text:p>
      <text:p text:style-name="P49">Руководство пользователя</text:p>
      <text:p text:style-name="P49">Версия 1.0 </text:p>
      <text:p text:style-name="P49">2026 год</text:p>
      <text:p text:style-name="P50">СОДЕРЖАНИЕ</text:p>
      <text:p text:style-name="P51"/>
      <text:p text:style-name="P52">1. Введение</text:p>
      <text:p text:style-name="P52">2. Общие сведения о программе<text:tab/></text:p>
      <text:p text:style-name="P52">3. Рекомендуемый первичный порядок действий</text:p>
      <text:p text:style-name="P53"><text:tab/>3.1 Установка продукта</text:p>
      <text:p text:style-name="P53"><text:tab/>3.2 Открытие продукта</text:p>
      <text:p text:style-name="P53"><text:tab/>3.3 Установка приложения на <text:span text:style-name="T18">ПК</text:span></text:p>
      <text:p text:style-name="P52">4. Работа программы</text:p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  <style:text-properties style:letter-kerning="false"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letter-kerning="false"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2</text:page-number></text:span></text:p>
      </style:footer>
      <style:footer-first>
        <text:h text:style-name="MP2" text:outline-level="2" loext:marker-style-name="MT1"><text:span text:style-name="MT1">Чита, 2026</text:span><text:span text:style-name="MT1"/>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12T11:04:29.432095825</dc:date>
    <meta:editing-cycles>117</meta:editing-cycles>
    <meta:editing-duration>P2DT2H36M32S</meta:editing-duration>
    <meta:generator>LibreOffice/25.8.6.2$Linux_X86_64 LibreOffice_project/580$Build-2</meta:generator>
    <meta:document-statistic meta:table-count="1" meta:image-count="0" meta:object-count="0" meta:page-count="22" meta:paragraph-count="300" meta:word-count="3354" meta:character-count="29267" meta:non-whitespace-character-count="26223"/>
    <meta:user-defined meta:name="AppVersion">15.0000</meta:user-defined>
    <meta:template xlink:type="simple" xlink:actuate="onRequest" xlink:title="Normal.dotm" xlink:href=""/>
  </office:meta>
</office:document-meta>
</file>