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3000003F4C418C31F.png" manifest:media-type="image/png"/>
  <manifest:file-entry manifest:full-path="Pictures/10000001000005E3000003F40E1DBFF7.png" manifest:media-type="image/png"/>
  <manifest:file-entry manifest:full-path="Pictures/10000001000005E3000003F484B186BF.png" manifest:media-type="image/png"/>
  <manifest:file-entry manifest:full-path="Pictures/10000001000005E3000003F4DE5E6B60.png" manifest:media-type="image/png"/>
  <manifest:file-entry manifest:full-path="Pictures/10000001000005E3000003F416332F05.png" manifest:media-type="image/png"/>
  <manifest:file-entry manifest:full-path="Pictures/10000001000005E3000003F465AC5D0C.png" manifest:media-type="image/png"/>
  <manifest:file-entry manifest:full-path="Pictures/10000001000005E3000003F421C42F62.png" manifest:media-type="image/png"/>
  <manifest:file-entry manifest:full-path="Pictures/10000001000005E3000003F4E19DD676.png" manifest:media-type="image/png"/>
  <manifest:file-entry manifest:full-path="Pictures/10000001000006040000041F50745D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6.9cm" fo:margin-left="10.123cm" table:align="left" style:writing-mode="lr-tb"/>
    </style:style>
    <style:style style:name="Table5.A" style:family="table-column">
      <style:table-column-properties style:column-width="6.9cm"/>
    </style:style>
    <style:style style:name="Table5.A1" style:family="table-cell">
      <style:table-cell-properties fo:padding="0.097cm" fo:border="none"/>
    </style:style>
    <style:style style:name="Table5.7" style:family="table-row">
      <style:table-row-properties style:min-row-height="0.423cm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5.894cm" style:rel-column-width="61271*"/>
    </style:style>
    <style:style style:name="Table2.B" style:family="table-column">
      <style:table-column-properties style:column-width="1.106cm" style:rel-column-width="4264*"/>
    </style:style>
    <style:style style:name="Table2.A1" style:family="table-cell">
      <style:table-cell-properties fo:padding="0.097cm" fo:border="none"/>
    </style:style>
    <style:style style:name="Table2.B3" style:family="table-cell" style:data-style-name="N0">
      <style:table-cell-properties fo:padding="0.097cm" fo:border="none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5.666cm" style:rel-column-width="21840*"/>
    </style:style>
    <style:style style:name="Table4.B" style:family="table-column">
      <style:table-column-properties style:column-width="5.667cm" style:rel-column-width="21847*"/>
    </style:style>
    <style:style style:name="Table4.C" style:family="table-column">
      <style:table-column-properties style:column-width="5.667cm" style:rel-column-width="21848*"/>
    </style:style>
    <style:style style:name="Table4.A1" style:family="table-cell">
      <style:table-cell-properties fo:padding="0.097cm" fo:border="none"/>
    </style:style>
    <style:style style:name="Table4.A2" style:family="table-cell">
      <style:table-cell-properties fo:padding="0.097cm" fo:border-left="none" fo:border-right="none" fo:border-top="none" fo:border-bottom="1.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15.894cm" style:rel-column-width="61271*"/>
    </style:style>
    <style:style style:name="Table3.B" style:family="table-column">
      <style:table-column-properties style:column-width="1.106cm" style:rel-column-width="4264*"/>
    </style:style>
    <style:style style:name="Table3.A1" style:family="table-cell">
      <style:table-cell-properties fo:padding="0.097cm" fo:border="none"/>
    </style:style>
    <style:style style:name="Table3.B3" style:family="table-cell" style:data-style-name="N0">
      <style:table-cell-properties fo:padding="0.097cm" fo:border="none"/>
    </style:style>
    <style:style style:name="P1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officeooo:paragraph-rsid="000f53be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officeooo:rsid="001f9141" officeooo:paragraph-rsid="001f9141" style:font-size-asian="14pt" style:font-name-complex="Times New Roman1" style:font-size-complex="14pt"/>
    </style:style>
    <style:style style:name="P3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4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style:font-size-asian="14pt" style:font-style-asian="normal" style:font-name-complex="Times New Roman1" style:font-size-complex="14pt" style:font-style-complex="normal"/>
    </style:style>
    <style:style style:name="P6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d1e9e" officeooo:paragraph-rsid="001d1e9e" style:font-size-asian="12pt" style:font-size-complex="12pt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Times New Roman" fo:font-size="12pt" officeooo:rsid="001d1e9e" officeooo:paragraph-rsid="001d1e9e" style:font-size-asian="12pt" style:font-size-complex="12pt"/>
    </style:style>
    <style:style style:name="P1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text-position="super 58%" style:font-name="Times New Roman" fo:font-size="12pt" officeooo:rsid="001d1e9e" officeooo:paragraph-rsid="001d1e9e" style:font-size-asian="12pt" style:font-size-complex="12pt"/>
    </style:style>
    <style:style style:name="P11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e55c6" officeooo:paragraph-rsid="001e55c6" style:font-size-asian="12pt" style:font-size-complex="12pt"/>
    </style:style>
    <style:style style:name="P12" style:family="paragraph" style:parent-style-name="Table_20_Contents">
      <style:paragraph-properties fo:margin-top="0cm" fo:margin-bottom="0cm" style:contextual-spacing="false" fo:line-height="100%"/>
      <style:text-properties style:font-name="Times New Roman" fo:font-size="12pt" officeooo:rsid="001e55c6" officeooo:paragraph-rsid="003ae849" style:font-size-asian="12pt" style:font-size-complex="12pt"/>
    </style:style>
    <style:style style:name="P1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text-position="super 58%" style:font-name="Times New Roman" fo:font-size="12pt" officeooo:rsid="001d1e9e" officeooo:paragraph-rsid="003ae849" style:font-size-asian="12pt" style:font-size-complex="12pt"/>
    </style:style>
    <style:style style:name="P14" style:family="paragraph" style:parent-style-name="Contents_20_Heading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15" style:family="paragraph" style:parent-style-name="Contents_20_Heading">
      <style:paragraph-properties fo:margin-top="0cm" fo:margin-bottom="0cm" style:contextual-spacing="false" fo:line-height="100%" fo:text-align="center" style:justify-single-word="false" fo:break-before="pag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16" style:family="paragraph" style:parent-style-name="Contents_20_1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 style:parent-style-name="Contents_20_1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paragraph-rsid="00298290" style:letter-kerning="false" style:font-name-asian="Calibri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rsid="002fade3" officeooo:paragraph-rsid="002fade3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ontents_20_2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Times New Roman" fo:font-size="14pt" fo:language="ru" fo:country="RU" officeooo:paragraph-rsid="00493eda" style:letter-kerning="false" style:font-name-asian="Calibri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Contents_20_2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Times New Roman" fo:font-size="14pt" fo:language="ru" fo:country="RU" officeooo:paragraph-rsid="001e55c6" style:letter-kerning="false" style:font-name-asian="Calibri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rsid="00397280" officeooo:paragraph-rsid="00397280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Contents_20_1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column" loext:hyphenation-keep-line="true" fo:text-indent="0cm" style:auto-text-indent="false" style:writing-mode="lr-tb"/>
      <style:text-properties style:use-window-font-color="true" loext:opacity="0%" style:font-name="Times New Roman" fo:font-size="14pt" fo:language="ru" fo:country="RU" officeooo:paragraph-rsid="001e55c6" style:font-name-asian="Calibri1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List_20_Paragraph">
      <style:paragraph-properties fo:margin-left="0cm" fo:margin-top="0cm" fo:margin-bottom="0cm" style:contextual-spacing="false" fo:line-height="100%" fo:text-align="center" style:justify-single-word="false" fo:text-indent="1.251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officeooo:paragraph-rsid="00135c9d" style:font-size-asian="14pt" style:font-name-complex="Times New Roman1" style:font-size-complex="14pt">
        <loext:char-complex-color loext:theme-type="dark1" loext:color-type="theme"/>
      </style:text-properties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/>
    </style:style>
    <style:style style:name="P30" style:family="paragraph" style:parent-style-name="List_20_Paragraph" style:list-style-name="WWNum7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List_20_Paragraph" style:list-style-name="WWNum3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List_20_Paragraph" style:list-style-name="WWNum2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33" style:family="paragraph" style:parent-style-name="List_20_Paragraph" style:list-style-name="WWNum8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List_20_Paragraph" style:list-style-name="WWNum4">
      <style:paragraph-properties fo:margin-left="0cm" fo:margin-top="0cm" fo:margin-bottom="0cm" style:contextual-spacing="true" fo:line-height="150%" fo:text-align="justify" style:justify-single-word="false" fo:hyphenation-ladder-count="no-limit" fo:hyphenation-keep="auto" loext:hyphenation-keep-type="column" loext:hyphenation-keep-line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">
      <style:paragraph-properties fo:margin-top="0cm" fo:margin-bottom="0cm" style:contextual-spacing="false" fo:line-height="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officeooo:paragraph-rsid="001015cf"/>
    </style:style>
    <style:style style:name="P3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fo:font-weight="bold" officeooo:paragraph-rsid="001015cf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 fo:break-before="pag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3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4" style:family="paragraph" style:parent-style-name="List_20_Paragraph" style:list-style-name="WWNum1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5" style:family="paragraph" style:parent-style-name="List_20_Paragraph" style:list-style-name="WWNum10">
      <style:paragraph-properties fo:margin-top="0cm" fo:margin-bottom="0cm" style:contextual-spacing="true" fo:line-height="100%" fo:text-align="justify" style:justify-single-word="false" fo:break-before="pag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6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7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8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9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52" style:family="paragraph" style:parent-style-name="List_20_Paragraph">
      <style:paragraph-properties fo:margin-left="0cm" fo:margin-top="0cm" fo:margin-bottom="0cm" style:contextual-spacing="tru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5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rsid="001932d6" officeooo:paragraph-rsid="001932d6" style:font-size-asian="12pt" style:font-size-complex="12pt"/>
    </style:style>
    <style:style style:name="P5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6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7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8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135c9d" style:font-size-asian="14pt" style:font-weight-asian="normal" style:font-name-complex="Times New Roman1" style:font-size-complex="14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fo:break-before="page" loext:word-spacing-minimum="75%" loext:word-spacing-maximum="133%"/>
      <style:text-properties style:font-name="Times New Roman" fo:font-size="14pt" fo:font-weight="bold" officeooo:paragraph-rsid="000d01d4" style:font-size-asian="14pt" style:font-weight-asian="bold" style:font-name-complex="Times New Roman1" style:font-size-complex="14pt" style:font-weight-complex="bold"/>
    </style:style>
    <style:style style:name="P6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0d01d4" style:font-size-asian="14pt" style:font-weight-asian="bold" style:font-name-complex="Times New Roman1" style:font-size-complex="14pt" style:font-weight-complex="bold"/>
    </style:style>
    <style:style style:name="P6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d01d4" style:font-size-asian="14pt" style:font-weight-asian="normal" style:font-name-complex="Times New Roman1" style:font-size-complex="14pt" style:font-weight-complex="normal"/>
    </style:style>
    <style:style style:name="P6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63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5" style:family="paragraph" style:parent-style-name="Standard">
      <style:paragraph-properties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66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officeooo:paragraph-rsid="00235878" style:font-size-asian="14pt" style:font-weight-asian="bold" style:font-name-complex="Times New Roman1" style:font-size-complex="14pt" style:font-weight-complex="bold"/>
    </style:style>
    <style:style style:name="P67" style:family="paragraph" style:parent-style-name="Table_20_Contents">
      <style:paragraph-properties fo:margin-left="0cm" fo:margin-top="0cm" fo:margin-bottom="0cm" style:contextual-spacing="false" fo:line-height="100%"/>
      <style:text-properties style:font-name="Times New Roman" fo:font-size="14pt" officeooo:rsid="00152f05" officeooo:paragraph-rsid="00152f05" style:font-size-asian="14pt" style:font-size-complex="14pt"/>
    </style:style>
    <style:style style:name="P68" style:family="paragraph" style:parent-style-name="Table_20_Contents">
      <style:paragraph-properties fo:margin-left="0cm" fo:margin-top="0cm" fo:margin-bottom="0cm" style:contextual-spacing="false" fo:line-height="100%"/>
      <style:text-properties style:font-name="Times New Roman" fo:font-size="14pt" officeooo:rsid="002fade3" officeooo:paragraph-rsid="002fade3" style:font-size-asian="14pt" style:font-size-complex="14pt"/>
    </style:style>
    <style:style style:name="P69" style:family="paragraph" style:parent-style-name="Standard">
      <style:paragraph-properties fo:margin-left="0cm" fo:margin-top="0cm" fo:margin-bottom="0cm" style:contextual-spacing="false" fo:line-height="100%" fo:orphans="2" fo:widows="2" fo:hyphenation-ladder-count="no-limit" fo:hyphenation-keep="page" loext:hyphenation-keep-type="column" loext:hyphenation-keep-line="true" fo:text-indent="1.251cm" style:auto-text-indent="false" style:writing-mode="lr-tb"/>
      <style:text-properties style:use-window-font-color="true" loext:opacity="0%" style:font-name="Times New Roman" fo:font-size="14pt" fo:language="ru" fo:country="RU" officeooo:paragraph-rsid="004be3b8" style:font-name-asian="Calibri1" style:font-size-asian="14pt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Table_20_Contents">
      <style:paragraph-properties fo:margin-left="0cm" fo:margin-top="0cm" fo:margin-bottom="0cm" style:contextual-spacing="false" fo:line-height="100%" fo:text-indent="0cm" style:auto-text-indent="false"/>
      <style:text-properties style:font-name="Times New Roman" fo:font-size="14pt" officeooo:rsid="002fade3" officeooo:paragraph-rsid="002fade3" style:font-size-asian="14pt" style:font-size-complex="14pt"/>
    </style:style>
    <style:style style:name="P71" style:family="paragraph" style:parent-style-name="Table_20_Contents">
      <style:paragraph-properties fo:margin-left="0cm" fo:margin-top="0cm" fo:margin-bottom="0cm" style:contextual-spacing="false" fo:line-height="100%"/>
      <style:text-properties style:font-name="Times New Roman" fo:font-size="14pt" officeooo:rsid="00397280" officeooo:paragraph-rsid="00397280" style:font-size-asian="14pt" style:font-size-complex="14pt"/>
    </style:style>
    <style:style style:name="P72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officeooo:paragraph-rsid="00152f05" style:font-size-asian="14pt" style:font-weight-asian="bold" style:font-name-complex="Times New Roman1" style:font-size-complex="14pt" style:font-weight-complex="bold"/>
    </style:style>
    <style:style style:name="P73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rsid="000ee979" officeooo:paragraph-rsid="000ee979" style:font-size-asian="14pt" style:font-weight-asian="bold" style:font-name-complex="Times New Roman1" style:font-size-complex="14pt" style:font-weight-complex="bold"/>
    </style:style>
    <style:style style:name="P7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135c9d" style:font-size-asian="14pt" style:font-weight-asian="normal" style:font-name-complex="Times New Roman1" style:font-size-complex="14pt" style:font-weight-complex="normal"/>
    </style:style>
    <style:style style:name="P7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6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77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8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79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80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81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0ee979" style:font-size-asian="14pt" style:font-weight-asian="bold" style:font-name-complex="Times New Roman1" style:font-size-complex="14pt" style:font-weight-complex="bold"/>
    </style:style>
    <style:style style:name="P8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0ee979" style:font-size-asian="14pt" style:font-weight-asian="normal" style:font-name-complex="Times New Roman1" style:font-size-complex="14pt" style:font-weight-complex="normal"/>
    </style:style>
    <style:style style:name="P83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normal" officeooo:paragraph-rsid="0035a6b1" style:font-size-asian="14pt" style:font-weight-asian="normal" style:font-name-complex="Times New Roman1" style:font-size-complex="14pt" style:font-weight-complex="normal"/>
    </style:style>
    <style:style style:name="P84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fo:font-weight="normal" officeooo:rsid="003329bb" officeooo:paragraph-rsid="0035a6b1" style:font-size-asian="12pt" style:font-weight-asian="normal" style:font-name-complex="Times New Roman1" style:font-size-complex="12pt" style:font-weight-complex="normal"/>
    </style:style>
    <style:style style:name="P85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style:text-underline-style="none" fo:font-weight="bold" officeooo:paragraph-rsid="000ee979" style:font-size-asian="14pt" style:font-weight-asian="bold" style:font-name-complex="Times New Roman1" style:font-size-complex="14pt" style:font-weight-complex="bold"/>
    </style:style>
    <style:style style:name="P86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none" fo:font-weight="bold" officeooo:rsid="00235878" officeooo:paragraph-rsid="000ee979" style:font-size-asian="14pt" style:font-weight-asian="bold" style:font-name-complex="Times New Roman1" style:font-size-complex="14pt" style:font-weight-complex="bold"/>
    </style:style>
    <style:style style:name="P87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5ef2" style:font-size-asian="14pt" style:font-weight-asian="normal" style:font-name-complex="Times New Roman1" style:font-size-complex="14pt" style:font-weight-complex="normal"/>
    </style:style>
    <style:style style:name="P88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style:text-underline-style="none" fo:font-weight="normal" officeooo:rsid="0025d616" officeooo:paragraph-rsid="0025d616" style:font-size-asian="12pt" style:font-weight-asian="normal" style:font-name-complex="Times New Roman1" style:font-size-complex="12pt" style:font-weight-complex="normal"/>
    </style:style>
    <style:style style:name="P89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bold" officeooo:rsid="00235878" officeooo:paragraph-rsid="00235878" style:font-size-asian="14pt" style:font-weight-asian="bold" style:font-name-complex="Times New Roman1" style:font-size-complex="14pt" style:font-weight-complex="bold"/>
    </style:style>
    <style:style style:name="P90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style:text-underline-style="none" fo:font-weight="normal" officeooo:rsid="0026d7bc" officeooo:paragraph-rsid="0026d7bc" style:font-size-asian="12pt" style:font-weight-asian="normal" style:font-name-complex="Times New Roman1" style:font-size-complex="12pt" style:font-weight-complex="normal"/>
    </style:style>
    <style:style style:name="P91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style:text-underline-style="none" fo:font-weight="normal" officeooo:rsid="0028d57f" officeooo:paragraph-rsid="0028d57f" style:font-size-asian="12pt" style:font-weight-asian="normal" style:font-name-complex="Times New Roman1" style:font-size-complex="12pt" style:font-weight-complex="normal"/>
    </style:style>
    <style:style style:name="P92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f2f2" style:font-size-asian="14pt" style:font-weight-asian="normal" style:font-name-complex="Times New Roman1" style:font-size-complex="14pt" style:font-weight-complex="normal"/>
    </style:style>
    <style:style style:name="P93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2pt" style:text-underline-style="none" fo:font-weight="normal" officeooo:rsid="0028d57f" officeooo:paragraph-rsid="0028d57f" style:font-size-asian="12pt" style:font-weight-asian="normal" style:font-name-complex="Times New Roman1" style:font-size-complex="12pt" style:font-weight-complex="normal"/>
    </style:style>
    <style:style style:name="P9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bold" officeooo:rsid="00235878" officeooo:paragraph-rsid="0023f2f2" style:font-size-asian="14pt" style:font-weight-asian="bold" style:font-name-complex="Times New Roman1" style:font-size-complex="14pt" style:font-weight-complex="bold"/>
    </style:style>
    <style:style style:name="P95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4pt" style:text-underline-style="none" fo:font-weight="bold" officeooo:rsid="00235878" officeooo:paragraph-rsid="0023f2f2" style:font-size-asian="14pt" style:font-weight-asian="bold" style:font-name-complex="Times New Roman1" style:font-size-complex="14pt" style:font-weight-complex="bold"/>
    </style:style>
    <style:style style:name="P96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none" fo:font-weight="bold" officeooo:rsid="00235878" officeooo:paragraph-rsid="0023f2f2" style:font-size-asian="14pt" style:font-weight-asian="bold" style:font-name-complex="Times New Roman1" style:font-size-complex="14pt" style:font-weight-complex="bold"/>
    </style:style>
    <style:style style:name="P97" style:family="paragraph" style:parent-style-name="Standard" style:list-style-name="L1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23f2f2" style:font-size-asian="14pt" style:font-weight-asian="normal" style:font-name-complex="Times New Roman1" style:font-size-complex="14pt" style:font-weight-complex="normal"/>
    </style:style>
    <style:style style:name="P98" style:family="paragraph" style:parent-style-name="Standard" style:list-style-name="L1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4e3b85" style:font-size-asian="14pt" style:font-weight-asian="normal" style:font-name-complex="Times New Roman1" style:font-size-complex="14pt" style:font-weight-complex="normal"/>
    </style:style>
    <style:style style:name="P99" style:family="paragraph" style:parent-style-name="Standard" style:list-style-name="L1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4ec892" style:font-size-asian="14pt" style:font-weight-asian="normal" style:font-name-complex="Times New Roman1" style:font-size-complex="14pt" style:font-weight-complex="normal"/>
    </style:style>
    <style:style style:name="P100" style:family="paragraph" style:parent-style-name="Standard" style:list-style-name="L1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4fafff" style:font-size-asian="14pt" style:font-weight-asian="normal" style:font-name-complex="Times New Roman1" style:font-size-complex="14pt" style:font-weight-complex="normal"/>
    </style:style>
    <style:style style:name="P101" style:family="paragraph" style:parent-style-name="Standard" style:list-style-name="L1">
      <style:paragraph-properties fo:margin-left="0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style:text-underline-style="none" fo:font-weight="normal" officeooo:rsid="00235878" officeooo:paragraph-rsid="0053a5e1" style:font-size-asian="14pt" style:font-weight-asian="normal" style:font-name-complex="Times New Roman1" style:font-size-complex="14pt" style:font-weight-complex="normal"/>
    </style:style>
    <style:style style:name="T1" style:family="text">
      <style:text-properties officeooo:rsid="003ae84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officeooo:rsid="003ae849"/>
    </style:style>
    <style:style style:name="T5" style:family="text">
      <style:text-properties officeooo:rsid="001d1e9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fade3"/>
    </style:style>
    <style:style style:name="T8" style:family="text">
      <style:text-properties officeooo:rsid="005575f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letter-kerning="false" style:language-asian="ru" style:country-asian="RU" style:font-weight-asian="normal" style:font-name-complex="Times New Roman1" style:font-weight-complex="normal"/>
    </style:style>
    <style:style style:name="T11" style:family="text">
      <style:text-properties officeooo:rsid="0040e511"/>
    </style:style>
    <style:style style:name="T12" style:family="text">
      <style:text-properties officeooo:rsid="00463fe1"/>
    </style:style>
    <style:style style:name="T13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fo:font-size="14pt" style:font-size-asian="14pt" style:font-name-complex="Times New Roman1" style:font-size-complex="14pt"/>
    </style:style>
    <style:style style:name="T15" style:family="text">
      <style:text-properties fo:font-size="14pt" fo:language="en" fo:country="US" style:font-size-asian="14pt" style:font-name-complex="Times New Roman1" style:font-size-complex="14pt"/>
    </style:style>
    <style:style style:name="T16" style:family="text">
      <style:text-properties fo:color="#000000" loext:opacity="100%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17" style:family="text">
      <style:text-properties fo:color="#000000" loext:opacity="100%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T18" style:family="text">
      <style:text-properties fo:font-size="14pt" officeooo:rsid="0040e511" style:font-size-asian="14pt" style:font-name-complex="Times New Roman1" style:font-size-complex="14pt"/>
    </style:style>
    <style:style style:name="T19" style:family="text">
      <style:text-properties fo:font-size="14pt" officeooo:rsid="00463fe1" style:font-size-asian="14pt" style:font-name-complex="Times New Roman1" style:font-size-complex="14pt"/>
    </style:style>
    <style:style style:name="T20" style:family="text">
      <style:text-properties officeooo:rsid="001f9141"/>
    </style:style>
    <style:style style:name="T21" style:family="text">
      <style:text-properties officeooo:rsid="00470f41"/>
    </style:style>
    <style:style style:name="T22" style:family="text">
      <style:text-properties officeooo:rsid="004ca51f"/>
    </style:style>
    <style:style style:name="T23" style:family="text">
      <style:text-properties fo:font-size="14pt" officeooo:rsid="00470f41" style:font-size-asian="14pt" style:font-name-complex="Times New Roman1" style:font-size-complex="14pt"/>
    </style:style>
    <style:style style:name="T24" style:family="text">
      <style:text-properties fo:font-size="14pt" style:letter-kerning="false" style:font-size-asian="14pt" style:font-name-complex="Times New Roman1" style:font-size-complex="14pt"/>
    </style:style>
    <style:style style:name="T25" style:family="text">
      <style:text-properties style:font-name-complex="Times New Roman1"/>
    </style:style>
    <style:style style:name="T26" style:family="text">
      <style:text-properties officeooo:rsid="001ca533" style:font-name-complex="Times New Roman1"/>
    </style:style>
    <style:style style:name="T27" style:family="text">
      <style:text-properties officeooo:rsid="00174b0a"/>
    </style:style>
    <style:style style:name="T28" style:family="text">
      <style:text-properties officeooo:rsid="001ca533"/>
    </style:style>
    <style:style style:name="T29" style:family="text">
      <style:text-properties officeooo:rsid="00135c9d"/>
    </style:style>
    <style:style style:name="T30" style:family="text">
      <style:text-properties officeooo:rsid="004be3b8"/>
    </style:style>
    <style:style style:name="T31" style:family="text">
      <style:text-properties officeooo:rsid="0009e7a5"/>
    </style:style>
    <style:style style:name="T32" style:family="text">
      <style:text-properties officeooo:rsid="000d01d4"/>
    </style:style>
    <style:style style:name="T33" style:family="text">
      <style:text-properties officeooo:rsid="0018f2a4"/>
    </style:style>
    <style:style style:name="T34" style:family="text">
      <style:text-properties officeooo:rsid="0027aad2"/>
    </style:style>
    <style:style style:name="T35" style:family="text">
      <style:text-properties officeooo:rsid="00235878"/>
    </style:style>
    <style:style style:name="T36" style:family="text">
      <style:text-properties fo:font-weight="normal" officeooo:rsid="00235878" style:font-weight-asian="normal" style:font-weight-complex="normal"/>
    </style:style>
    <style:style style:name="T37" style:family="text">
      <style:text-properties officeooo:rsid="0035a6b1"/>
    </style:style>
    <style:style style:name="T38" style:family="text">
      <style:text-properties officeooo:rsid="0043e6f8"/>
    </style:style>
    <style:style style:name="T39" style:family="text">
      <style:text-properties officeooo:rsid="002910d9"/>
    </style:style>
    <style:style style:name="T40" style:family="text">
      <style:text-properties officeooo:rsid="00235ef2"/>
    </style:style>
    <style:style style:name="T41" style:family="text">
      <style:text-properties officeooo:rsid="0023f2f2"/>
    </style:style>
    <style:style style:name="T42" style:family="text">
      <style:text-properties officeooo:rsid="002d0ac1"/>
    </style:style>
    <style:style style:name="T43" style:family="text">
      <style:text-properties officeooo:rsid="004add3c"/>
    </style:style>
    <style:style style:name="T44" style:family="text">
      <style:text-properties officeooo:rsid="00546a61"/>
    </style:style>
    <style:style style:name="T45" style:family="text">
      <style:text-properties officeooo:rsid="004e3b85"/>
    </style:style>
    <style:style style:name="T46" style:family="text">
      <style:text-properties officeooo:rsid="005058b2"/>
    </style:style>
    <style:style style:name="T47" style:family="text">
      <style:text-properties officeooo:rsid="004fafff"/>
    </style:style>
    <style:style style:name="T48" style:family="text">
      <style:text-properties officeooo:rsid="005237f8"/>
    </style:style>
    <style:style style:name="T49" style:family="text">
      <style:text-properties officeooo:rsid="0053a5e1"/>
    </style:style>
    <style:style style:name="fr1" style:family="graphic" style:parent-style-name="Graphics">
      <style:graphic-properties style:protect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siz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Государственное автономное профессиональное</text:h>
      <text:h text:style-name="P1" text:outline-level="2">образовательное учреждение</text:h>
      <text:h text:style-name="P1" text:outline-level="2">«Читинский педагогический колледж»</text:h>
      <text:h text:style-name="P2" text:outline-level="2"/>
      <text:h text:style-name="P3" text:outline-level="2">Кафедра информационных технологий и программирования</text:h>
      <text:h text:style-name="P4" text:outline-level="2"/>
      <text:h text:style-name="P5" text:outline-level="2">Специальность 09.02.07 Информационные системы и программирование</text:h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6" text:outline-level="2">ВЫПУСКНАЯ КВАЛИФИКАЦИОННАЯ РАБОТА</text:h>
      <text:h text:style-name="P6" text:outline-level="2">Дипломный проект</text:h>
      <text:h text:style-name="P4" text:outline-level="2"/>
      <text:h text:style-name="P6" text:outline-level="2">Разработка десктопного приложения для онлайн-школы по программированию</text:h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able:table table:name="Table5" table:style-name="Table5">
        <table:table-column table:style-name="Table5.A"/>
        <table:table-row>
          <table:table-cell table:style-name="Table5.A1" office:value-type="string">
            <text:p text:style-name="P8">Выполнил:</text:p>
          </table:table-cell>
        </table:table-row>
        <table:table-row>
          <table:table-cell table:style-name="Table5.A1" office:value-type="string">
            <text:p text:style-name="P8">Богодухов <text:span text:style-name="T1">Алексей Георгиевич</text:span></text:p>
          </table:table-cell>
        </table:table-row>
        <table:table-row>
          <table:table-cell table:style-name="Table5.A1" office:value-type="string">
            <text:p text:style-name="P8">Студент <text:s/><text:span text:style-name="T2"><text:s text:c="6"/>401 <text:s text:c="5"/></text:span><text:span text:style-name="T3"><text:s text:c="2"/>группы</text:span></text:p>
          </table:table-cell>
        </table:table-row>
        <table:table-row>
          <table:table-cell table:style-name="Table5.A1" office:value-type="string">
            <text:p text:style-name="P9">Руководитель <text:s/><text:span text:style-name="T1">________________</text:span></text:p>
          </table:table-cell>
        </table:table-row>
        <table:table-row>
          <table:table-cell table:style-name="Table5.A1" office:value-type="string">
            <text:p text:style-name="P10"><text:s text:c="38"/>подпись</text:p>
          </table:table-cell>
        </table:table-row>
        <table:table-row>
          <table:table-cell table:style-name="Table5.A1" office:value-type="string">
            <text:p text:style-name="P11">Трушина Е<text:span text:style-name="T1">лена Геннадьевна</text:span></text:p>
          </table:table-cell>
        </table:table-row>
        <table:table-row table:style-name="Table5.7">
          <table:table-cell table:style-name="Table5.A1" office:value-type="string">
            <text:p text:style-name="P12">« <text:s text:c="7"/>» <text:s/><text:span text:style-name="T4"><text:s text:c="36"/></text:span><text:s text:c="2"/>2<text:span text:style-name="T1">026 </text:span>г.</text:p>
          </table:table-cell>
        </table:table-row>
        <table:table-row>
          <table:table-cell table:style-name="Table5.A1" office:value-type="string">
            <text:p text:style-name="P11">Допущен к защите</text:p>
          </table:table-cell>
        </table:table-row>
        <table:table-row>
          <table:table-cell table:style-name="Table5.A1" office:value-type="string">
            <text:p text:style-name="P11">Зав. кафедрой<text:span text:style-name="T5"> <text:s/></text:span><text:span text:style-name="T1">________________</text:span></text:p>
          </table:table-cell>
        </table:table-row>
        <table:table-row>
          <table:table-cell table:style-name="Table5.A1" office:value-type="string">
            <text:p text:style-name="P13"><text:s text:c="38"/>подпись</text:p>
          </table:table-cell>
        </table:table-row>
        <table:table-row>
          <table:table-cell table:style-name="Table5.A1" office:value-type="string">
            <text:p text:style-name="P11">Медведкова Ю<text:span text:style-name="T1">лия Константиновна</text:span></text:p>
          </table:table-cell>
        </table:table-row>
        <table:table-row>
          <table:table-cell table:style-name="Table5.A1" office:value-type="string">
            <text:p text:style-name="P12">« <text:s text:c="7"/>» <text:s/><text:span text:style-name="T4"><text:s text:c="36"/></text:span><text:s text:c="2"/>2<text:span text:style-name="T1">026 </text:span>г.</text:p>
          </table:table-cell>
        </table:table-row>
        <table:table-row>
          <table:table-cell table:style-name="Table5.A1" office:value-type="string">
            <text:p text:style-name="P12"/>
          </table:table-cell>
        </table:table-row>
        <table:table-row>
          <table:table-cell table:style-name="Table5.A1" office:value-type="string">
            <text:p text:style-name="P12">Оценка<text:span text:style-name="T5"> <text:s/></text:span><text:span text:style-name="T1">__________________</text:span></text:p>
          </table:table-cell>
        </table:table-row>
        <table:table-row>
          <table:table-cell table:style-name="Table5.A1" office:value-type="string">
            <text:p text:style-name="P12">« <text:s text:c="7"/>» <text:s/><text:span text:style-name="T4"><text:s text:c="36"/></text:span><text:s text:c="2"/>2<text:span text:style-name="T1">026 </text:span>г.</text:p>
          </table:table-cell>
        </table:table-row>
      </table:table>
      <text:p text:style-name="P14"/>
      <text:p text:style-name="P15">СОДЕРЖАНИЕ</text:p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1. Пояснительная записка<text:span text:style-name="T6"> ..............................................................................</text:span></text:p>
          </table:table-cell>
          <table:table-cell table:style-name="Table2.A1" office:value-type="string">
            <text:p text:style-name="P18">3</text:p>
          </table:table-cell>
        </table:table-row>
        <table:table-row>
          <table:table-cell table:style-name="Table2.A1" office:value-type="string">
            <text:p text:style-name="P19">1.1 Квалификационные характеристики проекта .................................</text:p>
          </table:table-cell>
          <table:table-cell table:style-name="Table2.A1" office:value-type="string">
            <text:p text:style-name="P20">3</text:p>
          </table:table-cell>
        </table:table-row>
        <table:table-row>
          <table:table-cell table:style-name="Table2.A1" office:value-type="string">
            <text:p text:style-name="P19">1.2 Описание предметной области .........................................................</text:p>
          </table:table-cell>
          <table:table-cell table:style-name="Table2.B3" office:value-type="float" office:value="5">
            <text:p text:style-name="P20">5</text:p>
          </table:table-cell>
        </table:table-row>
        <table:table-row>
          <table:table-cell table:style-name="Table2.A1" office:value-type="string">
            <text:p text:style-name="P19">1.3 Техническое задание ..........................................................................</text:p>
          </table:table-cell>
          <table:table-cell table:style-name="Table2.A1" office:value-type="string">
            <text:p text:style-name="P20">1<text:span text:style-name="T7">2</text:span></text:p>
          </table:table-cell>
        </table:table-row>
        <table:table-row>
          <table:table-cell table:style-name="Table2.A1" office:value-type="string">
            <text:p text:style-name="P17">2. Проектная часть<text:span text:style-name="T6"> ...........................................................................................</text:span></text:p>
          </table:table-cell>
          <table:table-cell table:style-name="Table2.A1" office:value-type="string">
            <text:p text:style-name="P18">19</text:p>
          </table:table-cell>
        </table:table-row>
        <table:table-row>
          <table:table-cell table:style-name="Table2.A1" office:value-type="string">
            <text:p text:style-name="P19">2.1 Проектирование программного продукта .......................................</text:p>
          </table:table-cell>
          <table:table-cell table:style-name="Table2.A1" office:value-type="string">
            <text:p text:style-name="P18">19</text:p>
          </table:table-cell>
        </table:table-row>
        <table:table-row>
          <table:table-cell table:style-name="Table2.A1" office:value-type="string">
            <text:p text:style-name="P21">2.2 Руководство пользователя ................................................................</text:p>
          </table:table-cell>
          <table:table-cell table:style-name="Table2.A1" office:value-type="string">
            <text:p text:style-name="P18">2<text:span text:style-name="T8">1</text:span></text:p>
          </table:table-cell>
        </table:table-row>
        <table:table-row>
          <table:table-cell table:style-name="Table2.A1" office:value-type="string">
            <text:p text:style-name="P21">2.3 Результаты апробации .......................................................................</text:p>
          </table:table-cell>
          <table:table-cell table:style-name="Table2.A1" office:value-type="string">
            <text:p text:style-name="P22">3<text:span text:style-name="T8">0</text:span></text:p>
          </table:table-cell>
        </table:table-row>
        <table:table-row>
          <table:table-cell table:style-name="Table2.A1" office:value-type="string">
            <text:p text:style-name="P23"><text:span text:style-name="T9">Заключение </text:span><text:span text:style-name="T10">........................................................................................................</text:span></text:p>
          </table:table-cell>
          <table:table-cell table:style-name="Table2.A1" office:value-type="string">
            <text:p text:style-name="P22">3<text:span text:style-name="T8">2</text:span></text:p>
          </table:table-cell>
        </table:table-row>
        <table:table-row>
          <table:table-cell table:style-name="Table2.A1" office:value-type="string">
            <text:p text:style-name="P23"><text:span text:style-name="T9">Список использованных источников </text:span><text:span text:style-name="T10">..........................................................</text:span></text:p>
          </table:table-cell>
          <table:table-cell table:style-name="Table2.A1" office:value-type="string">
            <text:p text:style-name="P22">3<text:span text:style-name="T8">5</text:span></text:p>
          </table:table-cell>
        </table:table-row>
      </table:table>
      <text:p text:style-name="P24"/>
      <text:p text:style-name="P25">1. ПОЯСНИТЕЛЬНАЯ ЗАПИСКА</text:p>
      <text:p text:style-name="P26"/>
      <text:p text:style-name="P26">1.1 Квалификационные характеристики проекта</text:p>
      <text:p text:style-name="P26"/>
      <text:p text:style-name="P27">В условиях цифровизации образования всё больше людей осваивают программирование в онлайн-формате, включая школьников, студентов и взрослых, проходящих профессиональную переподготовку. Онлайн-обучение позволяет получать знания независимо от места проживания и графика, однако одновременно обостряет проблему качества усвоения материала. Для эффективного изучения программирования недостаточно только теоретических лекций и тестовых заданий - ключевую роль играет регулярная практическая работа с кодом и получение оперативной обратной связи по результатам выполнения заданий <text:span text:style-name="T11">[</text:span><text:span text:style-name="T12">5</text:span><text:span text:style-name="T11">]</text:span>.</text:p>
      <text:p text:style-name="P28">Существующие онлайн-платформы для обучения программированию нередко ориентированы либо на просмотр видеоматериалов, либо на выполнение ограниченного набора упражнений в браузере. Такой подход может снижать вовлечённость обучающихся и затруднять формирование устойчивых практических навыков. Кроме того, пользователи сталкиваются с трудностями при настройке рабочей среды, что особенно критично для начинающих, не обладающих достаточным техническим опытом <text:span text:style-name="T11">[</text:span><text:span text:style-name="T12">8</text:span><text:span text:style-name="T11">]</text:span>.</text:p>
      <text:p text:style-name="P28">Актуальной является задача создания удобного и безопасного инструмента, который объединяет теоретическое обучение и практику программирования в едином образовательном пространстве, минимизируя технические барьеры для обучающихся. Десктопное приложение в данном контексте способно обеспечить стабильную работу, привычный интерфейс и возможность локального хранения учебных материалов, что повышает доступность обучения и снижает зависимость от качества интернет-соединения. Таким образом, разработка десктопного приложения для онлайн-школы по программированию является актуальной задачей, направленной на повышение эффективности обучения, <text:soft-page-break/>удобства использования образовательных платформ и качества формирования практических навыков программирования у обучающихся.</text:p>
      <text:p text:style-name="P29"><text:span text:style-name="T13">Объектом</text:span><text:span text:style-name="T14"> дипломного проекта является процесс разработки приложения.</text:span></text:p>
      <text:p text:style-name="P29"><text:span text:style-name="T13">Предметом</text:span><text:span text:style-name="T14"> дипломного проекта является создание десктопного приложения с клиент-серверной архитектурой с помощью </text:span><text:span text:style-name="T15">Qt</text:span><text:span text:style-name="T14"> на языке </text:span><text:span text:style-name="T15">C</text:span><text:span text:style-name="T14">++.</text:span></text:p>
      <text:p text:style-name="P29"><text:span text:style-name="T13">Целью</text:span><text:span text:style-name="T14"> дипломного проекта является разработка десктопного приложения для онлайн-школы по программированию, обеспечивающее эффективное обучение с безопасным выполнением пользовательского кода и удобным интерфейсом для изучения теории и практики.</text:span></text:p>
      <text:p text:style-name="P29"><text:span text:style-name="T14">В соответствии с поставленной целью в работе необходимо решить следующие </text:span><text:span text:style-name="T13">задачи</text:span><text:span text:style-name="T14">:</text:span></text:p>
      <text:list xml:id="list419868974" text:style-name="WWNum7">
        <text:list-item text:start-value="1">
          <text:p text:style-name="P30">Изучить и проанализировать предметную область.</text:p>
        </text:list-item>
        <text:list-item text:style-override="WWNum3">
          <text:p text:style-name="P31">Разработать техническое задание.</text:p>
        </text:list-item>
        <text:list-item text:style-override="WWNum3">
          <text:p text:style-name="P31">Создать программное обеспечение.</text:p>
        </text:list-item>
        <text:list-item text:style-override="WWNum3">
          <text:p text:style-name="P31">Разработать пользовательский интерфейс приложения.</text:p>
        </text:list-item>
        <text:list-item text:style-override="WWNum3">
          <text:p text:style-name="P31">Подготовить руководство пользователя.</text:p>
        </text:list-item>
      </text:list>
      <text:p text:style-name="P29"><text:span text:style-name="T16">Тип проекта</text:span><text:span text:style-name="T17">: практико-ориентированный.</text:span></text:p>
      <text:p text:style-name="P29"><text:span text:style-name="T16">Этапы работы над проектом</text:span><text:span text:style-name="T17">:</text:span></text:p>
      <text:list text:style-name="WWNum2">
        <text:list-item>
          <text:p text:style-name="P32">Аналитический этап: исследование предметной области, анализ требований</text:p>
        </text:list-item>
        <text:list-item>
          <text:p text:style-name="P32">Проектирование: разработка архитектуры, проектирование интерфейсов</text:p>
        </text:list-item>
        <text:list-item>
          <text:p text:style-name="P32">Реализация: программирование клиентской и серверной частей</text:p>
        </text:list-item>
        <text:list-item>
          <text:p text:style-name="P32">Интеграция: объединение компонентов</text:p>
        </text:list-item>
        <text:list-item>
          <text:p text:style-name="P32">Тестирование: функциональное и интеграционное тестирование</text:p>
        </text:list-item>
        <text:list-item>
          <text:p text:style-name="P32">Документирование: написание технической документации</text:p>
        </text:list-item>
      </text:list>
      <text:p text:style-name="P29"><text:span text:style-name="T13">Прикладная ценность проекта</text:span><text:span text:style-name="T14"> заключается в создании удобного программного средства, предназначенного для поддержки процесса обучения программированию в онлайн-школах. Разрабатываемое приложение </text:span><text:soft-page-break/><text:span text:style-name="T14">предоставляет обучающимся единое образовательное пространство, в котором теоретические материалы и практические задания объединены в одном интерфейсе. Такой подход упрощает процесс обучения, повышает вовлечённость пользователей и способствует более эффективному закреплению изучаемого материала за счёт немедленного применения знаний на практике </text:span><text:span text:style-name="T18">[1</text:span><text:span text:style-name="T19">0</text:span><text:span text:style-name="T18">]</text:span><text:span text:style-name="T14">.</text:span></text:p>
      <text:p text:style-name="P29"><text:span text:style-name="T13">Критерии эффективности проекта</text:span><text:span text:style-name="T14">:</text:span></text:p>
      <text:list xml:id="list2397816395" text:style-name="WWNum8">
        <text:list-item text:start-value="1">
          <text:p text:style-name="P33">Корректность выполнения программных заданий и точность проверки результатов работы пользователей.</text:p>
        </text:list-item>
        <text:list-item text:style-override="WWNum4">
          <text:p text:style-name="P34">Понятность и простота использования приложения.</text:p>
        </text:list-item>
        <text:list-item text:style-override="WWNum4">
          <text:p text:style-name="P34">Стабильность работы системы при взаимодействии пользователей с учебными материалами и заданиями.</text:p>
        </text:list-item>
      </text:list>
      <text:p text:style-name="P35">Теоретическая часть проекта включает анализ современных подходов к организации онлайн-обучения программированию, с акцентом на сочетание теоретических материалов и практических заданий. Рассматриваются принципы построения обучающих систем, обеспечивающих поэтапное освоение материала и формирование практических навыков программирования. Проведённый анализ позволяет обосновать выбранную структуру образовательной платформы и подходы к организации учебного процесса, направленные на повышение эффективности обучения и удобства взаимодействия пользователей с системой.</text:p>
      <text:p text:style-name="P36"/>
      <text:p text:style-name="P26">1.2 Описание предметной области</text:p>
      <text:p text:style-name="P37"/>
      <text:p text:style-name="P35">Онлайн-обучение программированию представляет собой форму образовательного процесса, при которой освоение знаний и практических навыков в области разработки программного обеспечения осуществляется с использованием цифровых образовательных платформ и программных средств. В отличие от традиционного очного обучения, онлайн-формат предоставляет обучающимся возможность получать знания независимо от географического положения, временных ограничений и индивидуального графика. Это делает обучение программированию более доступным и гибким, особенно в условиях <text:soft-page-break/>быстрого развития информационных технологий и роста потребности в <text:span text:style-name="T20">IT</text:span>-специалистах <text:span text:style-name="T11">[</text:span><text:span text:style-name="T12">5</text:span><text:span text:style-name="T11">]</text:span>.</text:p>
      <text:p text:style-name="P29"><text:span text:style-name="T14">Особенностью онлайн-обучения является высокая степень самостоятельности обучающихся. Пользователь самостоятельно планирует темп прохождения курса, выбирает время для изучения материалов и выполнения заданий. При этом эффективность такого обучения во многом зависит от качества используемой образовательной платформы, структуры учебных материалов и наличия инструментов, обеспечивающих практическое применение полученных знаний. В области программирования данные факторы приобретают особую значимость, поскольку формирование навыков невозможно без регулярной практической деятельности </text:span><text:span text:style-name="T18">[</text:span><text:span text:style-name="T19">8</text:span><text:span text:style-name="T18">]</text:span><text:span text:style-name="T14">.</text:span></text:p>
      <text:p text:style-name="P35">Целевой аудиторией онлайн-обучения программированию являются различные категории пользователей, отличающиеся уровнем подготовки, возрастом и образовательными целями. К одной из ключевых групп относятся школьники старших классов, которые рассматривают программирование как перспективное направление для дальнейшего обучения и профессиональной деятельности. Для данной категории особенно важны наглядность учебных материалов, поэтапное объяснение базовых понятий и простота взаимодействия с образовательной средой, поскольку большинство обучающихся не обладает предварительным техническим опытом <text:span text:style-name="T11">[</text:span><text:span text:style-name="T12">12</text:span><text:span text:style-name="T11">]</text:span>.</text:p>
      <text:p text:style-name="P35">Программирование как учебная дисциплина имеет ряд существенных особенностей, отличающих его от большинства гуманитарных и даже многих технических предметов. В первую очередь, программирование ориентировано не только на усвоение теоретических знаний, но и на формирование устойчивых практических навыков. Понимание синтаксиса языков программирования, алгоритмов и принципов разработки программных систем не приводит к ожидаемому результату без регулярной работы с кодом и самостоятельного решения практических задач <text:span text:style-name="T11">[1</text:span><text:span text:style-name="T12">3</text:span><text:span text:style-name="T11">]</text:span>.</text:p>
      <text:p text:style-name="P29"><text:soft-page-break/><text:span text:style-name="T14">Процесс обучения программированию предполагает активное взаимодействие обучающегося с программной средой. В ходе выполнения заданий пользователь сталкивается с ошибками, анализирует результаты работы программы, вносит исправления и повторно проверяет решение. Такой итеративный характер обучения способствует развитию аналитического мышления, навыков поиска и устранения ошибок, а также способности к самостоятельному решению задач. В отличие от дисциплин, где результат может быть выражен в виде тестового ответа или письменного рассуждения, в программировании корректность решения определяется фактическим поведением созданной программы.</text:span></text:p>
      <text:p text:style-name="P35">Таким образом, онлайн-обучение программированию представляет собой сложную и многоаспектную предметную область, в которой пересекаются образовательные цели, потребности различных категорий пользователей и требования к практической направленности учебного процесса. Эффективная организация обучения в данной области требует использования специализированных программных средств, способных обеспечить удобный доступ к учебным материалам, поддержку практической деятельности и получение обратной связи, что делает разработку соответствующих образовательных приложений актуальной и востребованной задачей <text:span text:style-name="T11">[1</text:span><text:span text:style-name="T12">4</text:span><text:span text:style-name="T11">]</text:span>.</text:p>
      <text:p text:style-name="P35">Онлайн-обучение программированию представляет собой последовательность взаимосвязанных учебных процессов, направленных на формирование у обучающихся теоретических знаний и практических навыков. Эффективность обучения определяется тем, насколько логично и согласованно организованы данные процессы в рамках образовательной платформы. Процесс обучения начинается с изучения теоретического материала. Теоретическая часть включает объяснение базовых понятий, принципов и подходов, необходимых для понимания изучаемой темы. В онлайн-формате теоретические материалы должны быть структурированы и представлены в доступной форме, позволяющей обучающемуся последовательно осваивать новые знания и <text:soft-page-break/>возвращаться к ранее изученному материалу при необходимости. Чёткая логика изложения способствует снижению когнитивной нагрузки и повышает усвоение информации <text:span text:style-name="T11">[1</text:span><text:span text:style-name="T12">0</text:span><text:span text:style-name="T11">]</text:span>.</text:p>
      <text:p text:style-name="P29"><text:span text:style-name="T14">Следующим этапом является выполнение практических заданий, направленных на закрепление теоретических знаний. Практика играет ключевую роль в обучении программированию, поскольку именно в процессе написания кода формируются навыки анализа задач, поиска решений и устранения ошибок. Задания должны соответствовать изучаемой теме и усложняться по мере продвижения обучающегося, обеспечивая поэтапное развитие навыков программирования </text:span><text:span text:style-name="T18">[</text:span><text:span text:style-name="T19">9</text:span><text:span text:style-name="T18">]</text:span><text:span text:style-name="T14">.</text:span></text:p>
      <text:p text:style-name="P35">Важным процессом является проверка решений, выполненных обучающимися. Проверка позволяет определить корректность выполнения задания и степень усвоения материала. В условиях онлайн-обучения данный процесс должен быть организован таким образом, чтобы обеспечивать объективность оценки и минимизировать субъективные факторы. Наличие чётких критериев проверки способствует формированию у обучающихся понимания требований к результатам работы. Результаты проверки сопровождаются получением обратной связи, которая является неотъемлемой частью образовательного процесса. Обратная связь позволяет обучающемуся понять допущенные ошибки, скорректировать подход к решению задач и улучшить качество выполняемых работ. Своевременная и понятная обратная связь повышает мотивацию обучающихся и способствует более глубокому усвоению учебного материала <text:span text:style-name="T11">[1</text:span><text:span text:style-name="T21">1</text:span><text:span text:style-name="T11">]</text:span>.</text:p>
      <text:p text:style-name="P35">Завершающим процессом является отслеживание прогресса обучения. Фиксация результатов выполнения заданий и прохождения учебных тем позволяет обучающемуся оценивать собственные достижения и планировать дальнейшее обучение. Для преподавателя и образовательной платформы данный процесс обеспечивает контроль за ходом обучения и позволяет выявлять трудности, возникающие у обучающихся на различных этапах освоения курса. <text:soft-page-break/>Таким образом, основные процессы онлайн-обучения программированию образуют целостную систему, в которой теоретическое обучение, практика, проверка и обратная связь взаимно дополняют друг друга. Эффективная реализация данных процессов является ключевым фактором успешного формирования практических навыков программирования в онлайн-среде <text:span text:style-name="T11">[</text:span><text:span text:style-name="T22">10</text:span><text:span text:style-name="T11">]</text:span>.</text:p>
      <text:p text:style-name="P29"><text:span text:style-name="T14">Несмотря на широкое распространение онлайн-платформ для обучения программированию, существующие решения не всегда обеспечивают полноценное и удобное освоение учебного материала. Многие проблемы проявляются именно на уровне пользовательского опыта и организации учебного процесса, что может снижать эффективность обучения и мотивацию обучающихся. Одной из распространённых проблем является разрыв между теоретическим материалом и практической деятельностью. Во многих образовательных ресурсах теория и практика представлены раздельно: обучающимся предлагается сначала изучить лекционный материал, а затем самостоятельно искать способы применить полученные знания. Отсутствие тесной связи между объяснением темы и немедленным выполнением практических заданий затрудняет понимание материала и замедляет формирование практических навыков. Существенные сложности возникают у начинающих обучающихся при подготовке рабочей среды для выполнения программных заданий. Необходимость установки и настройки дополнительных инструментов может отвлекать от учебного процесса и вызывать затруднения у пользователей, не обладающих достаточным техническим опытом. В результате внимание обучающегося смещается с изучения программирования на решение вспомогательных технических задач </text:span><text:span text:style-name="T18">[</text:span><text:span text:style-name="T23">12</text:span><text:span text:style-name="T18">]</text:span><text:span text:style-name="T14">.</text:span></text:p>
      <text:p text:style-name="P29"><text:span text:style-name="T14">Дополнительным ограничением является отсутствие единого и согласованного интерфейса обучения. Использование нескольких разрозненных инструментов для просмотра теоретических материалов, выполнения заданий и отслеживания прогресса усложняет взаимодействие с образовательной средой. Это повышает когнитивную нагрузку на обучающегося и может отрицательно </text:span><text:soft-page-break/><text:span text:style-name="T14">сказываться на вовлечённости в учебный процесс. Перечисленные проблемы указывают на необходимость создания образовательного решения, ориентированного на потребности пользователей и специфику обучения программированию. Повышение связности учебных процессов, упрощение практической работы и улучшение пользовательского опыта являются важными направлениями развития онлайн-образования в данной области </text:span><text:span text:style-name="T18">[1</text:span><text:span text:style-name="T23">5</text:span><text:span text:style-name="T18">]</text:span><text:span text:style-name="T14">.</text:span></text:p>
      <text:p text:style-name="P35">Разрабатываемое приложение занимает место комплексного инструмента поддержки онлайн-обучения программированию, ориентированного на интеграцию основных учебных процессов в едином образовательном пространстве. Его назначение заключается в упрощении взаимодействия участников образовательного процесса и повышении эффективности освоения программирования за счёт систематизации учебных материалов и практической деятельности. Приложение автоматизирует ключевые этапы обучения, связанные с предоставлением учебного контента, выполнением практических заданий и оценкой результатов работы обучающихся. Теоретические материалы и практические задания представлены в согласованной структуре, что позволяет обучающемуся последовательно переходить от изучения темы к её практическому применению. Это снижает разрыв между теорией и практикой и способствует более осознанному усвоению материала <text:span text:style-name="T11">[1</text:span><text:span text:style-name="T21">4</text:span><text:span text:style-name="T11">]</text:span>.</text:p>
      <text:p text:style-name="P35">Существенным направлением автоматизации является процесс проверки программных заданий и фиксации результатов обучения. Обучающиеся получают возможность самостоятельно выполнять задания и получать результаты проверки без задержек, связанных с ручной обработкой решений. Это упрощает процесс обучения, повышает его прозрачность и позволяет обучающимся лучше отслеживать собственный прогресс <text:span text:style-name="T11">[1</text:span><text:span text:style-name="T21">0</text:span><text:span text:style-name="T11">]</text:span>.</text:p>
      <text:p text:style-name="P29"><text:span text:style-name="T14">Для преподавателей и авторов курсов приложение упрощает организацию учебного процесса и сопровождение обучающихся. Централизованное размещение учебных материалов и заданий снижает нагрузку, связанную с управлением образовательным контентом, и позволяет сосредоточиться на </text:span><text:soft-page-break/><text:span text:style-name="T14">методической стороне обучения. Возможность анализа результатов выполнения заданий способствует более точной оценке уровня подготовки обучающихся и корректировке содержания курса </text:span><text:span text:style-name="T18">[</text:span><text:span text:style-name="T23">9</text:span><text:span text:style-name="T18">]</text:span><text:span text:style-name="T14">.</text:span></text:p>
      <text:p text:style-name="P35">Для онлайн-школы в целом разрабатываемое приложение выступает инструментом повышения качества образовательных услуг. Использование единой платформы обучения способствует формированию целостного образовательного продукта, повышает удобство использования и доверие со стороны пользователей. Это создаёт условия для масштабирования образовательных программ и расширения аудитории без существенного увеличения организационных затрат <text:span text:style-name="T11">[1</text:span><text:span text:style-name="T21">1</text:span><text:span text:style-name="T11">]</text:span>.</text:p>
      <text:p text:style-name="P38"><text:span text:style-name="T24">Рассматриваемое приложение, таким образом, органично встраивается в предметную область онлайн-обучения программированию, дополняя и упорядочивая существующие образовательные процессы. Его функциональная направленность определяет требования к структуре, возможностям и </text:span><text:span text:style-name="T14">архитектуре системы, которые будут рассмотрены в последующих главах работы.</text:span></text:p>
      <text:p text:style-name="P39">1.3 Техническое задание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Техническое задание на разработку программы</text:p>
      <text:p text:style-name="P41">«Десктопное приложение для онлайн-школы по программированию»</text:p>
      <text:p text:style-name="P41"/>
      <text:p text:style-name="P42">Содержание</text:p>
      <text:list xml:id="list67850096" text:style-name="WWNum9">
        <text:list-item text:start-value="1">
          <text:p text:style-name="P43">Введение</text:p>
          <text:list text:style-name="WWNum1">
            <text:list-item>
              <text:p text:style-name="P44">Основание для разработки</text:p>
            </text:list-item>
            <text:list-item>
              <text:p text:style-name="P44">Назначение и область применения</text:p>
            </text:list-item>
          </text:list>
        </text:list-item>
        <text:list-item text:style-override="WWNum1">
          <text:p text:style-name="P44">Требования к программе</text:p>
          <text:list text:style-name="WWNum1">
            <text:list-item>
              <text:p text:style-name="P44">Требования к функциональным характеристикам</text:p>
            </text:list-item>
            <text:list-item>
              <text:p text:style-name="P44">Требования к надёжности</text:p>
              <text:list>
                <text:list-item>
                  <text:p text:style-name="P44">Требования к обеспечению надёжного функционирования программы</text:p>
                </text:list-item>
                <text:list-item>
                  <text:p text:style-name="P44">Время восстановления после отказа</text:p>
                </text:list-item>
                <text:list-item>
                  <text:p text:style-name="P44">Отказы из-за некорректных действий пользовательской системы</text:p>
                </text:list-item>
              </text:list>
            </text:list-item>
          </text:list>
        </text:list-item>
        <text:list-item text:style-override="WWNum1">
          <text:p text:style-name="P44">Условия эксплуатации</text:p>
          <text:list text:style-name="WWNum1">
            <text:list-item>
              <text:p text:style-name="P44">Климатические условия эксплуатации</text:p>
            </text:list-item>
            <text:list-item>
              <text:p text:style-name="P44">Требования к квалификации и численности персонала</text:p>
            </text:list-item>
            <text:list-item>
              <text:p text:style-name="P44">Требования к составу и параметрам технических средств</text:p>
            </text:list-item>
            <text:list-item>
              <text:p text:style-name="P44">Требования к информационной и программной совместимости</text:p>
              <text:list>
                <text:list-item>
                  <text:p text:style-name="P44">Требования к информационным структурам и методам решения</text:p>
                </text:list-item>
                <text:list-item>
                  <text:p text:style-name="P44">Требования к исходным кодам и языкам программирования</text:p>
                </text:list-item>
                <text:list-item>
                  <text:p text:style-name="P44">Требования к программным средствам, используемым программой</text:p>
                </text:list-item>
                <text:list-item>
                  <text:p text:style-name="P44">Требования к защите информации и программ</text:p>
                </text:list-item>
              </text:list>
            </text:list-item>
            <text:list-item>
              <text:p text:style-name="P44">Специальные требования</text:p>
            </text:list-item>
          </text:list>
        </text:list-item>
        <text:list-item text:style-override="WWNum1">
          <text:p text:style-name="P44">Требования к программной документации</text:p>
          <text:list text:style-name="WWNum1">
            <text:list-item>
              <text:p text:style-name="P44">Состав программной документации</text:p>
            </text:list-item>
          </text:list>
        </text:list-item>
        <text:list-item text:style-override="WWNum1">
          <text:p text:style-name="P44">Технико-экономическое обоснование</text:p>
        </text:list-item>
        <text:list-item text:style-override="WWNum1">
          <text:p text:style-name="P44">Стадии и этапы разработки</text:p>
          <text:list text:style-name="WWNum1">
            <text:list-item>
              <text:p text:style-name="P44">Стадии разработки</text:p>
            </text:list-item>
            <text:list-item>
              <text:p text:style-name="P44">Этапы разработки</text:p>
            </text:list-item>
            <text:list-item>
              <text:p text:style-name="P44">Содержание работ по этапам</text:p>
            </text:list-item>
          </text:list>
        </text:list-item>
        <text:list-item text:style-override="WWNum1">
          <text:p text:style-name="P44">Порядок контроля и приемки</text:p>
          <text:list text:style-name="WWNum1">
            <text:list-item>
              <text:p text:style-name="P44">Предварительный контроль</text:p>
            </text:list-item>
            <text:list-item>
              <text:p text:style-name="P44">Тестирование</text:p>
            </text:list-item>
            <text:list-item>
              <text:p text:style-name="P44">Приёмка</text:p>
            </text:list-item>
          </text:list>
        </text:list-item>
      </text:list>
      <text:list xml:id="list1752435448" text:style-name="WWNum10">
        <text:list-item text:start-value="1">
          <text:p text:style-name="P45">Введение</text:p>
          <text:list text:style-name="WWNum5">
            <text:list-item>
              <text:p text:style-name="P46">Основание для разработки</text:p>
              <text:list>
                <text:list-item>
                  <text:p text:style-name="P47">Наименование работы: «Десктопное приложение для онлайн-школы по программированию».</text:p>
                </text:list-item>
                <text:list-item>
                  <text:p text:style-name="P47">Основанием для разработки является задание на выпускную квалификационную работу.</text:p>
                </text:list-item>
                <text:list-item>
                  <text:p text:style-name="P47">Организация, утвердившая договор: Читинский Педагогический колледж.</text:p>
                </text:list-item>
              </text:list>
            </text:list-item>
            <text:list-item>
              <text:p text:style-name="P46">Назначение и область применения</text:p>
              <text:list>
                <text:list-item>
                  <text:p text:style-name="P47">Назначение разработки - создание настольного клиент-серверного приложения для обучения программированию, включающего каталог курсов, теоретические материалы, практические задания, запуск пользовательского кода и проверку решений на сервере.</text:p>
                </text:list-item>
                <text:list-item>
                  <text:p text:style-name="P47">Область применения - учебный процесс в онлайн-школе программирования для студентов и преподавателей.</text:p>
                </text:list-item>
                <text:list-item>
                  <text:p text:style-name="P47">Основные функциональные задачи приложения включают:</text:p>
                  <text:list>
                    <text:list-item>
                      <text:p text:style-name="P47">Регистрацию и авторизацию пользователей с разделением ролей (student, teacher);</text:p>
                    </text:list-item>
                    <text:list-item>
                      <text:p text:style-name="P47">Просмотр списка курсов (языков программирования), списка тем и связанных заданий;</text:p>
                    </text:list-item>
                    <text:list-item>
                      <text:p text:style-name="P47">Просмотр теоретических материалов по выбранной теме (поддержка HTML-разметки в тексте теории);</text:p>
                    </text:list-item>
                    <text:list-item>
                      <text:p text:style-name="P47">Просмотр условия задания и публичного примера ввода/вывода;</text:p>
                    </text:list-item>
                    <text:list-item>
                      <text:p text:style-name="P47">Редактирование и запуск пользовательского кода с передачей входных данных;</text:p>
                    </text:list-item>
                    <text:list-item>
                      <text:p text:style-name="P47">Автоматическую проверку решения на тестах и возврат количества пройденных тестов;</text:p>
                    </text:list-item>
                    <text:list-item>
                      <text:p text:style-name="P47">Отображение прогресса обучения по темам и курсам в профиле пользователя;</text:p>
                    </text:list-item>
                    <text:list-item>
                      <text:p text:style-name="P47">Восстановление пароля по секретному восстановительному полю;</text:p>
                    </text:list-item>
                    <text:list-item>
                      <text:p text:style-name="P47">Администрирование учебного контента преподавателем (создание курсов, тем, заданий и тестов).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text:continue-list="list1752435448" text:style-name="WWNum5">
        <text:list-item>
          <text:p text:style-name="P48"><text:span text:style-name="T25">Требова</text:span><text:span text:style-name="T26">ния</text:span></text:p>
          <text:list>
            <text:list-item>
              <text:p text:style-name="P46">Требования к функциональным характеристикам</text:p>
              <text:list>
                <text:list-item>
                  <text:p text:style-name="P49">Работа с учетными записями и ролями:</text:p>
                  <text:list>
                    <text:list-item>
                      <text:p text:style-name="P49">Программа должна поддерживать регистрацию с обязательным указанием логина, пароля, роли и восстановительного поля;</text:p>
                    </text:list-item>
                    <text:list-item>
                      <text:p text:style-name="P49">Программа должна поддерживать вход по логину и паролю;</text:p>
                    </text:list-item>
                    <text:list-item>
                      <text:p text:style-name="P49">Программа должна поддерживать восстановление пароля по логину, восстановительному полю и новому паролю;</text:p>
                    </text:list-item>
                    <text:list-item>
                      <text:p text:style-name="P49">Для авторизованного пользователя должна поддерживаться сессия по bearer-токену с ограниченным временем жизни;</text:p>
                    </text:list-item>
                    <text:list-item>
                      <text:p text:style-name="P49">Роль teacher должна предоставлять доступ к панели преподавателя, роль student - к пользовательскому режиму обучения.</text:p>
                    </text:list-item>
                  </text:list>
                </text:list-item>
                <text:list-item>
                  <text:p text:style-name="P49">Работа с курсами, темами и заданиями:</text:p>
                  <text:list>
                    <text:list-item>
                      <text:p text:style-name="P49">Должна быть реализована загрузка списка курсов (языков) с кратким описанием и изображением;</text:p>
                    </text:list-item>
                    <text:list-item>
                      <text:p text:style-name="P49">Для выбранного курса должна быть реализована загрузка списка тем;</text:p>
                    </text:list-item>
                    <text:list-item>
                      <text:p text:style-name="P49">Для выбранной темы должна быть реализована загрузка теоретического материала и списка заданий;</text:p>
                    </text:list-item>
                    <text:list-item>
                      <text:p text:style-name="P49">Для выбранного задания должна быть реализована загрузка текста задания и публичного теста (пример входа/выхода);</text:p>
                    </text:list-item>
                    <text:list-item>
                      <text:p text:style-name="P49">Навигация должна обеспечивать последовательный переход: курсы → темы → теория → задание.</text:p>
                    </text:list-item>
                  </text:list>
                </text:list-item>
                <text:list-item>
                  <text:p text:style-name="P49">Редактор и выполнение кода:</text:p>
                  <text:list>
                    <text:list-item>
                      <text:p text:style-name="P49"><text:soft-page-break/>В клиенте должен быть реализован встроенный редактор текста решения;</text:p>
                    </text:list-item>
                    <text:list-item>
                      <text:p text:style-name="P49">Пользователь должен иметь возможность запускать код с произвольным входным набором данных;</text:p>
                    </text:list-item>
                    <text:list-item>
                      <text:p text:style-name="P49">Сервер должен компилировать/исполнять код во временной директории и возвращать результат выполнения;</text:p>
                    </text:list-item>
                    <text:list-item>
                      <text:p text:style-name="P49">Сервер должен поддерживать языки C++, Python, C# и Go;</text:p>
                    </text:list-item>
                    <text:list-item>
                      <text:p text:style-name="P49">При компиляционных ошибках должен возвращаться явный результат «Ошибка компиляции», при ошибках исполнения - соответствующее сообщение.</text:p>
                    </text:list-item>
                  </text:list>
                </text:list-item>
                <text:list-item>
                  <text:p text:style-name="P49">Проверка решений и прогресс:</text:p>
                  <text:list>
                    <text:list-item>
                      <text:p text:style-name="P49">Проверка решения должна выполняться на сервере по набору тестов задания;</text:p>
                    </text:list-item>
                    <text:list-item>
                      <text:p text:style-name="P49">Результатом проверки должно быть количество пройденных тестов и общий итог;</text:p>
                    </text:list-item>
                    <text:list-item>
                      <text:p text:style-name="P49">При полном прохождении тестов задание должно помечаться как решённое;</text:p>
                    </text:list-item>
                    <text:list-item>
                      <text:p text:style-name="P49">При решении всех заданий темы прогресс темы должен устанавливаться в 100%;</text:p>
                    </text:list-item>
                    <text:list-item>
                      <text:p text:style-name="P49">В профиле должен отображаться общий прогресс, список завершённых/незавершённых тем и прогресс по курсам.</text:p>
                    </text:list-item>
                  </text:list>
                </text:list-item>
                <text:list-item>
                  <text:p text:style-name="P49">Функции преподавателя:</text:p>
                  <text:list>
                    <text:list-item>
                      <text:p text:style-name="P49">Преподаватель должен иметь возможность создавать курс (название, краткое описание, URL изображения);</text:p>
                    </text:list-item>
                    <text:list-item>
                      <text:p text:style-name="P49">Преподаватель должен иметь возможность создавать тему (курс, название темы, текст теории);</text:p>
                    </text:list-item>
                    <text:list-item>
                      <text:p text:style-name="P49">Преподаватель должен иметь возможность создавать задание (тема, текст, публичный пример);</text:p>
                    </text:list-item>
                    <text:list-item>
                      <text:p text:style-name="P49">Преподаватель должен иметь возможность добавлять дополнительные тесты к заданию;</text:p>
                    </text:list-item>
                    <text:list-item>
                      <text:p text:style-name="P49">Доступ к операциям создания контента должен быть ограничен серверной проверкой роли teacher.</text:p>
                    </text:list-item>
                  </text:list>
                </text:list-item>
              </text:list>
            </text:list-item>
            <text:list-item>
              <text:p text:style-name="P46">Требования к надёжности</text:p>
              <text:list>
                <text:list-item>
                  <text:p text:style-name="P47">Требования к обеспечению надежного функционирования программы:</text:p>
                  <text:list>
                    <text:list-item>
                      <text:p text:style-name="P47">Все API-методы должны валидировать HTTP-метод запроса и обязательные поля входных данных;</text:p>
                    </text:list-item>
                    <text:list-item>
                      <text:p text:style-name="P47">При ошибках валидации или авторизации сервер должен возвращать структурированный JSON-ответ с кодом ошибки;</text:p>
                    </text:list-item>
                    <text:list-item>
                      <text:p text:style-name="P47">Приложение должно обрабатывать сетевые и серверные ошибки с выводом текста ошибки пользователю;</text:p>
                    </text:list-item>
                    <text:list-item>
                      <text:p text:style-name="P47">Для снижения риска зависаний выполнения кода должны использоваться ограничения по времени компиляции и запуска;</text:p>
                    </text:list-item>
                    <text:list-item>
                      <text:p text:style-name="P47">Временные каталоги выполнения должны очищаться после завершения запуска/проверки;</text:p>
                    </text:list-item>
                    <text:list-item>
                      <text:p text:style-name="P47">Состояние авторизации должно корректно сбрасываться при выходе из аккаунта.</text:p>
                    </text:list-item>
                  </text:list>
                </text:list-item>
                <text:list-item>
                  <text:p text:style-name="P47">Время восстановления после отказа:</text:p>
                  <text:list>
                    <text:list-item>
                      <text:p text:style-name="P47">При отказе клиентской программы восстановление обеспечивается перезапуском приложения;</text:p>
                    </text:list-item>
                    <text:list-item>
                      <text:p text:style-name="P47">При истечении серверной сессии пользователь должен повторно авторизоваться;</text:p>
                    </text:list-item>
                    <text:list-item>
                      <text:p text:style-name="P47">При сбое серверной части восстановление зависит от причины и включает перезапуск web/API-сервиса и проверку БД.</text:p>
                    </text:list-item>
                  </text:list>
                </text:list-item>
                <text:list-item>
                  <text:p text:style-name="P47">Отказы из-за некорректных действий пользователей системы</text:p>
                  <text:list>
                    <text:list-item>
                      <text:p text:style-name="P47">При пустом или некорректном вводе (логин/пароль/код/ID) должны возвращаться сообщения об ошибке;</text:p>
                    </text:list-item>
                    <text:list-item>
                      <text:p text:style-name="P47">При попытке вызова защищённых методов без токена должен возвращаться отказ авторизации;</text:p>
                    </text:list-item>
                    <text:list-item>
                      <text:p text:style-name="P47"><text:soft-page-break/>При попытке доступа студента к операциям преподавателя должен возвращаться отказ по правам доступа.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text:continue-numbering="true" text:style-name="WWNum5">
        <text:list-item>
          <text:p text:style-name="P46">Условия эксплуатации</text:p>
          <text:list>
            <text:list-item>
              <text:p text:style-name="P46">Климатические условия эксплуатации</text:p>
              <text:list>
                <text:list-item>
                  <text:p text:style-name="P47">Рабочая температура должна находиться в диапазоне от 10 до 35 градусов Цельсия;</text:p>
                </text:list-item>
                <text:list-item>
                  <text:p text:style-name="P47">Рабочая влажность должна быть в диапазоне от 30% до 80%.</text:p>
                </text:list-item>
              </text:list>
            </text:list-item>
            <text:list-item>
              <text:p text:style-name="P46">Требования к квалификации и численности персонала</text:p>
              <text:list>
                <text:list-item>
                  <text:p text:style-name="P47">Для студента и преподавателя специальных навыков администрирования системы не требуется;</text:p>
                </text:list-item>
                <text:list-item>
                  <text:p text:style-name="P47">Для сопровождения серверной части требуется специалист, владеющий PHP, SQL и администрированием Linux-сервера.</text:p>
                </text:list-item>
              </text:list>
            </text:list-item>
            <text:list-item>
              <text:p text:style-name="P46">Требования к составу и параметрам технических средств</text:p>
              <text:list>
                <text:list-item>
                  <text:p text:style-name="P47">Клиентская ОС: Windows 10+ или Linux;</text:p>
                </text:list-item>
                <text:list-item>
                  <text:p text:style-name="P47">Процессор: Intel Core i3 или эквивалент;</text:p>
                </text:list-item>
                <text:list-item>
                  <text:p text:style-name="P47">ОЗУ: не менее <text:span text:style-name="T27">1</text:span> ГБ;</text:p>
                </text:list-item>
                <text:list-item>
                  <text:p text:style-name="P47">Свободное место на диске: не менее <text:span text:style-name="T27">2</text:span>00 МБ для клиента;</text:p>
                </text:list-item>
                <text:list-item>
                  <text:p text:style-name="P47">Постоянное интернет-соединение для работы с API;</text:p>
                </text:list-item>
                <text:list-item>
                  <text:p text:style-name="P47">Сервер: Linux/Unix-подобная ОС, PHP с PDO MySQL, СУБД MySQL/MariaDB;</text:p>
                </text:list-item>
                <text:list-item>
                  <text:p text:style-name="P47">Для выполнения кода на сервере требуются установленные инструменты: g++, python3, mono (mcs/csc+mono), go.</text:p>
                </text:list-item>
              </text:list>
            </text:list-item>
            <text:list-item>
              <text:p text:style-name="P46">Требования к информационной и программной совместимости</text:p>
              <text:list>
                <text:list-item>
                  <text:p text:style-name="P47">Требования к информационным структурам и методам решения:</text:p>
                  <text:list>
                    <text:list-item>
                      <text:p text:style-name="P47">Данные должны храниться в реляционной БД с сущностями пользователей, сессий, языков, тем, заданий, тестов и прогресса;</text:p>
                    </text:list-item>
                    <text:list-item>
                      <text:p text:style-name="P47">Обмен между клиентом и сервером должен осуществляться по HTTP(S) с JSON-полями;</text:p>
                    </text:list-item>
                    <text:list-item>
                      <text:p text:style-name="P47">Идентификаторы курсов, тем и заданий должны использоваться в API-запросах для выборки контента;</text:p>
                    </text:list-item>
                    <text:list-item>
                      <text:p text:style-name="P47">Прогресс должен вычисляться на сервере и передаваться клиенту в агрегированном виде.</text:p>
                    </text:list-item>
                  </text:list>
                </text:list-item>
                <text:list-item>
                  <text:p text:style-name="P47">Требования к исходным кодам и языкам программирования:</text:p>
                  <text:list>
                    <text:list-item>
                      <text:p text:style-name="P47">Клиентская часть реализуется на C++ (Qt) и QML;</text:p>
                    </text:list-item>
                    <text:list-item>
                      <text:p text:style-name="P47">Серверная API-часть реализуется на PHP;</text:p>
                    </text:list-item>
                    <text:list-item>
                      <text:p text:style-name="P47">SQL-скрипт и структура БД должны быть совместимы с MySQL/MariaDB;</text:p>
                    </text:list-item>
                    <text:list-item>
                      <text:p text:style-name="P47">Код должен быть структурирован по модулям: клиентский UI, клиентский API-слой, серверные endpoint-методы.</text:p>
                    </text:list-item>
                  </text:list>
                </text:list-item>
                <text:list-item>
                  <text:p text:style-name="P47">Требования к программным средствам, используемым программой:</text:p>
                  <text:list>
                    <text:list-item>
                      <text:p text:style-name="P47">Клиент использует Qt Quick / Qt Quick Controls / Qt Network;</text:p>
                    </text:list-item>
                    <text:list-item>
                      <text:p text:style-name="P47">Сервер использует PHP PDO и веб-сервер с поддержкой запуска PHP-скриптов;</text:p>
                    </text:list-item>
                    <text:list-item>
                      <text:p text:style-name="P47">Для выполнения пользовательского кода используются системные компиляторы/интерпретаторы и утилита timeout;</text:p>
                    </text:list-item>
                    <text:list-item>
                      <text:p text:style-name="P47">Система должна обеспечивать совместимость протокола API между клиентом и сервером при единых именах endpoint-методов.</text:p>
                    </text:list-item>
                  </text:list>
                </text:list-item>
                <text:list-item>
                  <text:p text:style-name="P47">Требования к защите информации и программ:</text:p>
                  <text:list>
                    <text:list-item>
                      <text:p text:style-name="P47">Пароли и восстановительные данные должны храниться в виде хэшей;</text:p>
                    </text:list-item>
                    <text:list-item>
                      <text:p text:style-name="P47">Доступ к защищённым API-методам должен осуществляться только по bearer-токену;</text:p>
                    </text:list-item>
                    <text:list-item>
                      <text:p text:style-name="P47">Для выполнения пользовательского кода должны применяться ограничения времени выполнения;</text:p>
                    </text:list-item>
                    <text:list-item>
                      <text:p text:style-name="P47">Должно быть реализовано разграничение доступа по ролям и запрет несанкционированных операций.</text:p>
                    </text:list-item>
                  </text:list>
                </text:list-item>
              </text:list>
            </text:list-item>
            <text:list-item>
              <text:p text:style-name="P46"><text:soft-page-break/>Специальные требования</text:p>
              <text:list>
                <text:list-item>
                  <text:p text:style-name="P47">Интерфейс должен поддерживать пользовательский сценарий без стандартной системной рамки окна (кастомный заголовок окна);</text:p>
                </text:list-item>
                <text:list-item>
                  <text:p text:style-name="P47">Должна поддерживаться стартовая заставка (Splash Screen);</text:p>
                </text:list-item>
                <text:list-item>
                  <text:p text:style-name="P47">В профиле должен отображаться детализированный прогресс по темам и курсам;</text:p>
                </text:list-item>
                <text:list-item>
                  <text:p text:style-name="P47">Панель преподавателя должна быть доступна только после авторизации учётной записи с ролью teacher;</text:p>
                </text:list-item>
                <text:list-item>
                  <text:p text:style-name="P47">В программе должен быть реализован выход из аккаунта с очисткой локального состояния авторизации.</text:p>
                </text:list-item>
              </text:list>
            </text:list-item>
          </text:list>
        </text:list-item>
      </text:list>
      <text:p text:style-name="P51"/>
      <text:list text:continue-numbering="true" text:style-name="WWNum5">
        <text:list-item>
          <text:p text:style-name="P46">Требования к программной документации</text:p>
          <text:list>
            <text:list-item>
              <text:p text:style-name="P46">Состав программной документации</text:p>
              <text:list>
                <text:list-item>
                  <text:p text:style-name="P47">Техническое задание;</text:p>
                </text:list-item>
                <text:list-item>
                  <text:p text:style-name="P47">Руководство пользователя.</text:p>
                </text:list-item>
              </text:list>
            </text:list-item>
          </text:list>
        </text:list-item>
      </text:list>
      <text:p text:style-name="P51"/>
      <text:list text:continue-numbering="true" text:style-name="WWNum5">
        <text:list-item>
          <text:p text:style-name="P46">Технико-экономическое обоснование</text:p>
          <text:list>
            <text:list-item>
              <text:p text:style-name="P47">Разработка ориентирована на учебный процесс и не предполагает коммерческого лицензирования на этапе ВКР;</text:p>
            </text:list-item>
            <text:list-item>
              <text:p text:style-name="P47">Экономическая эффективность выражается в сокращении времени проверки типовых практических задач за счёт автоматизированной проверки;</text:p>
            </text:list-item>
            <text:list-item>
              <text:p text:style-name="P47">Использование открытых технологий (Qt, PHP, MySQL, компиляторы/интерпретаторы) снижает стоимость внедрения.</text:p>
            </text:list-item>
          </text:list>
        </text:list-item>
      </text:list>
      <text:p text:style-name="P51"/>
      <text:list text:continue-numbering="true" text:style-name="WWNum5">
        <text:list-item>
          <text:p text:style-name="P46">Стадии и этапы разработки</text:p>
          <text:list>
            <text:list-item>
              <text:p text:style-name="P46">Стадии разработки</text:p>
              <text:list>
                <text:list-item>
                  <text:p text:style-name="P47">Разработка технического задания;</text:p>
                </text:list-item>
                <text:list-item>
                  <text:p text:style-name="P47">Рабочее проектирование;</text:p>
                </text:list-item>
                <text:list-item>
                  <text:p text:style-name="P47">Внедрение.</text:p>
                </text:list-item>
              </text:list>
            </text:list-item>
            <text:list-item>
              <text:p text:style-name="P46">Этапы разработки</text:p>
              <text:list>
                <text:list-item>
                  <text:p text:style-name="P47">Разработка технического задания;</text:p>
                </text:list-item>
                <text:list-item>
                  <text:p text:style-name="P47">Разработка программы;</text:p>
                </text:list-item>
                <text:list-item>
                  <text:p text:style-name="P47">Разработка программной документации;</text:p>
                </text:list-item>
                <text:list-item>
                  <text:p text:style-name="P47">Испытания программы;</text:p>
                </text:list-item>
                <text:list-item>
                  <text:p text:style-name="P47">Подготовка и передача программы.</text:p>
                </text:list-item>
              </text:list>
            </text:list-item>
            <text:list-item>
              <text:p text:style-name="P46">Содержание работ по этапам</text:p>
              <text:list>
                <text:list-item>
                  <text:p text:style-name="P47">Разработка технического задания:</text:p>
                  <text:list>
                    <text:list-item>
                      <text:p text:style-name="P47">Постановка задачи;</text:p>
                    </text:list-item>
                    <text:list-item>
                      <text:p text:style-name="P47">Определение и уточнение требований к техническим средствам;</text:p>
                    </text:list-item>
                    <text:list-item>
                      <text:p text:style-name="P47">Определение требований к программе;</text:p>
                    </text:list-item>
                    <text:list-item>
                      <text:p text:style-name="P47">Определение стадий, этапов и сроков разработки программы и документации на неё;</text:p>
                    </text:list-item>
                    <text:list-item>
                      <text:p text:style-name="P47">Согласование и утверждение технического задания.</text:p>
                    </text:list-item>
                  </text:list>
                </text:list-item>
                <text:list-item>
                  <text:p text:style-name="P47">Разработка программы:</text:p>
                  <text:list>
                    <text:list-item>
                      <text:p text:style-name="P47">Программирование;</text:p>
                    </text:list-item>
                    <text:list-item>
                      <text:p text:style-name="P47">Отладка программы.</text:p>
                    </text:list-item>
                    <text:list-item>
                      <text:p text:style-name="P47">Разработка программной документации:</text:p>
                      <text:list>
                        <text:list-item>
                          <text:p text:style-name="P47">Разработка программных документов в соответствии с требованиями к составу документации.</text:p>
                        </text:list-item>
                      </text:list>
                    </text:list-item>
                  </text:list>
                </text:list-item>
                <text:list-item>
                  <text:p text:style-name="P47">Испытаний программы:</text:p>
                  <text:list>
                    <text:list-item>
                      <text:p text:style-name="P47">Разработка, согласование и утверждение и методики испытаний;</text:p>
                    </text:list-item>
                    <text:list-item>
                      <text:p text:style-name="P47"><text:s/>Проведение приемо-сдаточных испытаний;</text:p>
                    </text:list-item>
                    <text:list-item>
                      <text:p text:style-name="P47">Корректировка программы и программной документации по результатам испытаний.</text:p>
                    </text:list-item>
                  </text:list>
                </text:list-item>
                <text:list-item>
                  <text:p text:style-name="P47"><text:soft-page-break/>Подготовка и передача программы:</text:p>
                  <text:list>
                    <text:list-item>
                      <text:p text:style-name="P47">Работа по подготовке и передаче программы и программной документации в эксплуатацию на объектах Заказчика.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text:continue-numbering="true" text:style-name="WWNum5">
        <text:list-item>
          <text:p text:style-name="P46">Порядок контроля и приемки<text:span text:style-name="T9"/></text:p>
          <text:list>
            <text:list-item>
              <text:p text:style-name="P46">Предварительный контроль</text:p>
              <text:list>
                <text:list-item>
                  <text:p text:style-name="P47">Проверка соответствия функциональности приложения требованиям технического задания. Контроль качества кода и отсутствия ошибок.</text:p>
                </text:list-item>
              </text:list>
            </text:list-item>
            <text:list-item>
              <text:p text:style-name="P46">Тестирование</text:p>
              <text:list>
                <text:list-item>
                  <text:p text:style-name="P47">Проверка всех основных функций приложения;</text:p>
                </text:list-item>
                <text:list-item>
                  <text:p text:style-name="P47">Проверка стабильности работы приложения при различных нагрузках;</text:p>
                </text:list-item>
                <text:list-item>
                  <text:p text:style-name="P47">Проверка защиты данных пользователей.</text:p>
                </text:list-item>
              </text:list>
            </text:list-item>
            <text:list-item>
              <text:p text:style-name="P46">Приёмка</text:p>
              <text:list>
                <text:list-item>
                  <text:p text:style-name="P47">Проверка соответствия приложения требованиям безопасности и конфиденциальности данных;</text:p>
                </text:list-item>
                <text:list-item>
                  <text:p text:style-name="P47">Проверка оформления приложения в соответствии с корпоративным стилем компании;</text:p>
                </text:list-item>
                <text:list-item>
                  <text:p text:style-name="P47">Утверждение результатов тестирования.</text:p>
                </text:list-item>
              </text:list>
            </text:list-item>
          </text:list>
        </text:list-item>
      </text:list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3">От ИСПОЛНИТЕЛЯ</text:p>
          </table:table-cell>
          <table:table-cell table:style-name="Table4.A1" office:value-type="string">
            <text:p text:style-name="P54"/>
          </table:table-cell>
          <table:table-cell table:style-name="Table4.A1" office:value-type="string">
            <text:p text:style-name="P53">От ЗАКАЗЧИКА</text:p>
          </table:table-cell>
        </table:table-row>
        <table:table-row>
          <table:table-cell table:style-name="Table4.A2" office:value-type="string">
            <text:p text:style-name="P53">Богодухов А.Г.</text:p>
          </table:table-cell>
          <table:table-cell table:style-name="Table4.A1" office:value-type="string">
            <text:p text:style-name="P54"/>
          </table:table-cell>
          <table:table-cell table:style-name="Table4.A2" office:value-type="string">
            <text:p text:style-name="P53"><text:span text:style-name="T28">ГАПОУ</text:span> «ЧПК»</text:p>
          </table:table-cell>
        </table:table-row>
        <table:table-row>
          <table:table-cell table:style-name="Table4.A1" office:value-type="string">
            <text:p text:style-name="P53">31 октября 2025 г.</text:p>
          </table:table-cell>
          <table:table-cell table:style-name="Table4.A1" office:value-type="string">
            <text:p text:style-name="P54"/>
          </table:table-cell>
          <table:table-cell table:style-name="Table4.A1" office:value-type="string">
            <text:p text:style-name="P53">31 октября 2025 г.</text:p>
          </table:table-cell>
        </table:table-row>
      </table:table>
      <text:p text:style-name="P51"/>
      <text:p text:style-name="P55">2. ПРОЕКТНАЯ ЧАСТЬ</text:p>
      <text:p text:style-name="P37"/>
      <text:p text:style-name="P26">2.1 Проектирование программного продукта</text:p>
      <text:p text:style-name="P56"/>
      <text:p text:style-name="P57">Разрабатываемое приложение предназначено для поддержки процесса обучения программированию в формате онлайн-школы. Продукт обеспечивает просмотр курсов (языков программирования), уроков (тем), теоретических материалов; <text:span text:style-name="T29">в</text:span>ыполнение практических заданий внутри приложения; отправку решений на сервер, запуск кода и проверку по автоматическим тестам; авторизацию пользователя и хранение прогресса. Программный продукт построен по клиент‑серверной архитектуре и состоит из следующих компонентов: <text:span text:style-name="T29">к</text:span>лиентское приложение - десктопное приложение на Qt + QML (Qt Quick Controls) с С++ модулем доступа к API; <text:span text:style-name="T29">с</text:span>ерверная часть (API) - набор PHP‑скриптов, предоставляющих HTTP‑интерфейс для клиента; <text:span text:style-name="T29">б</text:span>аза данных - схема и стартовые данные (курсы, темы, задания, тесты) <text:span text:style-name="T11">[</text:span><text:span text:style-name="T30">3</text:span><text:span text:style-name="T11">]</text:span>.</text:p>
      <text:p text:style-name="P57">Клиентская часть реализована на Qt с использованием QML‑интерфейсов и навигации через стек страниц. Основные особенности: единое окно приложения с пользовательской панелью заголовка и областью контента; навигация между страницами («Курсы» → «Уроки» → «Теория» → «Задание») через StackView; получение данных (курсы/темы/теория/задания) из API и отображение в виде списков и карточек; встроенный редактор кода и блоки для запуска/проверки решения. Также в приложении предусмотрена роль преподавателя (панель учителя), позволяющая создавать курсы, темы, задания и тесты через API <text:span text:style-name="T11">[</text:span><text:span text:style-name="T30">23</text:span><text:span text:style-name="T11">]</text:span>.</text:p>
      <text:p text:style-name="P57">Сервер реализован на PHP и предоставляет отдельные конечные точки для функций приложения: авторизация и управление сессией; получение учебного контента; выполнение и проверка кода; функции преподавателя (создание контента). Выполнение кода организовано через временный каталог на сервере: исходный код сохраняется в файле с соответствующим расширением; для компилируемых языков запускается компиляция с ограничением по времени; <text:soft-page-break/>запуск выполняется с ограничением по времени, входные данные передаются через <text:span text:style-name="T31">стандартный вход</text:span>; вывод программы сравнивается с ожидаемым (для проверки по тестам) <text:span text:style-name="T11">[</text:span><text:span text:style-name="T30">22</text:span><text:span text:style-name="T11">]</text:span>.</text:p>
      <text:p text:style-name="P58">В приложении предусмотрена поддержка нескольких языков программирования: C++, Python, C#, Go. Выбор языка определяется курсом (языком), к которому относится тема и задание. База данных хранит учебный контент, пользователей и результаты обучения. Основные сущности: users - пользователи (логин, хэш пароля, роль); sessions - сессии авторизации (bearer‑токен с временем жизни); languages - курсы по языкам программирования (название, описание, изображение); themes - темы/уроки, привязанные к языку (lang_id), и теоретический материал; tasks - практические задания, привязанные к теме (theme_id); task_tests - набор тестов для задания (вход/ожидаемый вывод); user_theme_progress, user_task_solved - прогресс прохождения тем и решённых заданий. Такая структура позволяет расширять систему: добавлять новые языки, темы и задания без изменения логики клиента.</text:p>
      <text:p text:style-name="P57">При проектировании интерфейса был сделан акцент на следующих принципах: видимость контента: увеличенные шрифты и размеры элементов управления для более комфортного чтения теории и заданий; последовательная навигация: пользователь всегда понимает, где находится, и может вернуться на шаг назад; разделение теории и практики: теория отображается отдельной страницей, задания - отдельной страницей с редактором; оперативная обратная связь: после запуска кода и проверки по тестам пользователь получает статус выполнения.</text:p>
      <text:p text:style-name="P59">2.2 Руководство пользователя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/>
      <text:p text:style-name="P62"/>
      <text:p text:style-name="P62"/>
      <text:p text:style-name="P63"><text:span text:style-name="T32">Д</text:span>есктопно<text:span text:style-name="T32">е </text:span>приложени<text:span text:style-name="T32">е</text:span> для онлайн-школы по программированию</text:p>
      <text:p text:style-name="P63">Руководство пользователя</text:p>
      <text:p text:style-name="P63">Версия 1.0 </text:p>
      <text:p text:style-name="P63">2026 год</text:p>
      <text:p text:style-name="P64">СОДЕРЖАНИЕ</text:p>
      <text:p text:style-name="P6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6">1. Введение<text:span text:style-name="T6"> .........................................................................................................</text:span></text:p>
          </table:table-cell>
          <table:table-cell table:style-name="Table3.A1" office:value-type="string">
            <text:p text:style-name="P67">2<text:span text:style-name="T33">3</text:span></text:p>
          </table:table-cell>
        </table:table-row>
        <table:table-row>
          <table:table-cell table:style-name="Table3.A1" office:value-type="string">
            <text:p text:style-name="P66">2. Общие сведения о программе <text:span text:style-name="T6">....................................................................</text:span></text:p>
          </table:table-cell>
          <table:table-cell table:style-name="Table3.A1" office:value-type="string">
            <text:p text:style-name="P67">2<text:span text:style-name="T33">4</text:span></text:p>
          </table:table-cell>
        </table:table-row>
        <table:table-row>
          <table:table-cell table:style-name="Table3.A1" office:value-type="string">
            <text:p text:style-name="P66">3. Рекомендуемый первичный порядок действий <text:span text:style-name="T6">.....................................</text:span></text:p>
          </table:table-cell>
          <table:table-cell table:style-name="Table3.B3" office:value-type="float" office:value="25">
            <text:p text:style-name="P68">2<text:span text:style-name="T8">5</text:span></text:p>
          </table:table-cell>
        </table:table-row>
        <table:table-row>
          <table:table-cell table:style-name="Table3.A1" office:value-type="string">
            <text:p text:style-name="P69">3.1 <text:span text:style-name="T34">У</text:span><text:span text:style-name="T35">становка приложения </text:span><text:span text:style-name="T36">......................................................................</text:span></text:p>
          </table:table-cell>
          <table:table-cell table:style-name="Table3.A1" office:value-type="string">
            <text:p text:style-name="P70">2<text:span text:style-name="T8">5</text:span></text:p>
          </table:table-cell>
        </table:table-row>
        <table:table-row>
          <table:table-cell table:style-name="Table3.A1" office:value-type="string">
            <text:p text:style-name="P66">4. Работа программы <text:span text:style-name="T6">.......................................................................................</text:span></text:p>
          </table:table-cell>
          <table:table-cell table:style-name="Table3.A1" office:value-type="string">
            <text:p text:style-name="P71">2<text:span text:style-name="T8">6</text:span></text:p>
          </table:table-cell>
        </table:table-row>
      </table:table>
      <text:p text:style-name="P72"/>
      <text:p text:style-name="P73">1. ВВЕДЕНИЕ</text:p>
      <text:p text:style-name="P56"/>
      <text:p text:style-name="P74">Цель данного руководства - помочь пользователю быстро освоить программный продукт «Школа программирования»: от первого запуска приложения и регистрации до изучения теоретических материалов, выполнения практических заданий и отслеживания личного прогресса. Продукт представляет собой учебную платформу с клиентским приложением на базе Qt/QML и серверной API-частью, которая обеспечивает хранение данных, авторизацию и работу с курсами, темами, заданиями и тестами. Данное руководство предназначено для студентов, преподавателей и администраторов учебного процесса, использующих систему как в учебной аудитории, так и при самостоятельной подготовке. Платформа позволяет выстроить последовательное обучение: пользователь выбирает курс (язык программирования), затем тему, изучает теорию, после чего переходит к практическому заданию. Такой подход помогает сочетать объяснение материала и немедленную практику, а также делает процесс обучения более наглядным и структурированным.</text:p>
      <text:p text:style-name="P62">В приложении предусмотрены отдельные сценарии работы для двух ролей - «студент» и «преподаватель». Студент получает доступ к каталогу курсов, разделам теории, практическим задачам и странице профиля с прогрессом обучения. Преподаватель, помимо стандартной навигации, может использовать специальную панель для наполнения системы: создавать новые курсы, темы, задания и тесты. Таким образом, продукт одновременно решает две задачи: обучение пользователей и удобное управление образовательным контентом.</text:p>
      <text:p text:style-name="P75">В настоящем руководстве подробно описаны общие сведения о программе, логика интерфейса и пошаговый порядок работы с основными функциями. Структура изложения построена таким образом, чтобы пользователь мог последовательно пройти все ключевые этапы: вход в систему, выбор разделов, выполнение заданий, восстановление пароля при необходимости и выход из учетной записи. Также приведены рекомендации по корректному использованию разделов и контролю результатов обучения.</text:p>
      <text:p text:style-name="P76">2. ОБЩИЕ СВЕДЕНИЯ О ПРОГРАММЕ</text:p>
      <text:p text:style-name="P77"/>
      <text:p text:style-name="P78">Программный продукт «Школа программирования» представляет собой клиент-серверную обучающую систему, ориентированную на изучение программирования по курсам и темам. Архитектура решения включает три основных уровня: серверные HTTP-endpoints, клиентский C++-слой взаимодействия с API и графический интерфейс пользователя на QML. Такое разделение обеспечивает удобство развития проекта: сервер отвечает за бизнес-логику и данные, а клиент - за отображение и взаимодействие с пользователем. Функционально система поддерживает: регистрацию и авторизацию пользователей; разделение прав по ролям «student» и «teacher»; просмотр списка курсов; переход к темам выбранного курса; просмотр теоретических материалов; выполнение практических заданий; просмотр прогресса прохождения; восстановление пароля; создание контента преподавателем.</text:p>
      <text:p text:style-name="P78">Серверная часть предоставляет набор API-методов для операций с пользователями, сессиями, курсами, темами, заданиями и прогрессом. Авторизация реализуется с помощью bearer-токена сессионного типа. При входе пользователя создается сессия, а устаревшие сессии удаляются автоматически. Это позволяет поддерживать контролируемый доступ к защищенным операциям и корректную работу личных данных в профиле. Клиентская часть запускается в окне приложения с пользовательской навигацией и поддерживает сценарий переходов через стек страниц. Если для выполнения целевого действия требуется авторизация, система перенаправляет на страницу входа/регистрации и после успешной аутентификации возвращает пользователя в нужный раздел.</text:p>
      <text:p text:style-name="P78">Для преподавателя доступна отдельная панель с вкладками управления контентом. В ней можно добавлять новые учебные сущности через формы ввода, выбирать существующие курсы и темы из выпадающих списков, а также заполнять текстовые поля теории и условий задач. Это дает возможность использовать систему как конструктор учебных материалов без изменения исходного кода.</text:p>
      <text:p text:style-name="P79">3. РЕКОМЕНДУЕМЫЙ ПЕРВИЧНЫЙ ПОРЯДОК ДЕЙСТВИЙ</text:p>
      <text:p text:style-name="P80"/>
      <text:p text:style-name="P81">3.1 Установка приложения</text:p>
      <text:p text:style-name="P82"/>
      <text:p text:style-name="P83">Для установки приложения онлайн-школы <text:span text:style-name="T37">по </text:span>программировани<text:span text:style-name="T37">ю </text:span>необходимо перейти на официальный сайт проекта: <text:a xlink:type="simple" xlink:href="https://diploma.bogaledev.ru/" text:style-name="Internet_20_link" text:visited-style-name="Visited_20_Internet_20_Link">https://diploma.bogaledev.r<text:span text:style-name="T37">u</text:span></text:a><text:span text:style-name="T37"> (</text:span>Рисунок 1), выбрать версию для целевой операционной системы (Windows или Linux), загрузить архив и распаковать его в выбранный рабочий каталог.</text:p>
      <text:p text:style-name="P84"><draw:frame draw:style-name="fr1" draw:name="Image9" text:anchor-type="paragraph" svg:width="12cm" svg:height="8.25cm" draw:z-index="8"><draw:image xlink:href="Pictures/10000001000006040000041F50745D69.png" xlink:type="simple" xlink:show="embed" xlink:actuate="onLoad" draw:mime-type="image/png"/></draw:frame>Рисунок 1 - <text:span text:style-name="T38">Страница сайта для установки</text:span></text:p>
      <text:p text:style-name="P83">Для операционной системы Windows после распаковки архива приложение готово к запуску. В релизе предварительно выполнено развёртывание необходимых Qt-компонентов (windeployqt), поэтому запуск осуществляется непосредственно через исполняемый файл DiplomaApp.exe.</text:p>
      <text:p text:style-name="P83">Для операционной системы Linux после распаковки архива требуется установить недостающие системные зависимости и дополнительные пакеты Qt с использованием штатного пакетного менеджера дистрибутива. После установки зависимостей приложение запускается через исполняемый файл DiplomaApp.</text:p>
      <text:p text:style-name="P85"><text:span text:style-name="T35">4. </text:span>РАБОТА ПРОГРАММЫ</text:p>
      <text:p text:style-name="P86"/>
      <text:p text:style-name="P87">Пользовательский интерфейс приложения реализован в виде единого окна с последовательной навигацией по учебному сценарию: выбор курса → выбор темы → изучение теории → выполнение задания. В верхней части окна всегда доступна пользовательская кнопка профиля для быстрого перехода в личный кабинет и кнопка закрытия приложения. Сразу после запуска отображается заставка (Рисунок <text:span text:style-name="T37">2</text:span>), затем открывается основная рабочая область.</text:p>
      <text:p text:style-name="P88"><draw:frame draw:style-name="fr2" draw:name="Image1" text:anchor-type="paragraph" svg:width="12cm" svg:height="7.999cm" draw:z-index="0"><draw:image xlink:href="Pictures/10000001000005E3000003F4E19DD676.png" xlink:type="simple" xlink:show="embed" xlink:actuate="onLoad" draw:mime-type="image/png"/></draw:frame>Рисунок <text:span text:style-name="T37">2 - </text:span><text:span text:style-name="T38">Заставка приложения</text:span></text:p>
      <text:p text:style-name="P87">После завершения заставки пользователь попадает на первую рабочую страницу (Рисунок <text:span text:style-name="T37">3</text:span>) - список курсов (языков программирования). Каждый элемент списка содержит название и описание курса. <text:span text:style-name="T39">В</text:span>ыбор курса выполняется нажатием на карточку элемента. Эта страница является стартовой точкой пользовательского пути.</text:p>
      <text:p text:style-name="P88"><draw:frame draw:style-name="fr3" draw:name="Image2" text:anchor-type="paragraph" svg:width="12cm" svg:height="7.999cm" draw:z-index="1"><draw:image xlink:href="Pictures/10000001000005E3000003F465AC5D0C.png" xlink:type="simple" xlink:show="embed" xlink:actuate="onLoad" draw:mime-type="image/png"/></draw:frame><text:soft-page-break/>Рисунок <text:span text:style-name="T37">3 - </text:span><text:span text:style-name="T38">Список языков</text:span></text:p>
      <text:p text:style-name="P87">После выбора курса открывается окно со списком тем (Рисунок <text:span text:style-name="T37">4</text:span>). На странице отображаются все темы по выбранному языку программирования; переход к следующему шагу выполняется выбором нужной темы. Для удобства каждая тема сопровождается кратким пояснением.</text:p>
      <text:p text:style-name="P89"/>
      <text:p text:style-name="P90"><draw:frame draw:style-name="fr3" draw:name="Image3" text:anchor-type="paragraph" svg:width="12cm" svg:height="7.999cm" draw:z-index="2"><draw:image xlink:href="Pictures/10000001000005E3000003F421C42F62.png" xlink:type="simple" xlink:show="embed" xlink:actuate="onLoad" draw:mime-type="image/png"/></draw:frame>Рисунок <text:span text:style-name="T37">4 - </text:span><text:span text:style-name="T38">Список уроков</text:span></text:p>
      <text:p text:style-name="P87">После выбора темы открывается <text:span text:style-name="T40">окно с</text:span> теоретическ<text:span text:style-name="T40">им</text:span> материа<text:span text:style-name="T40">лом</text:span> (Рисунок <text:span text:style-name="T37">5</text:span>). В верхней части отображается текст теории, а ниже - кнопки перехода к практическим заданиям темы. Выбор задания выполняется нажатием соответствующей кнопки.</text:p>
      <text:p text:style-name="P91"><draw:frame draw:style-name="fr3" draw:name="Image4" text:anchor-type="paragraph" svg:width="12cm" svg:height="7.999cm" draw:z-index="3"><draw:image xlink:href="Pictures/10000001000005E3000003F416332F05.png" xlink:type="simple" xlink:show="embed" xlink:actuate="onLoad" draw:mime-type="image/png"/></draw:frame><text:soft-page-break/>Рисунок <text:span text:style-name="T37">5 - </text:span><text:span text:style-name="T38">Теоретический материал</text:span></text:p>
      <text:p text:style-name="P87">Если пользователь пытается открыть задание или личный кабинет без входа в систему, приложение автоматически открывает окно авторизации (Рисунок <text:span text:style-name="T37">6</text:span>). В этом окне доступны стандартные режимы: вход, регистрация и восстановление пароля. После успешной авторизации пользователь возвращается к запрошенному ранее действию.</text:p>
      <text:p text:style-name="P91"><draw:frame draw:style-name="fr3" draw:name="Image5" text:anchor-type="paragraph" svg:width="12cm" svg:height="7.999cm" draw:z-index="4"><draw:image xlink:href="Pictures/10000001000005E3000003F4DE5E6B60.png" xlink:type="simple" xlink:show="embed" xlink:actuate="onLoad" draw:mime-type="image/png"/></draw:frame>Рисунок <text:span text:style-name="T37">6 - </text:span><text:span text:style-name="T38">Авторизация</text:span></text:p>
      <text:p text:style-name="P87">Окно задания (Рисунок <text:span text:style-name="T37">7</text:span>) содержит все основные элементы практической работы: текст условия задания; поле редактора кода; блок публичного примера (вход/выход); поле «Свой тест» для ввода пользовательских данных; кнопки «Запустить» <text:span text:style-name="T40">для</text:span> запуск решения на пользовательском вводе <text:span text:style-name="T40">и </text:span>«Отправить» <text:span text:style-name="T40">для</text:span> <text:soft-page-break/>проверк<text:span text:style-name="T40">и</text:span> решения на автоматических тестах. Ниже выводится <text:span text:style-name="T40">блок с результатом выполнения</text:span> (успешный запуск, ошибка компиляции/выполнения, число пройденных тестов, принятие решения). Таким образом, пользователь получает оперативную обратную связь после каждого действия.</text:p>
      <text:p text:style-name="P91"><draw:frame draw:style-name="fr3" draw:name="Image6" text:anchor-type="paragraph" svg:width="12cm" svg:height="7.999cm" draw:z-index="5"><draw:image xlink:href="Pictures/10000001000005E3000003F484B186BF.png" xlink:type="simple" xlink:show="embed" xlink:actuate="onLoad" draw:mime-type="image/png"/></draw:frame>Рисунок <text:span text:style-name="T37">7 - </text:span><text:span text:style-name="T38">Практическое задание</text:span></text:p>
      <text:p text:style-name="P87">Окно личного кабинета открывается по кнопке профиля после авторизации (Рисунок <text:span text:style-name="T37">8</text:span>). Здесь отображаются: общий прогресс обучения в процентах; прогресс по каждому курсу в виде полосы заполнения; кнопка «Выйти из аккаунта» для завершения сессии. Страница используется для мониторинга результатов обучения и управления текущим входом пользователя.</text:p>
      <text:p text:style-name="P91"><draw:frame draw:style-name="fr3" draw:name="Image7" text:anchor-type="paragraph" svg:width="12cm" svg:height="7.999cm" draw:z-index="6"><draw:image xlink:href="Pictures/10000001000005E3000003F40E1DBFF7.png" xlink:type="simple" xlink:show="embed" xlink:actuate="onLoad" draw:mime-type="image/png"/></draw:frame>Рисунок <text:span text:style-name="T37">8 - </text:span><text:span text:style-name="T38">Прогресс обучения</text:span></text:p>
      <text:p text:style-name="P92"><text:soft-page-break/>Если аккаунт имеет роль <text:span text:style-name="T41">учителя</text:span>, вместо личного кабинета открывается окно «Панель учителя» (Рисунок <text:span text:style-name="T37">9</text:span>). Вкладки панели предоставляют инструменты администрирования учебного контента: «Новый курс» - создание нового курса (языка); «Новая тема» - добавление темы и теоретического материала; «Новое задание» - создание практического задания; «Новый тест» - добавление теста для автоматической проверки; «Выйти» - выход из учётной записи преподавателя. Этот интерфейс обеспечивает полный цикл наполнения системы учебными материалами без перехода во внешние административные инструменты.</text:p>
      <text:p text:style-name="P93"><draw:frame draw:style-name="fr3" draw:name="Image8" text:anchor-type="paragraph" svg:width="12cm" svg:height="7.999cm" draw:z-index="7"><draw:image xlink:href="Pictures/10000001000005E3000003F4C418C31F.png" xlink:type="simple" xlink:show="embed" xlink:actuate="onLoad" draw:mime-type="image/png"/></draw:frame>Рисунок <text:span text:style-name="T37">9 - </text:span><text:span text:style-name="T38">Панель учителя</text:span></text:p>
      <text:p text:style-name="P94"/>
      <text:p text:style-name="P94">2.3 Результаты апробации</text:p>
      <text:p text:style-name="P94"/>
      <text:p text:style-name="P92">Апробация разработанного программного приложения проводилась на заключительном этапе выполнения выпускной квалификационной работы и была направлена на проверку его практической применимости, устойчивости работы пользовательских сценариев и качества восприятия целевой аудиторией.</text:p>
      <text:p text:style-name="P92">В рамках внешней профессионально-ориентированной оценки проект был представлен 24 апреля 2026 года на XXII Межрегиональной студенческой научно-практической конференции «Студент. Образование. Общество XXI века: профессиональное становление в эпоху цифровой трансформации и <text:soft-page-break/>искусственного интеллекта» в тематическом направлении «Цифровая трансформация общества: цифровые проекты, ИИ, Интернет вещей, большие данные, блокчейн». Демонстрация приложения в формате научного доклада позволила получить экспертную обратную связь в академической среде и подтвердить актуальность выбранной темы исследования в контексте цифровизации образовательных и общественных процессов.</text:p>
      <text:p text:style-name="P92">Дополнительно была проведена пользовательская апробация с участием преподавателей и студентов: приложение протестировали несколько преподавателей и одногруппников. Проверка включала базовые сценарии взаимодействия с интерфейсом, навигацию по ключевым разделам, выполнение целевых действий пользователя и общую оценку удобства использования. По результатам тестирования существенных затруднений в работе с системой выявлено не было; участники отметили логичность структуры, понятность интерфейса и практическую полезность реализованного функционала.</text:p>
      <text:p text:style-name="P92">Содержательный анализ собранной обратной связи показал, что разработанное приложение корректно решает поставленные прикладные задачи и может быть рекомендовано к дальнейшему использованию и развитию. Положительные отзывы преподавателей и студентов свидетельствуют о соответствии реализованного решения ожиданиям потенциальных пользователей и подтверждают перспективность его дальнейшего внедрения в учебно-практическую деятельность.</text:p>
      <text:p text:style-name="P92">Таким образом, результаты апробации подтверждают работоспособность, востребованность и практическую значимость разработанного приложения. Полученные данные могут служить основанием для последующего расширения функциональных возможностей системы, углубления аналитических модулей и масштабирования опыта применения в смежных образовательных и проектных контекстах.</text:p>
      <text:p text:style-name="P95">ЗАКЛЮЧЕНИЕ</text:p>
      <text:p text:style-name="P96"/>
      <text:p text:style-name="P92">Выпускная квалификационная работа на тему «Разработка десктопного приложения для онлайн-школы по программированию» посвящена решению практико-ориентированной задачи повышения качества обучения в цифровой среде. Актуальность проекта обусловлена тем, что современное онлайн-обучение программированию требует не только доступа к теории, но и непрерывной практики, оперативной проверки решений и удобной учебной инфраструктуры. На этапе постановки задачи была определена ключевая проблема: разрыв между изучением материалов и выполнением программных заданий, а также высокая зависимость эффективности обучения от технической подготовки обучающихся <text:span text:style-name="T11">[</text:span><text:span text:style-name="T21">3</text:span><text:span text:style-name="T11">]</text:span>.</text:p>
      <text:p text:style-name="P92">В соответствии с поставленной целью в проекте последовательно решены все запланированные задачи. <text:span text:style-name="T42">А</text:span>нализ предметной области выполнен через изучение специфики онлайн-обучения программированию, образовательных сценариев и потребностей целевых пользователей. В результате сформировано обоснование структуры будущей системы: единое приложение, объединяющее теоретический контент, практические задания и инструменты контроля результатов. <text:span text:style-name="T42">Т</text:span>ехническо<text:span text:style-name="T42">е</text:span> задани<text:span text:style-name="T42">е</text:span> <text:span text:style-name="T42">разработано </text:span>с определением функциональных и нефункциональных требований, ролей пользователей, ограничений и критериев качества. Это позволило сформировать прозрачную основу для проектирования и дальнейшей реализации решения, а также обеспечить проверяемость соответствия итогового продукта заявленным требованиям.</text:p>
      <text:p text:style-name="P92"><text:span text:style-name="T42">П</text:span>рограммно<text:span text:style-name="T42">е</text:span> обеспечени<text:span text:style-name="T42">е создано </text:span>через реализацию клиент-серверной архитектуры приложения. В ходе разработки обеспечено взаимодействие между пользовательским интерфейсом и серверной частью, реализованы механизмы аутентификации, управление учебным контентом, получение и обработка результатов выполнения заданий. Отдельное внимание уделено целостности данных и устойчивости основных пользовательских сценариев, что критически <text:soft-page-break/>важно для образовательных систем, ориентированных на регулярную учебную работу <text:span text:style-name="T11">[</text:span><text:span text:style-name="T43">20</text:span><text:span text:style-name="T11">]</text:span>.</text:p>
      <text:p text:style-name="P92"><text:span text:style-name="T42">Р</text:span>азработка пользовательского интерфейса выполнена с учётом принципов понятности, логичности и минимизации когнитивной нагрузки. В интерфейсе организована последовательная навигация по разделам «темы», «теория», «задания» и «результаты», что делает учебный процесс структурированным и предсказуемым для обучающегося. Для преподавателя обеспечены инструменты формирования и сопровождения учебных материалов. <text:span text:style-name="T42">Р</text:span>уководств<text:span text:style-name="T42">о</text:span> пользователя <text:span text:style-name="T42">п</text:span>одгото<text:span text:style-name="T42">влено</text:span>. Документация описывает ключевые сценарии работы с системой и снижает порог входа для разных категорий пользователей.</text:p>
      <text:p text:style-name="P92">В ходе проектирования и реализации подтверждена достижимость главного результата: создано работоспособное десктопное приложение для онлайн-школы по программированию, обеспечивающее интеграцию теоретической и практической составляющих обучения. Разработанное решение позволяет обучающемуся проходить материал последовательно, выполнять задания в единой среде, оперативно получать обратную связь и видеть динамику собственного прогресса. Для преподавателя система формирует удобный контур управления контентом и контроля учебной активности <text:span text:style-name="T11">[</text:span><text:span text:style-name="T21">10</text:span><text:span text:style-name="T11">]</text:span>.</text:p>
      <text:p text:style-name="P92">Практическая значимость проекта заключается в возможности непосредственного внедрения результата в деятельность онлайн-школ, колледжей и иных образовательных организаций, реализующих подготовку в сфере программирования. Приложение может использоваться как самостоятельный учебный инструмент и как компонент существующей цифровой образовательной среды. В обоих случаях достигается снижение технических барьеров, сокращение времени на организацию учебной работы и повышение дисциплины прохождения материалов за счёт понятного маршрута обучения <text:span text:style-name="T11">[</text:span><text:span text:style-name="T21">9</text:span><text:span text:style-name="T11">]</text:span>.</text:p>
      <text:p text:style-name="P92">Результаты апробации показали, что пользователи положительно оценивают удобство интерфейса, структурированность контента и полезность <text:soft-page-break/>практических модулей. Это подтверждает корректность принятых архитектурных и интерфейсных решений, а также обоснованность выбранной концепции объединения теории и практики в едином приложении. Полученные выводы позволяют рассматривать разработку как устойчивую основу для дальнейшего развития.</text:p>
      <text:p text:style-name="P92">Перспективы совершенствования проекта включают расширение набора поддерживаемых языков программирования, внедрение адаптивных траекторий обучения, развитие аналитических инструментов для преподавателя и интеграцию с внешними образовательными сервисами. Дополнительным направлением может стать <text:span text:style-name="T30">изоляция выполнения</text:span> кода <text:span text:style-name="T44">для дополнительной защиты</text:span>, <text:span text:style-name="T30">а также </text:span>оценк<text:span text:style-name="T44">а</text:span> качества решений по нескольким критериям и персонализированные рекомендации по <text:span text:style-name="T30">направлению</text:span> <text:span text:style-name="T43">[16]</text:span>.</text:p>
      <text:p text:style-name="P92">Таким образом, цель выпускной квалификационной работы достигнута в полном объёме, а все поставленные задачи последовательно решены. Разработанное десктопное приложение подтвердило работоспособность, методическую обоснованность и прикладную ценность. Итоговый результат имеет практическую применимость в образовательной сфере, способствует повышению качества обучения программированию и может быть масштабирован в рамках дальнейшей цифровой трансформации учебного процесса.</text:p>
      <text:p text:style-name="P95">СПИСОК ИСПОЛЬЗОВАННЫХ ИСТОЧНИКОВ</text:p>
      <text:p text:style-name="P96"/>
      <text:list text:style-name="L1">
        <text:list-item>
          <text:p text:style-name="P97">ГОСТ Р 56939-2024. Защита информации. Разработка безопасного программного обеспечения. Общие требования.</text:p>
        </text:list-item>
        <text:list-item>
          <text:p text:style-name="P98">ГОСТ Р 59547-2021. Защита информации. <text:span text:style-name="T45">М</text:span>ониторинг информационной безопасности. Общие положения.</text:p>
        </text:list-item>
        <text:list-item>
          <text:p text:style-name="P97">ГОСТ Р 59793-­2021. Информационные технологии. <text:span text:style-name="T45">К</text:span>омплекс стандартов на автоматизированные системы. Автоматизированные системы. Стадии создания.</text:p>
        </text:list-item>
        <text:list-item>
          <text:p text:style-name="P97">ГОСТ Р ИСО/МЭК 25022-2021. Системная и программная инженерия. Требования и оценка качества систем и программного обеспечения (SquaRE). Измерение качества при использовании.</text:p>
        </text:list-item>
        <text:list-item>
          <text:p text:style-name="P99">Российская федерация. Федеральный закон. Об образовании в российской федерации : <text:span text:style-name="T46">Ф</text:span>едеральный закон от 29.12.2012 № 273-ФЗ (ред. от 29.12.2025).</text:p>
        </text:list-item>
        <text:list-item>
          <text:p text:style-name="P100">Министерств<text:span text:style-name="T47">о</text:span> образования и науки <text:span text:style-name="T47">РФ</text:span>. <text:span text:style-name="T47">О</text:span>б утверждении федерального государственного образовательного стандарта среднего профессионального образования по специальности 09.02.07 Информационные системы и программирование : Приказ Министерства образования и науки РФ от 9.<text:span text:style-name="T47">12.</text:span>2016 г. <text:span text:style-name="T47">№</text:span> 1547 (ред. от 23.08.2024).</text:p>
        </text:list-item>
        <text:list-item>
          <text:p text:style-name="P100">Правительство российской федерации. Об утверждении положения о государственной аккредитации образовательной деятельности : <text:span text:style-name="T46">П</text:span>остановление <text:span text:style-name="T47">п</text:span>равительства РФ от 19.05.2023 <text:span text:style-name="T47">№</text:span> 797.</text:p>
        </text:list-item>
        <text:list-item>
          <text:p text:style-name="P97">Правительство российской федерации. Об утверждении Правил применения организациями, осуществляющими образовательную деятельность, электронного обучения, дистанционных образовательных технологий при реализации образовательных программ : Постановление Правительства <text:span text:style-name="T46">РФ </text:span>от 11.10.2023 <text:span text:style-name="T46">№ </text:span>1678.</text:p>
        </text:list-item>
        <text:list-item>
          <text:p text:style-name="P97"><text:soft-page-break/>Сафонов, А. А. <text:s/>Цифровая трансформация образования : учебник и практикум для вузов / А. А. Сафонов, М. А. Сафонова. - Москва : Издательство Юрайт, 2026. - 100 с.</text:p>
        </text:list-item>
        <text:list-item>
          <text:p text:style-name="P97">Савиных, Г. П. <text:s/>Дидактика и оценивание в цифровую эпоху : учебник для вузов / Г. П. Савиных. - Москва : Издательство Юрайт, 2026. - 99 с.</text:p>
        </text:list-item>
        <text:list-item>
          <text:p text:style-name="P97">Дрозд, К. В. <text:s/>Проектирование образовательной среды : учебник для вузов / К. В. Дрозд, И. В. Плаксина. - 2-е изд., испр. и доп. - Москва : Издательство Юрайт, 2026. - 421 с.</text:p>
        </text:list-item>
        <text:list-item>
          <text:p text:style-name="P97">Национальный проект «Экономика данных и цифровая трансформация государства» [Электронный ресурс]. URL: <text:a xlink:type="simple" xlink:href="http://government.ru/rugovclassifier/923/about" text:style-name="Internet_20_link" text:visited-style-name="Visited_20_Internet_20_Link">http://government.ru/rugovclassifier/923/about</text:a> (дата обращения: 05.02.2026).</text:p>
        </text:list-item>
        <text:list-item>
          <text:p text:style-name="P97">Федеральный проект «Профессионалитет» [Электронный ресурс]. URL: <text:a xlink:type="simple" xlink:href="https://firpo.ru/activities/projects/federalnyy-proekt-professionalitet" text:style-name="Internet_20_link" text:visited-style-name="Visited_20_Internet_20_Link">https://firpo.ru/activities/projects/federalnyy-proekt-professionalitet</text:a> (дата обращения: 15.02.2026).</text:p>
        </text:list-item>
        <text:list-item>
          <text:p text:style-name="P97">Цифровой образовательный контент. <text:span text:style-name="T48">Информатизация образования </text:span>[Электронный ресурс]. URL: <text:a xlink:type="simple" xlink:href="https://kirovipk.ru/informatization/digital-educational-content" text:style-name="Internet_20_link" text:visited-style-name="Visited_20_Internet_20_Link">https://kirovipk.ru/informatization/digital-educational-content</text:a> (дата обращения: 19.02.2026).</text:p>
        </text:list-item>
        <text:list-item>
          <text:p text:style-name="P97">Цифровые технологии в образовании: как современные инструменты помогают учителям [Электронный ресурс]. URL: <text:a xlink:type="simple" xlink:href="https://ioe.hse.ru/digitalineducation" text:style-name="Internet_20_link" text:visited-style-name="Visited_20_Internet_20_Link">https://ioe.hse.ru/digitalineducation</text:a> (дата обращения: 11.01.2026).</text:p>
        </text:list-item>
        <text:list-item>
          <text:p text:style-name="P97">Docker Inc. Docker Docs [Электронный ресурс]. URL: <text:a xlink:type="simple" xlink:href="https://docs.docker.com/" text:style-name="Internet_20_link" text:visited-style-name="Visited_20_Internet_20_Link">https://docs.docker.com</text:a> (дата обращения: 07.02.2026).</text:p>
        </text:list-item>
        <text:list-item>
          <text:p text:style-name="P97">MariaDB Server Documentation [Электронный ресурс]. URL: <text:a xlink:type="simple" xlink:href="https://mariadb.com/docs/server" text:style-name="Internet_20_link" text:visited-style-name="Visited_20_Internet_20_Link">https://mariadb.com/docs/server</text:a> (дата обращения: 04.03.2026).</text:p>
        </text:list-item>
        <text:list-item>
          <text:p text:style-name="P97">Mozilla Developer Network. HTTP overview [Электронный ресурс]. URL: <text:a xlink:type="simple" xlink:href="https://developer.mozilla.org/en-US/docs/Web/HTTP/Guides/Overview" text:style-name="Internet_20_link" text:visited-style-name="Visited_20_Internet_20_Link">https://developer.mozilla.org/en-US/docs/Web/HTTP/Guides/Overview</text:a> (дата обращения: 19.01.2026).</text:p>
        </text:list-item>
        <text:list-item>
          <text:p text:style-name="P97">NIST. Secure Software Development Framework (SSDF) [Электронный ресурс]. URL: <text:a xlink:type="simple" xlink:href="https://csrc.nist.gov/projects/ssdf" text:style-name="Internet_20_link" text:visited-style-name="Visited_20_Internet_20_Link">https://csrc.nist.gov/projects/ssdf</text:a> (дата обращения: 31.01.2026).</text:p>
        </text:list-item>
        <text:list-item>
          <text:p text:style-name="P97"><text:soft-page-break/>OpenAPI Initiative. OpenAPI Specification v3.2.0 [Электронный ресурс]. URL: <text:a xlink:type="simple" xlink:href="https://spec.openapis.org/oas/latest.html" text:style-name="Internet_20_link" text:visited-style-name="Visited_20_Internet_20_Link">https://spec.openapis.org/oas/latest.html</text:a> (дата обращения: 21.02.2026).</text:p>
        </text:list-item>
        <text:list-item>
          <text:p text:style-name="P97">The OWASP Foundation. OWASP Top Ten Web Application Security Risks [Электронный ресурс]. URL: <text:a xlink:type="simple" xlink:href="https://owasp.org/www-project-top-ten" text:style-name="Internet_20_link" text:visited-style-name="Visited_20_Internet_20_Link">https://owasp.org/www-project-top-ten</text:a> (дата обращения: 26.01.2026).</text:p>
        </text:list-item>
        <text:list-item>
          <text:p text:style-name="P97"><text:span text:style-name="T49">The </text:span>PHP Group. PHP Manual [Электронный ресурс]. URL: <text:a xlink:type="simple" xlink:href="https://www.php.net/docs.php" text:style-name="Internet_20_link" text:visited-style-name="Visited_20_Internet_20_Link">https://www.php.net/docs.php</text:a> (дата обращения: 07.03.2026).</text:p>
        </text:list-item>
        <text:list-item>
          <text:p text:style-name="P101">Qt Company. Qt Quick and QML [Электронный ресурс]. URL: <text:a xlink:type="simple" xlink:href="https://doc.qt.io/qt-6/qtquick-index.html" text:style-name="Internet_20_link" text:visited-style-name="Visited_20_Internet_20_Link">https://doc.qt.io/qt-6/qtquick-index.html</text:a> (дата обращения: 26.02.2026).</text:p>
        </text:list-item>
        <text:list-item>
          <text:p text:style-name="P97">Qt Company. Qt 6 Documentation [Электронный ресурс]. URL: <text:a xlink:type="simple" xlink:href="https://doc.qt.io/qt-6" text:style-name="Internet_20_link" text:visited-style-name="Visited_20_Internet_20_Link">https://doc.qt.io/qt-6</text:a> (дата обращения: 02.02.2026).</text:p>
        </text:list-item>
        <text:list-item>
          <text:p text:style-name="P97">Qt Company. Qt Network [Электронный ресурс]. URL: <text:a xlink:type="simple" xlink:href="https://doc.qt.io/qt-6/qtnetwork-index.html" text:style-name="Internet_20_link" text:visited-style-name="Visited_20_Internet_20_Link">https://doc.qt.io/qt-6/qtnetwork-index.html</text:a> (дата обращения: 0<text:span text:style-name="T49">1</text:span>.03.2026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line-height="100%" fo:text-indent="1.251cm" style:auto-text-indent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line-height="100%" fo:text-indent="0cm" style:auto-text-indent="false"/>
      <style:text-properties fo:font-weight="bold" style:letter-kerning="false" style:font-name-asian="Calibri1" style:font-family-asian="Calibri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  <style:text-properties style:letter-kerning="fals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2.04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loext:opacity="100%" style:font-name="Times New Roman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MP2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" fo:font-size="14pt" officeooo:paragraph-rsid="000f53be" style:font-size-asian="14pt" style:font-name-complex="Times New Roman1" style:font-size-complex="14pt">
        <loext:char-complex-color loext:theme-type="dark1" loext:color-type="theme"/>
      </style:text-properties>
    </style:style>
    <style:style style:name="MT1" style:family="text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  <style:footer-first>
        <text:h text:style-name="MP2" text:outline-level="2" loext:marker-style-name="MT1">Чита</text:h>
        <text:h text:style-name="MP2" text:outline-level="2" loext:marker-style-name="MT1">2026</text:h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14T10:11:00</meta:creation-date>
    <meta:initial-creator>bogale</meta:initial-creator>
    <dc:language>ru-RU</dc:language>
    <dc:date>2026-05-25T00:39:58.525413248</dc:date>
    <meta:editing-cycles>150</meta:editing-cycles>
    <meta:editing-duration>P2DT9H57M52S</meta:editing-duration>
    <meta:generator>LibreOffice/25.8.7.3$Linux_X86_64 LibreOffice_project/580$Build-3</meta:generator>
    <meta:print-date>2026-05-24T22:29:35.743211737</meta:print-date>
    <meta:printed-by>PDF files</meta:printed-by>
    <meta:document-statistic meta:table-count="4" meta:image-count="9" meta:object-count="0" meta:page-count="37" meta:paragraph-count="384" meta:word-count="6042" meta:character-count="53053" meta:non-whitespace-character-count="47386"/>
    <meta:user-defined meta:name="AppVersion">15.0000</meta:user-defined>
    <meta:template xlink:type="simple" xlink:actuate="onRequest" xlink:title="Normal.dotm" xlink:href=""/>
  </office:meta>
</office:document-meta>
</file>