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3000003F4C418C31F.png" manifest:media-type="image/png"/>
  <manifest:file-entry manifest:full-path="Pictures/10000001000005E3000003F40E1DBFF7.png" manifest:media-type="image/png"/>
  <manifest:file-entry manifest:full-path="Pictures/10000001000005E3000003F484B186BF.png" manifest:media-type="image/png"/>
  <manifest:file-entry manifest:full-path="Pictures/10000001000005E3000003F4DE5E6B60.png" manifest:media-type="image/png"/>
  <manifest:file-entry manifest:full-path="Pictures/10000001000005E3000003F416332F05.png" manifest:media-type="image/png"/>
  <manifest:file-entry manifest:full-path="Pictures/10000001000005E3000003F465AC5D0C.png" manifest:media-type="image/png"/>
  <manifest:file-entry manifest:full-path="Pictures/10000001000005E3000003F421C42F62.png" manifest:media-type="image/png"/>
  <manifest:file-entry manifest:full-path="Pictures/10000001000005E3000003F4E19DD676.png" manifest:media-type="image/png"/>
  <manifest:file-entry manifest:full-path="Pictures/10000001000006040000041F50745D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6.9cm" fo:margin-left="10.123cm" table:align="left" style:writing-mode="lr-tb"/>
    </style:style>
    <style:style style:name="Table5.A" style:family="table-column">
      <style:table-column-properties style:column-width="6.9cm"/>
    </style:style>
    <style:style style:name="Table5.A1" style:family="table-cell">
      <style:table-cell-properties fo:padding="0.097cm" fo:border="none"/>
    </style:style>
    <style:style style:name="Table5.7" style:family="table-row">
      <style:table-row-properties style:min-row-height="0.423cm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6.298cm" style:rel-column-width="9240*"/>
    </style:style>
    <style:style style:name="Table2.B" style:family="table-column">
      <style:table-column-properties style:column-width="0.702cm" style:rel-column-width="398*"/>
    </style:style>
    <style:style style:name="Table2.A1" style:family="table-cell">
      <style:table-cell-properties fo:padding="0.097cm" fo:border="none"/>
    </style:style>
    <style:style style:name="Table2.B3" style:family="table-cell" style:data-style-name="N0">
      <style:table-cell-properties fo:padding="0.097cm" fo:border="none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664cm" style:rel-column-width="3211*"/>
    </style:style>
    <style:style style:name="Table4.B" style:family="table-column">
      <style:table-column-properties style:column-width="5.667cm" style:rel-column-width="3213*"/>
    </style:style>
    <style:style style:name="Table4.C" style:family="table-column">
      <style:table-column-properties style:column-width="5.669cm" style:rel-column-width="3214*"/>
    </style:style>
    <style:style style:name="Table4.1" style:family="table-row">
      <style:table-row-properties style:min-row-height="1.499cm"/>
    </style:style>
    <style:style style:name="Table4.A1" style:family="table-cell">
      <style:table-cell-properties style:vertical-align="middle" fo:padding="0.097cm" fo:border="none"/>
    </style:style>
    <style:style style:name="Table4.2" style:family="table-row"/>
    <style:style style:name="Table4.A2" style:family="table-cell">
      <style:table-cell-properties style:vertical-align="middle" fo:padding="0.097cm" fo:border-left="none" fo:border-right="none" fo:border-top="none" fo:border-bottom="1.5pt solid #000000"/>
    </style:style>
    <style:style style:name="Table4.3" style:family="table-row">
      <style:table-row-properties style:min-row-height="5.001cm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7cm" style:rel-column-width="9638*"/>
    </style:style>
    <style:style style:name="Table3.A1" style:family="table-cell">
      <style:table-cell-properties fo:padding="0.097cm" fo:border="none"/>
    </style:style>
    <style:style style:name="P1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f53b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officeooo:rsid="001f9141" officeooo:paragraph-rsid="001f9141" style:font-size-asian="14pt" style:font-name-complex="Times New Roman1" style:font-size-complex="14p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4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d1e9e" officeooo:paragraph-rsid="001d1e9e" style:font-size-asian="12pt" style:font-size-complex="12pt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Times New Roman" fo:font-size="12pt" officeooo:rsid="001d1e9e" officeooo:paragraph-rsid="001d1e9e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text-position="super 58%" style:font-name="Times New Roman" fo:font-size="12pt" officeooo:rsid="001d1e9e" officeooo:paragraph-rsid="001d1e9e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e55c6" officeooo:paragraph-rsid="001e55c6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e55c6" officeooo:paragraph-rsid="003ae849" style:font-size-asian="12pt" style:font-size-complex="12pt"/>
    </style:style>
    <style:style style:name="P1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text-position="super 58%" style:font-name="Times New Roman" fo:font-size="12pt" officeooo:rsid="001d1e9e" officeooo:paragraph-rsid="003ae849" style:font-size-asian="12pt" style:font-size-complex="12pt"/>
    </style:style>
    <style:style style:name="P14" style:family="paragraph" style:parent-style-name="Contents_20_Heading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5" style:family="paragraph" style:parent-style-name="Contents_20_Heading">
      <style:paragraph-properties fo:margin-top="0cm" fo:margin-bottom="0cm" style:contextual-spacing="false" fo:line-height="100%" fo:text-align="center" style:justify-single-word="false" fo:break-before="pag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6" style:family="paragraph" style:parent-style-name="Contents_20_1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Contents_20_1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5b1043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rsid="002fade3" officeooo:paragraph-rsid="002fade3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ontents_20_2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size="14pt" fo:language="ru" fo:country="RU" officeooo:paragraph-rsid="005b1043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rsid="005ce1fe" officeooo:paragraph-rsid="005ce1fe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rsid="00397280" officeooo:paragraph-rsid="00397280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Contents_20_1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5b1043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5" style:family="paragraph">
      <loext:graphic-properties draw:fill-color="#ffffff"/>
    </style:style>
    <style:style style:name="P26" style:family="paragraph" style:parent-style-name="List_20_Paragraph">
      <style:paragraph-properties fo:margin-left="0cm" fo:margin-top="0cm" fo:margin-bottom="0cm" style:contextual-spacing="false" fo:line-height="100%" fo:text-align="center" style:justify-single-word="false" fo:text-indent="1.251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officeooo:paragraph-rsid="00135c9d" style:font-size-asian="14pt" style:font-name-complex="Times New Roman1" style:font-size-complex="14pt">
        <loext:char-complex-color loext:theme-type="dark1" loext:color-type="theme"/>
      </style:text-properties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officeooo:paragraph-rsid="005b1043" style:font-size-asian="14pt" style:font-name-complex="Times New Roman1" style:font-size-complex="14pt">
        <loext:char-complex-color loext:theme-type="dark1" loext:color-type="theme"/>
      </style:text-properties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/>
    </style:style>
    <style:style style:name="P32" style:family="paragraph" style:parent-style-name="List_20_Paragraph" style:list-style-name="WWNum7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 style:list-style-name="WWNum3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 style:list-style-name="WWNum2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35" style:family="paragraph" style:parent-style-name="List_20_Paragraph" style:list-style-name="WWNum8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List_20_Paragraph" style:list-style-name="WWNum4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officeooo:paragraph-rsid="00574d95"/>
    </style:style>
    <style:style style:name="P41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officeooo:paragraph-rsid="00574d95" style:font-size-asian="14pt" style:font-name-complex="Times New Roman1" style:font-size-complex="14pt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574d95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bold" officeooo:paragraph-rsid="00574d95" style:font-size-asian="14pt" style:font-weight-asian="bold" style:font-name-complex="Times New Roman1" style:font-size-complex="14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7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8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9" style:family="paragraph" style:parent-style-name="List_20_Paragraph" style:list-style-name="WWNum10">
      <style:paragraph-properties fo:margin-top="0cm" fo:margin-bottom="0cm" style:contextual-spacing="tru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0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1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52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3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56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57" style:family="paragraph" style:parent-style-name="Text_20_body">
      <style:paragraph-properties fo:break-before="page"/>
    </style:style>
    <style:style style:name="P5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1932d6" officeooo:paragraph-rsid="001932d6" style:font-size-asian="12pt" style:font-size-complex="12pt"/>
    </style:style>
    <style:style style:name="P5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6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text-underline-style="none" officeooo:rsid="001932d6" officeooo:paragraph-rsid="001932d6" style:font-size-asian="12pt" style:font-size-complex="12pt"/>
    </style:style>
    <style:style style:name="P6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6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officeooo:rsid="001932d6" officeooo:paragraph-rsid="001932d6" style:font-size-asian="12pt" style:font-size-complex="12pt"/>
    </style:style>
    <style:style style:name="P6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1932d6" officeooo:paragraph-rsid="005e90bb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6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7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8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69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5b1043" style:font-size-asian="14pt" style:font-weight-asian="normal" style:font-name-complex="Times New Roman1" style:font-size-complex="14pt" style:font-weight-complex="normal"/>
    </style:style>
    <style:style style:name="P70" style:family="paragraph" style:parent-style-name="Standard">
      <style:paragraph-properties fo:margin-left="0cm"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5b1043" style:font-size-asian="14pt" style:font-weight-asian="bold" style:font-name-complex="Times New Roman1" style:font-size-complex="14pt" style:font-weight-complex="bold"/>
    </style:style>
    <style:style style:name="P71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5b1043" style:font-size-asian="14pt" style:font-weight-asian="bold" style:font-name-complex="Times New Roman1" style:font-size-complex="14pt" style:font-weight-complex="bold"/>
    </style:style>
    <style:style style:name="P72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bold" officeooo:paragraph-rsid="005b1043" style:font-size-asian="14pt" style:font-weight-asian="bold" style:font-name-complex="Times New Roman1" style:font-size-complex="14pt" style:font-weight-complex="bold"/>
    </style:style>
    <style:style style:name="P7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d01d4" style:font-size-asian="14pt" style:font-weight-asian="bold" style:font-name-complex="Times New Roman1" style:font-size-complex="14pt" style:font-weight-complex="bold"/>
    </style:style>
    <style:style style:name="P7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d01d4" style:font-size-asian="14pt" style:font-weight-asian="normal" style:font-name-complex="Times New Roman1" style:font-size-complex="14pt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79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235878" style:font-size-asian="14pt" style:font-weight-asian="bold" style:font-name-complex="Times New Roman1" style:font-size-complex="14pt" style:font-weight-complex="bold"/>
    </style:style>
    <style:style style:name="P80" style:family="paragraph" style:parent-style-name="Standard">
      <style:paragraph-properties fo:margin-left="0cm" fo:margin-top="0cm" fo:margin-bottom="0cm" style:contextual-spacing="false" fo:line-height="100%" fo:orphans="2" fo:widows="2" fo:hyphenation-ladder-count="no-limit" fo:hyphenation-keep="page" loext:hyphenation-keep-type="column" loext:hyphenation-keep-line="true" fo:text-indent="1.251cm" style:auto-text-indent="false" style:writing-mode="lr-tb"/>
      <style:text-properties style:use-window-font-color="true" loext:opacity="0%" style:font-name="Times New Roman" fo:font-size="14pt" fo:language="ru" fo:country="RU" officeooo:paragraph-rsid="004be3b8" style:font-name-asian="Calibri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235878" style:font-size-asian="14pt" style:font-weight-asian="normal" style:font-name-complex="Times New Roman1" style:font-size-complex="14pt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152f05" style:font-size-asian="14pt" style:font-weight-asian="bold" style:font-name-complex="Times New Roman1" style:font-size-complex="14pt" style:font-weight-complex="bold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rsid="000ee979" officeooo:paragraph-rsid="000ee979" style:font-size-asian="14pt" style:font-weight-asian="bold" style:font-name-complex="Times New Roman1" style:font-size-complex="14pt" style:font-weight-complex="bold"/>
    </style:style>
    <style:style style:name="P8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8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86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87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88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89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90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91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9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9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officeooo:paragraph-rsid="0035a6b1"/>
    </style:style>
    <style:style style:name="P94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fo:font-weight="normal" officeooo:rsid="003329bb" officeooo:paragraph-rsid="0035a6b1" style:font-size-asian="12pt" style:font-weight-asian="normal" style:font-name-complex="Times New Roman1" style:font-size-complex="12pt" style:font-weight-complex="normal"/>
    </style:style>
    <style:style style:name="P95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35a6b1" style:font-size-asian="14pt" style:font-weight-asian="normal" style:font-name-complex="Times New Roman1" style:font-size-complex="14pt" style:font-weight-complex="normal"/>
    </style:style>
    <style:style style:name="P96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style:text-underline-style="none" fo:font-weight="bold" officeooo:paragraph-rsid="000ee979" style:font-size-asian="14pt" style:font-weight-asian="bold" style:font-name-complex="Times New Roman1" style:font-size-complex="14pt" style:font-weight-complex="bold"/>
    </style:style>
    <style:style style:name="P97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none" fo:font-weight="bold" officeooo:rsid="00235878" officeooo:paragraph-rsid="000ee979" style:font-size-asian="14pt" style:font-weight-asian="bold" style:font-name-complex="Times New Roman1" style:font-size-complex="14pt" style:font-weight-complex="bold"/>
    </style:style>
    <style:style style:name="P98" style:family="paragraph" style:parent-style-name="Standard">
      <style:paragraph-properties fo:margin-left="0cm" fo:margin-top="0cm" fo:margin-bottom="0cm" style:contextual-spacing="false" fo:line-height="100%" fo:text-align="start" style:justify-single-word="false" fo:text-indent="1.251cm" style:auto-text-indent="false"/>
      <style:text-properties style:font-name="Times New Roman" fo:font-size="14pt" style:text-underline-style="none" fo:font-weight="bold" officeooo:rsid="0059b3b4" officeooo:paragraph-rsid="0059b3b4" style:font-size-asian="14pt" style:font-weight-asian="bold" style:font-name-complex="Times New Roman1" style:font-size-complex="14pt" style:font-weight-complex="bold"/>
    </style:style>
    <style:style style:name="P99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5ef2" style:font-size-asian="14pt" style:font-weight-asian="normal" style:font-name-complex="Times New Roman1" style:font-size-complex="14pt" style:font-weight-complex="normal"/>
    </style:style>
    <style:style style:name="P100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5d616" officeooo:paragraph-rsid="0059b3b4" style:font-size-asian="12pt" style:font-weight-asian="normal" style:font-name-complex="Times New Roman1" style:font-size-complex="12pt" style:font-weight-complex="normal"/>
    </style:style>
    <style:style style:name="P101" style:family="paragraph" style:parent-style-name="Standard">
      <style:paragraph-properties fo:margin-left="0cm"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59b3b4" style:font-size-asian="14pt" style:font-weight-asian="normal" style:font-name-complex="Times New Roman1" style:font-size-complex="14pt" style:font-weight-complex="normal"/>
    </style:style>
    <style:style style:name="P102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text-underline-style="none" fo:font-weight="bold" officeooo:rsid="0059b3b4" officeooo:paragraph-rsid="0059b3b4" style:font-size-asian="14pt" style:font-weight-asian="bold" style:font-name-complex="Times New Roman1" style:font-size-complex="14pt" style:font-weight-complex="bold"/>
    </style:style>
    <style:style style:name="P103" style:family="paragraph" style:parent-style-name="Standard">
      <style:paragraph-properties fo:margin-left="0cm"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59b3b4" style:font-size-asian="14pt" style:font-weight-asian="bold" style:font-name-complex="Times New Roman1" style:font-size-complex="14pt" style:font-weight-complex="bold"/>
    </style:style>
    <style:style style:name="P10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59b3b4" style:font-size-asian="14pt" style:font-weight-asian="bold" style:font-name-complex="Times New Roman1" style:font-size-complex="14pt" style:font-weight-complex="bold"/>
    </style:style>
    <style:style style:name="P105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text-underline-style="none" fo:font-weight="bold" officeooo:rsid="00235878" officeooo:paragraph-rsid="0059b3b4" style:font-size-asian="14pt" style:font-weight-asian="bold" style:font-name-complex="Times New Roman1" style:font-size-complex="14pt" style:font-weight-complex="bold"/>
    </style:style>
    <style:style style:name="P106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6d7bc" officeooo:paragraph-rsid="0026d7bc" style:font-size-asian="12pt" style:font-weight-asian="normal" style:font-name-complex="Times New Roman1" style:font-size-complex="12pt" style:font-weight-complex="normal"/>
    </style:style>
    <style:style style:name="P107" style:family="paragraph" style:parent-style-name="Standard">
      <style:paragraph-properties fo:margin-left="0cm" fo:margin-top="0cm" fo:margin-bottom="0cm" style:contextual-spacing="false" fo:line-height="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6d7bc" officeooo:paragraph-rsid="0026d7bc" style:font-size-asian="12pt" style:font-weight-asian="normal" style:font-name-complex="Times New Roman1" style:font-size-complex="12pt" style:font-weight-complex="normal"/>
    </style:style>
    <style:style style:name="P108" style:family="paragraph" style:parent-style-name="Standard">
      <style:paragraph-properties fo:margin-left="0cm" fo:margin-top="0cm" fo:margin-bottom="0cm" style:contextual-spacing="false" fo:line-height="100%" fo:text-align="start" style:justify-single-word="false" fo:text-indent="1.251cm" style:auto-text-indent="false"/>
      <style:text-properties style:font-name="Times New Roman" fo:font-size="14pt" style:text-underline-style="none" fo:font-weight="bold" officeooo:rsid="0026d7bc" officeooo:paragraph-rsid="0026d7bc" style:font-size-asian="14pt" style:font-weight-asian="bold" style:font-name-complex="Times New Roman1" style:font-size-complex="14pt" style:font-weight-complex="bold"/>
    </style:style>
    <style:style style:name="P109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8d57f" officeooo:paragraph-rsid="0028d57f" style:font-size-asian="12pt" style:font-weight-asian="normal" style:font-name-complex="Times New Roman1" style:font-size-complex="12pt" style:font-weight-complex="normal"/>
    </style:style>
    <style:style style:name="P110" style:family="paragraph" style:parent-style-name="Standard">
      <style:paragraph-properties fo:margin-left="0cm" fo:margin-top="0cm" fo:margin-bottom="0cm" style:contextual-spacing="false" fo:line-height="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8d57f" officeooo:paragraph-rsid="0028d57f" style:font-size-asian="12pt" style:font-weight-asian="normal" style:font-name-complex="Times New Roman1" style:font-size-complex="12pt" style:font-weight-complex="normal"/>
    </style:style>
    <style:style style:name="P111" style:family="paragraph" style:parent-style-name="Standard">
      <style:paragraph-properties fo:margin-left="0cm" fo:margin-top="0cm" fo:margin-bottom="0cm" style:contextual-spacing="false" fo:line-height="100%" fo:text-align="start" style:justify-single-word="false" fo:text-indent="1.251cm" style:auto-text-indent="false"/>
      <style:text-properties style:font-name="Times New Roman" fo:font-size="14pt" style:text-underline-style="none" fo:font-weight="bold" officeooo:rsid="0028d57f" officeooo:paragraph-rsid="0028d57f" style:font-size-asian="14pt" style:font-weight-asian="bold" style:font-name-complex="Times New Roman1" style:font-size-complex="14pt" style:font-weight-complex="bold"/>
    </style:style>
    <style:style style:name="P11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235ef2" style:font-size-asian="14pt" style:font-weight-asian="bold" style:font-name-complex="Times New Roman1" style:font-size-complex="14pt" style:font-weight-complex="bold"/>
    </style:style>
    <style:style style:name="P113" style:family="paragraph" style:parent-style-name="Standard">
      <style:paragraph-properties fo:margin-left="0cm"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5ef2" style:font-size-asian="14pt" style:font-weight-asian="normal" style:font-name-complex="Times New Roman1" style:font-size-complex="14pt" style:font-weight-complex="normal"/>
    </style:style>
    <style:style style:name="P114" style:family="paragraph" style:parent-style-name="Standard">
      <style:paragraph-properties fo:margin-left="0cm" fo:margin-top="0cm" fo:margin-bottom="0cm" style:contextual-spacing="false" fo:line-height="100%" fo:text-align="start" style:justify-single-word="false" fo:text-indent="1.251cm" style:auto-text-indent="false"/>
      <style:text-properties style:font-name="Times New Roman" fo:font-size="14pt" style:text-underline-style="none" fo:font-weight="bold" officeooo:rsid="005b1043" officeooo:paragraph-rsid="005b1043" style:font-size-asian="14pt" style:font-weight-asian="bold" style:font-name-complex="Times New Roman1" style:font-size-complex="14pt" style:font-weight-complex="bold"/>
    </style:style>
    <style:style style:name="P115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f2f2" style:font-size-asian="14pt" style:font-weight-asian="normal" style:font-name-complex="Times New Roman1" style:font-size-complex="14pt" style:font-weight-complex="normal"/>
    </style:style>
    <style:style style:name="P116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2pt" style:text-underline-style="none" fo:font-weight="normal" officeooo:rsid="0028d57f" officeooo:paragraph-rsid="0028d57f" style:font-size-asian="12pt" style:font-weight-asian="normal" style:font-name-complex="Times New Roman1" style:font-size-complex="12pt" style:font-weight-complex="normal"/>
    </style:style>
    <style:style style:name="P117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118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5ce1fe" style:font-size-asian="14pt" style:font-weight-asian="normal" style:font-name-complex="Times New Roman1" style:font-size-complex="14pt" style:font-weight-complex="normal"/>
    </style:style>
    <style:style style:name="P119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 fo:break-before="page"/>
      <style:text-properties style:font-name="Times New Roman" fo:font-size="14pt" style:text-underline-style="none" fo:font-weight="bold" officeooo:rsid="00235878" officeooo:paragraph-rsid="005ce1fe" style:font-size-asian="14pt" style:font-weight-asian="bold" style:font-name-complex="Times New Roman1" style:font-size-complex="14pt" style:font-weight-complex="bold"/>
    </style:style>
    <style:style style:name="P120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121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122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f2f2" style:font-size-asian="14pt" style:font-weight-asian="normal" style:font-name-complex="Times New Roman1" style:font-size-complex="14pt" style:font-weight-complex="normal"/>
    </style:style>
    <style:style style:name="P123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4e3b85" style:font-size-asian="14pt" style:font-weight-asian="normal" style:font-name-complex="Times New Roman1" style:font-size-complex="14pt" style:font-weight-complex="normal"/>
    </style:style>
    <style:style style:name="P124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4ec892" style:font-size-asian="14pt" style:font-weight-asian="normal" style:font-name-complex="Times New Roman1" style:font-size-complex="14pt" style:font-weight-complex="normal"/>
    </style:style>
    <style:style style:name="P125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4fafff" style:font-size-asian="14pt" style:font-weight-asian="normal" style:font-name-complex="Times New Roman1" style:font-size-complex="14pt" style:font-weight-complex="normal"/>
    </style:style>
    <style:style style:name="P126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581e0f" style:font-size-asian="14pt" style:font-weight-asian="normal" style:font-name-complex="Times New Roman1" style:font-size-complex="14pt" style:font-weight-complex="normal"/>
    </style:style>
    <style:style style:name="P127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officeooo:paragraph-rsid="0023f2f2"/>
    </style:style>
    <style:style style:name="P128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officeooo:paragraph-rsid="0053a5e1"/>
    </style:style>
    <style:style style:name="T1" style:family="text">
      <style:text-properties style:text-underline-style="none"/>
    </style:style>
    <style:style style:name="T2" style:family="text">
      <style:text-properties officeooo:rsid="003ae84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3ae849"/>
    </style:style>
    <style:style style:name="T5" style:family="text">
      <style:text-properties officeooo:rsid="001d1e9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5ce1fe"/>
    </style:style>
    <style:style style:name="T8" style:family="text">
      <style:text-properties officeooo:rsid="005575fe"/>
    </style:style>
    <style:style style:name="T9" style:family="text">
      <style:text-properties officeooo:rsid="005b104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letter-kerning="false" style:language-asian="ru" style:country-asian="RU" style:font-weight-asian="normal" style:font-name-complex="Times New Roman1" style:font-weight-complex="normal"/>
    </style:style>
    <style:style style:name="T12" style:family="text">
      <style:text-properties officeooo:rsid="0040e511"/>
    </style:style>
    <style:style style:name="T13" style:family="text">
      <style:text-properties officeooo:rsid="00463fe1"/>
    </style:style>
    <style:style style:name="T14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fo:font-size="14pt" style:font-size-asian="14pt" style:font-name-complex="Times New Roman1" style:font-size-complex="14pt"/>
    </style:style>
    <style:style style:name="T16" style:family="text">
      <style:text-properties fo:font-size="14pt" fo:language="en" fo:country="US" style:font-size-asian="14pt" style:font-name-complex="Times New Roman1" style:font-size-complex="14pt"/>
    </style:style>
    <style:style style:name="T17" style:family="text">
      <style:text-properties fo:color="#000000" loext:opacity="100%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18" style:family="text">
      <style:text-properties fo:color="#000000" loext:opacity="100%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19" style:family="text">
      <style:text-properties fo:font-size="14pt" officeooo:rsid="0040e511" style:font-size-asian="14pt" style:font-name-complex="Times New Roman1" style:font-size-complex="14pt"/>
    </style:style>
    <style:style style:name="T20" style:family="text">
      <style:text-properties fo:font-size="14pt" officeooo:rsid="00463fe1" style:font-size-asian="14pt" style:font-name-complex="Times New Roman1" style:font-size-complex="14pt"/>
    </style:style>
    <style:style style:name="T21" style:family="text">
      <style:text-properties officeooo:rsid="001f9141"/>
    </style:style>
    <style:style style:name="T22" style:family="text">
      <style:text-properties officeooo:rsid="00470f41"/>
    </style:style>
    <style:style style:name="T23" style:family="text">
      <style:text-properties officeooo:rsid="004ca51f"/>
    </style:style>
    <style:style style:name="T24" style:family="text">
      <style:text-properties fo:font-size="14pt" officeooo:rsid="00470f41" style:font-size-asian="14pt" style:font-name-complex="Times New Roman1" style:font-size-complex="14pt"/>
    </style:style>
    <style:style style:name="T25" style:family="text">
      <style:text-properties fo:font-size="14pt" style:letter-kerning="false" style:font-size-asian="14pt" style:font-name-complex="Times New Roman1" style:font-size-complex="14pt"/>
    </style:style>
    <style:style style:name="T26" style:family="text">
      <style:text-properties style:font-name-complex="Times New Roman1"/>
    </style:style>
    <style:style style:name="T27" style:family="text">
      <style:text-properties officeooo:rsid="001ca533" style:font-name-complex="Times New Roman1"/>
    </style:style>
    <style:style style:name="T28" style:family="text">
      <style:text-properties officeooo:rsid="00174b0a"/>
    </style:style>
    <style:style style:name="T29" style:family="text">
      <style:text-properties officeooo:rsid="005e90bb"/>
    </style:style>
    <style:style style:name="T30" style:family="text">
      <style:text-properties officeooo:rsid="00135c9d"/>
    </style:style>
    <style:style style:name="T31" style:family="text">
      <style:text-properties officeooo:rsid="004be3b8"/>
    </style:style>
    <style:style style:name="T32" style:family="text">
      <style:text-properties officeooo:rsid="0009e7a5"/>
    </style:style>
    <style:style style:name="T33" style:family="text">
      <style:text-properties officeooo:rsid="000d01d4"/>
    </style:style>
    <style:style style:name="T34" style:family="text">
      <style:text-properties officeooo:rsid="0027aad2"/>
    </style:style>
    <style:style style:name="T35" style:family="text">
      <style:text-properties officeooo:rsid="00235878"/>
    </style:style>
    <style:style style:name="T36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37" style:family="text">
      <style:text-properties fo:font-size="14pt" fo:font-weight="normal" officeooo:rsid="0035a6b1" style:font-size-asian="14pt" style:font-weight-asian="normal" style:font-name-complex="Times New Roman1" style:font-size-complex="14pt" style:font-weight-complex="normal"/>
    </style:style>
    <style:style style:name="T38" style:family="text">
      <style:text-properties officeooo:rsid="0043e6f8"/>
    </style:style>
    <style:style style:name="T39" style:family="text">
      <style:text-properties officeooo:rsid="0035a6b1"/>
    </style:style>
    <style:style style:name="T40" style:family="text">
      <style:text-properties officeooo:rsid="002910d9"/>
    </style:style>
    <style:style style:name="T41" style:family="text">
      <style:text-properties officeooo:rsid="0059d212"/>
    </style:style>
    <style:style style:name="T42" style:family="text">
      <style:text-properties officeooo:rsid="00235ef2"/>
    </style:style>
    <style:style style:name="T43" style:family="text">
      <style:text-properties officeooo:rsid="0023f2f2"/>
    </style:style>
    <style:style style:name="T44" style:family="text">
      <style:text-properties officeooo:rsid="002d0ac1"/>
    </style:style>
    <style:style style:name="T45" style:family="text">
      <style:text-properties officeooo:rsid="004add3c"/>
    </style:style>
    <style:style style:name="T46" style:family="text">
      <style:text-properties officeooo:rsid="00546a61"/>
    </style:style>
    <style:style style:name="T47" style:family="text">
      <style:text-properties officeooo:rsid="004e3b85"/>
    </style:style>
    <style:style style:name="T48" style:family="text">
      <style:text-properties officeooo:rsid="005058b2"/>
    </style:style>
    <style:style style:name="T49" style:family="text">
      <style:text-properties officeooo:rsid="004fafff"/>
    </style:style>
    <style:style style:name="T50" style:family="text">
      <style:text-properties fo:font-size="14pt" style:text-underline-style="none" fo:font-weight="normal" officeooo:rsid="00235878" style:font-size-asian="14pt" style:font-weight-asian="normal" style:font-name-complex="Times New Roman1" style:font-size-complex="14pt" style:font-weight-complex="normal"/>
    </style:style>
    <style:style style:name="T51" style:family="text">
      <style:text-properties fo:font-size="14pt" style:text-underline-style="none" fo:font-weight="normal" officeooo:rsid="005237f8" style:font-size-asian="14pt" style:font-weight-asian="normal" style:font-name-complex="Times New Roman1" style:font-size-complex="14pt" style:font-weight-complex="normal"/>
    </style:style>
    <style:style style:name="T52" style:family="text">
      <style:text-properties fo:font-size="14pt" style:text-underline-style="none" fo:font-weight="normal" officeooo:rsid="0053a5e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protect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siz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1.842cm" fo:min-width="2.66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Государственное автономное профессиональное</text:h>
      <text:h text:style-name="P1" text:outline-level="2">образовательное учреждение</text:h>
      <text:h text:style-name="P1" text:outline-level="2">«Читинский педагогический колледж»</text:h>
      <text:h text:style-name="P2" text:outline-level="2"/>
      <text:h text:style-name="P3" text:outline-level="2">Кафедра информационных технологий и программирования</text:h>
      <text:h text:style-name="P4" text:outline-level="2"/>
      <text:h text:style-name="P5" text:outline-level="2"><text:span text:style-name="T1">Специальность </text:span>09.02.07 Информационные системы и программирование</text:h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6" text:outline-level="2">ВЫПУСКНАЯ КВАЛИФИКАЦИОННАЯ РАБОТА</text:h>
      <text:h text:style-name="P6" text:outline-level="2">Дипломный проект</text:h>
      <text:h text:style-name="P4" text:outline-level="2"/>
      <text:h text:style-name="P6" text:outline-level="2">Разработка десктопного приложения для онлайн-школы по программированию</text:h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Выполнил:</text:p>
          </table:table-cell>
        </table:table-row>
        <table:table-row>
          <table:table-cell table:style-name="Table5.A1" office:value-type="string">
            <text:p text:style-name="P8">Богодухов <text:span text:style-name="T2">Алексей Георгиевич</text:span></text:p>
          </table:table-cell>
        </table:table-row>
        <table:table-row>
          <table:table-cell table:style-name="Table5.A1" office:value-type="string">
            <text:p text:style-name="P8">Студент <text:s/><text:span text:style-name="T3"><text:s text:c="6"/>401 <text:s text:c="5"/></text:span><text:span text:style-name="T1"><text:s text:c="2"/>группы</text:span></text:p>
          </table:table-cell>
        </table:table-row>
        <table:table-row>
          <table:table-cell table:style-name="Table5.A1" office:value-type="string">
            <text:p text:style-name="P9">Руководитель <text:s/><text:span text:style-name="T2">________________</text:span></text:p>
          </table:table-cell>
        </table:table-row>
        <table:table-row>
          <table:table-cell table:style-name="Table5.A1" office:value-type="string">
            <text:p text:style-name="P10"><text:s text:c="38"/>подпись</text:p>
          </table:table-cell>
        </table:table-row>
        <table:table-row>
          <table:table-cell table:style-name="Table5.A1" office:value-type="string">
            <text:p text:style-name="P11">Трушина Е<text:span text:style-name="T2">лена Геннадьевна</text:span></text:p>
          </table:table-cell>
        </table:table-row>
        <table:table-row table:style-name="Table5.7">
          <table:table-cell table:style-name="Table5.A1" office:value-type="string">
            <text:p text:style-name="P12">« <text:s text:c="7"/>» <text:s/><text:span text:style-name="T4"><text:s text:c="36"/></text:span><text:s text:c="2"/>2<text:span text:style-name="T2">026 </text:span>г.</text:p>
          </table:table-cell>
        </table:table-row>
        <table:table-row>
          <table:table-cell table:style-name="Table5.A1" office:value-type="string">
            <text:p text:style-name="P11">Допущен к защите</text:p>
          </table:table-cell>
        </table:table-row>
        <table:table-row>
          <table:table-cell table:style-name="Table5.A1" office:value-type="string">
            <text:p text:style-name="P11">Зав. кафедрой<text:span text:style-name="T5"> <text:s/></text:span><text:span text:style-name="T2">________________</text:span></text:p>
          </table:table-cell>
        </table:table-row>
        <table:table-row>
          <table:table-cell table:style-name="Table5.A1" office:value-type="string">
            <text:p text:style-name="P13"><text:s text:c="38"/>подпись</text:p>
          </table:table-cell>
        </table:table-row>
        <table:table-row>
          <table:table-cell table:style-name="Table5.A1" office:value-type="string">
            <text:p text:style-name="P11">Медведкова Ю<text:span text:style-name="T2">лия Константиновна</text:span></text:p>
          </table:table-cell>
        </table:table-row>
        <table:table-row>
          <table:table-cell table:style-name="Table5.A1" office:value-type="string">
            <text:p text:style-name="P12">« <text:s text:c="7"/>» <text:s/><text:span text:style-name="T4"><text:s text:c="36"/></text:span><text:s text:c="2"/>2<text:span text:style-name="T2">026 </text:span>г.</text:p>
          </table:table-cell>
        </table:table-row>
        <table:table-row>
          <table:table-cell table:style-name="Table5.A1" office:value-type="string">
            <text:p text:style-name="P12"/>
          </table:table-cell>
        </table:table-row>
        <table:table-row>
          <table:table-cell table:style-name="Table5.A1" office:value-type="string">
            <text:p text:style-name="P12">Оценка<text:span text:style-name="T5"> <text:s/></text:span><text:span text:style-name="T2">__________________</text:span></text:p>
          </table:table-cell>
        </table:table-row>
        <table:table-row>
          <table:table-cell table:style-name="Table5.A1" office:value-type="string">
            <text:p text:style-name="P12">« <text:s text:c="7"/>» <text:s/><text:span text:style-name="T4"><text:s text:c="36"/></text:span><text:s text:c="2"/>2<text:span text:style-name="T2">026 </text:span>г.</text:p>
          </table:table-cell>
        </table:table-row>
      </table:table>
      <text:p text:style-name="P14"/>
      <text:p text:style-name="P15">СОДЕРЖАНИЕ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1. Пояснительная записка<text:span text:style-name="T6"> ..............................................................................</text:span><text:span text:style-name="T6">.</text:span><text:span text:style-name="T6">.</text:span><text:span text:style-name="T6">.</text:span></text:p>
          </table:table-cell>
          <table:table-cell table:style-name="Table2.A1" office:value-type="string">
            <text:p text:style-name="P18">3</text:p>
          </table:table-cell>
        </table:table-row>
        <table:table-row>
          <table:table-cell table:style-name="Table2.A1" office:value-type="string">
            <text:p text:style-name="P19">1.1 Квалификационные характеристики проекта .................................<text:span text:style-name="T6">.</text:span><text:span text:style-name="T6">.</text:span><text:span text:style-name="T6">.</text:span><text:span text:style-name="T6">.</text:span></text:p>
          </table:table-cell>
          <table:table-cell table:style-name="Table2.A1" office:value-type="string">
            <text:p text:style-name="P20">3</text:p>
          </table:table-cell>
        </table:table-row>
        <table:table-row>
          <table:table-cell table:style-name="Table2.A1" office:value-type="string">
            <text:p text:style-name="P19">1.2 Описание предметной области .........................................................<text:span text:style-name="T6">.</text:span><text:span text:style-name="T6">.</text:span><text:span text:style-name="T6">.</text:span></text:p>
          </table:table-cell>
          <table:table-cell table:style-name="Table2.B3" office:value-type="float" office:value="5">
            <text:p text:style-name="P20">5</text:p>
          </table:table-cell>
        </table:table-row>
        <table:table-row>
          <table:table-cell table:style-name="Table2.A1" office:value-type="string">
            <text:p text:style-name="P19">1.3 Техническое задание ..........................................................................<text:span text:style-name="T6">.</text:span><text:span text:style-name="T6">.</text:span><text:span text:style-name="T6">.</text:span></text:p>
          </table:table-cell>
          <table:table-cell table:style-name="Table2.A1" office:value-type="string">
            <text:p text:style-name="P20">1<text:span text:style-name="T7">1</text:span></text:p>
          </table:table-cell>
        </table:table-row>
        <table:table-row>
          <table:table-cell table:style-name="Table2.A1" office:value-type="string">
            <text:p text:style-name="P17">2. Проектная часть<text:span text:style-name="T6"> ...........................................................................................</text:span><text:span text:style-name="T6">.</text:span><text:span text:style-name="T6">.</text:span><text:span text:style-name="T6">.</text:span></text:p>
          </table:table-cell>
          <table:table-cell table:style-name="Table2.A1" office:value-type="string">
            <text:p text:style-name="P21">20</text:p>
          </table:table-cell>
        </table:table-row>
        <table:table-row>
          <table:table-cell table:style-name="Table2.A1" office:value-type="string">
            <text:p text:style-name="P19">2.1 Проектирование программного продукта .......................................<text:span text:style-name="T6">.</text:span><text:span text:style-name="T6">.</text:span><text:span text:style-name="T6">.</text:span><text:span text:style-name="T6">.</text:span></text:p>
          </table:table-cell>
          <table:table-cell table:style-name="Table2.A1" office:value-type="string">
            <text:p text:style-name="P21">20</text:p>
          </table:table-cell>
        </table:table-row>
        <table:table-row>
          <table:table-cell table:style-name="Table2.A1" office:value-type="string">
            <text:p text:style-name="P19">2.2 Руководство пользователя ................................................................<text:span text:style-name="T6">.</text:span><text:span text:style-name="T6">.</text:span><text:span text:style-name="T6">.</text:span><text:span text:style-name="T6">.</text:span></text:p>
          </table:table-cell>
          <table:table-cell table:style-name="Table2.A1" office:value-type="string">
            <text:p text:style-name="P18">2<text:span text:style-name="T8">1</text:span></text:p>
          </table:table-cell>
        </table:table-row>
        <table:table-row>
          <table:table-cell table:style-name="Table2.A1" office:value-type="string">
            <text:p text:style-name="P19">2.3 Результаты апробации .......................................................................<text:span text:style-name="T6">.</text:span><text:span text:style-name="T6">.</text:span><text:span text:style-name="T6">.</text:span></text:p>
          </table:table-cell>
          <table:table-cell table:style-name="Table2.A1" office:value-type="string">
            <text:p text:style-name="P22">3<text:span text:style-name="T9">2</text:span></text:p>
          </table:table-cell>
        </table:table-row>
        <table:table-row>
          <table:table-cell table:style-name="Table2.A1" office:value-type="string">
            <text:p text:style-name="P23"><text:span text:style-name="T10">Заключение </text:span><text:span text:style-name="T11">........................................................................................................</text:span><text:span text:style-name="T11">.</text:span><text:span text:style-name="T11">.</text:span><text:span text:style-name="T11">.</text:span></text:p>
          </table:table-cell>
          <table:table-cell table:style-name="Table2.A1" office:value-type="string">
            <text:p text:style-name="P22">3<text:span text:style-name="T7">3</text:span></text:p>
          </table:table-cell>
        </table:table-row>
        <table:table-row>
          <table:table-cell table:style-name="Table2.A1" office:value-type="string">
            <text:p text:style-name="P23"><text:span text:style-name="T10">Список использованных источников </text:span><text:span text:style-name="T11">..........................................................</text:span><text:span text:style-name="T11">.</text:span><text:span text:style-name="T11">.</text:span><text:span text:style-name="T11">.</text:span><text:span text:style-name="T11">.</text:span></text:p>
          </table:table-cell>
          <table:table-cell table:style-name="Table2.A1" office:value-type="string">
            <text:p text:style-name="P22">3<text:span text:style-name="T7">6</text:span></text:p>
          </table:table-cell>
        </table:table-row>
      </table:table>
      <text:p text:style-name="P24"><draw:custom-shape text:anchor-type="paragraph" draw:z-index="9" draw:name="Shape 1" draw:style-name="gr1" draw:text-style-name="P25" svg:width="2.668cm" svg:height="1.842cm" svg:x="7.257cm" svg:y="15.702cm"><text:p/><draw:enhanced-geometry svg:viewBox="0 0 21600 21600" draw:type="rectangle" draw:enhanced-path="M 0 0 L 21600 0 21600 21600 0 21600 0 0 Z N"/></draw:custom-shape></text:p>
      <text:p text:style-name="P26">1. ПОЯСНИТЕЛЬНАЯ ЗАПИСКА</text:p>
      <text:p text:style-name="P27"/>
      <text:p text:style-name="P27">1.1 Квалификационные характеристики проекта</text:p>
      <text:p text:style-name="P27"/>
      <text:p text:style-name="P28">В условиях цифровизации образования всё больше людей осваивают программирование в онлайн-формате, включая школьников, студентов и взрослых, проходящих профессиональную переподготовку. Онлайн-обучение позволяет получать знания независимо от места проживания и графика, однако одновременно обостряет проблему качества усвоения материала. Для эффективного изучения программирования недостаточно только теоретических лекций и тестовых заданий - ключевую роль играет регулярная практическая работа с кодом и получение оперативной обратной связи по результатам выполнения заданий <text:span text:style-name="T12">[</text:span><text:span text:style-name="T13">5</text:span><text:span text:style-name="T12">]</text:span>.</text:p>
      <text:p text:style-name="P29">Существующие онлайн-платформы для обучения программированию нередко ориентированы либо на просмотр видеоматериалов, либо на выполнение ограниченного набора упражнений в браузере. Такой подход может снижать вовлечённость обучающихся и затруднять формирование устойчивых практических навыков. Кроме того, пользователи сталкиваются с трудностями при настройке рабочей среды, что особенно критично для начинающих, не обладающих достаточным техническим опытом <text:span text:style-name="T12">[</text:span><text:span text:style-name="T13">8</text:span><text:span text:style-name="T12">]</text:span>.</text:p>
      <text:p text:style-name="P30">Актуальной является задача создания удобного и безопасного инструмента, который объединяет теоретическое обучение и практику программирования в едином образовательном пространстве, минимизируя технические барьеры для обучающихся. Десктопное приложение в данном контексте способно обеспечить стабильную работу, привычный интерфейс и возможность локального хранения учебных материалов, что повышает доступность обучения и снижает зависимость от качества интернет-соединения.</text:p>
      <text:p text:style-name="P30">Таким образом, разработка десктопного приложения для онлайн-школы по программированию является актуальной задачей, направленной на повышение эффективности обучения, удобства использования образовательных платформ и <text:soft-page-break/>качества формирования практических навыков программирования у обучающихся.</text:p>
      <text:p text:style-name="P31"><text:span text:style-name="T14">Объектом</text:span><text:span text:style-name="T15"> дипломного проекта является процесс разработки приложения.</text:span></text:p>
      <text:p text:style-name="P31"><text:span text:style-name="T14">Предметом</text:span><text:span text:style-name="T15"> дипломного проекта является создание десктопного приложения с клиент-серверной архитектурой с помощью </text:span><text:span text:style-name="T16">Qt</text:span><text:span text:style-name="T15"> на языке </text:span><text:span text:style-name="T16">C</text:span><text:span text:style-name="T15">++.</text:span></text:p>
      <text:p text:style-name="P31"><text:span text:style-name="T14">Целью</text:span><text:span text:style-name="T15"> дипломного проекта является разработка десктопного приложения для онлайн-школы по программированию, обеспечивающее эффективное обучение с безопасным выполнением пользовательского кода и удобным интерфейсом для изучения теории и практики.</text:span></text:p>
      <text:p text:style-name="P31"><text:span text:style-name="T15">В соответствии с поставленной целью в работе необходимо решить следующие </text:span><text:span text:style-name="T14">задачи</text:span><text:span text:style-name="T15">:</text:span></text:p>
      <text:list xml:id="list2570215854" text:style-name="WWNum7">
        <text:list-item text:start-value="1">
          <text:p text:style-name="P32">Изучить и проанализировать предметную область.</text:p>
        </text:list-item>
        <text:list-item text:style-override="WWNum3">
          <text:p text:style-name="P33">Разработать техническое задание.</text:p>
        </text:list-item>
        <text:list-item text:style-override="WWNum3">
          <text:p text:style-name="P33">Создать программное обеспечение.</text:p>
        </text:list-item>
        <text:list-item text:style-override="WWNum3">
          <text:p text:style-name="P33">Разработать пользовательский интерфейс приложения.</text:p>
        </text:list-item>
        <text:list-item text:style-override="WWNum3">
          <text:p text:style-name="P33">Подготовить руководство пользователя.</text:p>
        </text:list-item>
      </text:list>
      <text:p text:style-name="P31"><text:span text:style-name="T17">Тип проекта</text:span><text:span text:style-name="T18">: практико-ориентированный.</text:span></text:p>
      <text:p text:style-name="P31"><text:span text:style-name="T17">Этапы работы над проектом</text:span><text:span text:style-name="T18">:</text:span></text:p>
      <text:list text:style-name="WWNum2">
        <text:list-item>
          <text:p text:style-name="P34">Аналитический этап: исследование предметной области, анализ требований</text:p>
        </text:list-item>
        <text:list-item>
          <text:p text:style-name="P34">Проектирование: разработка архитектуры, проектирование интерфейсов</text:p>
        </text:list-item>
        <text:list-item>
          <text:p text:style-name="P34">Реализация: программирование клиентской и серверной частей</text:p>
        </text:list-item>
        <text:list-item>
          <text:p text:style-name="P34">Интеграция: объединение компонентов</text:p>
        </text:list-item>
        <text:list-item>
          <text:p text:style-name="P34">Тестирование: функциональное и интеграционное тестирование</text:p>
        </text:list-item>
        <text:list-item>
          <text:p text:style-name="P34">Документирование: написание технической документации</text:p>
        </text:list-item>
      </text:list>
      <text:p text:style-name="P31"><text:span text:style-name="T14">Прикладная ценность проекта</text:span><text:span text:style-name="T15"> заключается в создании удобного программного средства, предназначенного для поддержки процесса обучения программированию в онлайн-школах. Разрабатываемое приложение </text:span><text:soft-page-break/><text:span text:style-name="T15">предоставляет обучающимся единое образовательное пространство, в котором теоретические материалы и практические задания объединены в одном интерфейсе. Такой подход упрощает процесс обучения, повышает вовлечённость пользователей и способствует более эффективному закреплению изучаемого материала за счёт немедленного применения знаний на практике </text:span><text:span text:style-name="T19">[1</text:span><text:span text:style-name="T20">0</text:span><text:span text:style-name="T19">]</text:span><text:span text:style-name="T15">.</text:span></text:p>
      <text:p text:style-name="P31"><text:span text:style-name="T14">Критерии эффективности проекта</text:span><text:span text:style-name="T15">:</text:span></text:p>
      <text:list xml:id="list4241171119" text:style-name="WWNum8">
        <text:list-item text:start-value="1">
          <text:p text:style-name="P35">Корректность выполнения программных заданий и точность проверки результатов работы пользователей.</text:p>
        </text:list-item>
        <text:list-item text:style-override="WWNum4">
          <text:p text:style-name="P36">Понятность и простота использования приложения.</text:p>
        </text:list-item>
        <text:list-item text:style-override="WWNum4">
          <text:p text:style-name="P36">Стабильность работы системы при взаимодействии пользователей с учебными материалами и заданиями.</text:p>
        </text:list-item>
      </text:list>
      <text:p text:style-name="P37">Теоретическая часть проекта включает анализ современных подходов к организации онлайн-обучения программированию, с акцентом на сочетание теоретических материалов и практических заданий. Рассматриваются принципы построения обучающих систем, обеспечивающих поэтапное освоение материала и формирование практических навыков программирования. Проведённый анализ позволяет обосновать выбранную структуру образовательной платформы и подходы к организации учебного процесса, направленные на повышение эффективности обучения и удобства взаимодействия пользователей с системой.</text:p>
      <text:p text:style-name="P38"/>
      <text:p text:style-name="P27">1.2 Описание предметной области</text:p>
      <text:p text:style-name="P39"/>
      <text:p text:style-name="P37">Онлайн-обучение программированию представляет собой форму образовательного процесса, при которой освоение знаний и практических навыков в области разработки программного обеспечения осуществляется с использованием цифровых образовательных платформ и программных средств. В отличие от традиционного очного обучения, онлайн-формат предоставляет обучающимся возможность получать знания независимо от географического положения, временных ограничений и индивидуального графика. Это делает обучение программированию более доступным и гибким, особенно в условиях <text:soft-page-break/>быстрого развития информационных технологий и роста потребности в <text:span text:style-name="T21">IT</text:span>-специалистах <text:span text:style-name="T12">[</text:span><text:span text:style-name="T13">5</text:span><text:span text:style-name="T12">]</text:span>.</text:p>
      <text:p text:style-name="P31"><text:span text:style-name="T15">Особенностью онлайн-обучения является высокая степень самостоятельности обучающихся. Пользователь самостоятельно планирует темп прохождения курса, выбирает время для изучения материалов и выполнения заданий. При этом эффективность такого обучения во многом зависит от качества используемой образовательной платформы, структуры учебных материалов и наличия инструментов, обеспечивающих практическое применение полученных знаний. В области программирования данные факторы приобретают особую значимость, поскольку формирование навыков невозможно без регулярной практической деятельности </text:span><text:span text:style-name="T19">[</text:span><text:span text:style-name="T20">8</text:span><text:span text:style-name="T19">]</text:span><text:span text:style-name="T15">.</text:span></text:p>
      <text:p text:style-name="P37">Целевой аудиторией онлайн-обучения программированию являются различные категории пользователей, отличающиеся уровнем подготовки, возрастом и образовательными целями. К одной из ключевых групп относятся школьники старших классов, которые рассматривают программирование как перспективное направление для дальнейшего обучения и профессиональной деятельности. Для данной категории особенно важны наглядность учебных материалов, поэтапное объяснение базовых понятий и простота взаимодействия с образовательной средой, поскольку большинство обучающихся не обладает предварительным техническим опытом <text:span text:style-name="T12">[</text:span><text:span text:style-name="T13">12</text:span><text:span text:style-name="T12">]</text:span>.</text:p>
      <text:p text:style-name="P37">Программирование как учебная дисциплина имеет ряд существенных особенностей, отличающих его от большинства гуманитарных и даже многих технических предметов. В первую очередь, программирование ориентировано не только на усвоение теоретических знаний, но и на формирование устойчивых практических навыков. Понимание синтаксиса языков программирования, алгоритмов и принципов разработки программных систем не приводит к ожидаемому результату без регулярной работы с кодом и самостоятельного решения практических задач <text:span text:style-name="T12">[1</text:span><text:span text:style-name="T13">3</text:span><text:span text:style-name="T12">]</text:span>.</text:p>
      <text:p text:style-name="P31"><text:soft-page-break/><text:span text:style-name="T15">Процесс обучения программированию предполагает активное взаимодействие обучающегося с программной средой. В ходе выполнения заданий пользователь сталкивается с ошибками, анализирует результаты работы программы, вносит исправления и повторно проверяет решение. Такой итеративный характер обучения способствует развитию аналитического мышления, навыков поиска и устранения ошибок, а также способности к самостоятельному решению задач. В отличие от дисциплин, где результат может быть выражен в виде тестового ответа или письменного рассуждения, в программировании корректность решения определяется фактическим поведением созданной программы.</text:span></text:p>
      <text:p text:style-name="P37">Таким образом, онлайн-обучение программированию представляет собой сложную и многоаспектную предметную область, в которой пересекаются образовательные цели, потребности различных категорий пользователей и требования к практической направленности учебного процесса. Эффективная организация обучения в данной области требует использования специализированных программных средств, способных обеспечить удобный доступ к учебным материалам, поддержку практической деятельности и получение обратной связи, что делает разработку соответствующих образовательных приложений актуальной и востребованной задачей <text:span text:style-name="T12">[1</text:span><text:span text:style-name="T13">4</text:span><text:span text:style-name="T12">]</text:span>.</text:p>
      <text:p text:style-name="P37">Онлайн-обучение программированию представляет собой последовательность взаимосвязанных учебных процессов, направленных на формирование у обучающихся теоретических знаний и практических навыков. Эффективность обучения определяется тем, насколько логично и согласованно организованы данные процессы в рамках образовательной платформы. Процесс обучения начинается с изучения теоретического материала. Теоретическая часть включает объяснение базовых понятий, принципов и подходов, необходимых для понимания изучаемой темы. В онлайн-формате теоретические материалы должны быть структурированы и представлены в доступной форме, позволяющей обучающемуся последовательно осваивать новые знания и <text:soft-page-break/>возвращаться к ранее изученному материалу при необходимости. Чёткая логика изложения способствует снижению когнитивной нагрузки и повышает усвоение информации <text:span text:style-name="T12">[1</text:span><text:span text:style-name="T13">0</text:span><text:span text:style-name="T12">]</text:span>.</text:p>
      <text:p text:style-name="P31"><text:span text:style-name="T15">Следующим этапом является выполнение практических заданий, направленных на закрепление теоретических знаний. Практика играет ключевую роль в обучении программированию, поскольку именно в процессе написания кода формируются навыки анализа задач, поиска решений и устранения ошибок. Задания должны соответствовать изучаемой теме и усложняться по мере продвижения обучающегося, обеспечивая поэтапное развитие навыков программирования </text:span><text:span text:style-name="T19">[</text:span><text:span text:style-name="T20">9</text:span><text:span text:style-name="T19">]</text:span><text:span text:style-name="T15">.</text:span></text:p>
      <text:p text:style-name="P37">Важным процессом является проверка решений, выполненных обучающимися. Проверка позволяет определить корректность выполнения задания и степень усвоения материала. В условиях онлайн-обучения данный процесс должен быть организован таким образом, чтобы обеспечивать объективность оценки и минимизировать субъективные факторы. Наличие чётких критериев проверки способствует формированию у обучающихся понимания требований к результатам работы. Результаты проверки сопровождаются получением обратной связи, которая является неотъемлемой частью образовательного процесса. Обратная связь позволяет обучающемуся понять допущенные ошибки, скорректировать подход к решению задач и улучшить качество выполняемых работ. Своевременная и понятная обратная связь повышает мотивацию обучающихся и способствует более глубокому усвоению учебного материала <text:span text:style-name="T12">[1</text:span><text:span text:style-name="T22">1</text:span><text:span text:style-name="T12">]</text:span>.</text:p>
      <text:p text:style-name="P37">Завершающим процессом является отслеживание прогресса обучения. Фиксация результатов выполнения заданий и прохождения учебных тем позволяет обучающемуся оценивать собственные достижения и планировать дальнейшее обучение. Для преподавателя и образовательной платформы данный процесс обеспечивает контроль за ходом обучения и позволяет выявлять трудности, возникающие у обучающихся на различных этапах освоения курса. <text:soft-page-break/>Таким образом, основные процессы онлайн-обучения программированию образуют целостную систему, в которой теоретическое обучение, практика, проверка и обратная связь взаимно дополняют друг друга. Эффективная реализация данных процессов является ключевым фактором успешного формирования практических навыков программирования в онлайн-среде <text:span text:style-name="T12">[</text:span><text:span text:style-name="T23">10</text:span><text:span text:style-name="T12">]</text:span>.</text:p>
      <text:p text:style-name="P31"><text:span text:style-name="T15">Несмотря на широкое распространение онлайн-платформ для обучения программированию, существующие решения не всегда обеспечивают полноценное и удобное освоение учебного материала. Многие проблемы проявляются именно на уровне пользовательского опыта и организации учебного процесса, что может снижать эффективность обучения и мотивацию обучающихся. Одной из распространённых проблем является разрыв между теоретическим материалом и практической деятельностью. Во многих образовательных ресурсах теория и практика представлены раздельно: обучающимся предлагается сначала изучить лекционный материал, а затем самостоятельно искать способы применить полученные знания. Отсутствие тесной связи между объяснением темы и немедленным выполнением практических заданий затрудняет понимание материала и замедляет формирование практических навыков. Существенные сложности возникают у начинающих обучающихся при подготовке рабочей среды для выполнения программных заданий. Необходимость установки и настройки дополнительных инструментов может отвлекать от учебного процесса и вызывать затруднения у пользователей, не обладающих достаточным техническим опытом. В результате внимание обучающегося смещается с изучения программирования на решение вспомогательных технических задач </text:span><text:span text:style-name="T19">[</text:span><text:span text:style-name="T24">12</text:span><text:span text:style-name="T19">]</text:span><text:span text:style-name="T15">.</text:span></text:p>
      <text:p text:style-name="P31"><text:span text:style-name="T15">Дополнительным ограничением является отсутствие единого и согласованного интерфейса обучения. Использование нескольких разрозненных инструментов для просмотра теоретических материалов, выполнения заданий и отслеживания прогресса усложняет взаимодействие с образовательной средой. Это повышает когнитивную нагрузку на обучающегося и может отрицательно </text:span><text:soft-page-break/><text:span text:style-name="T15">сказываться на вовлечённости в учебный процесс. Перечисленные проблемы указывают на необходимость создания образовательного решения, ориентированного на потребности пользователей и специфику обучения программированию. Повышение связности учебных процессов, упрощение практической работы и улучшение пользовательского опыта являются важными направлениями развития онлайн-образования в данной области </text:span><text:span text:style-name="T19">[1</text:span><text:span text:style-name="T24">5</text:span><text:span text:style-name="T19">]</text:span><text:span text:style-name="T15">.</text:span></text:p>
      <text:p text:style-name="P37">Разрабатываемое приложение занимает место комплексного инструмента поддержки онлайн-обучения программированию, ориентированного на интеграцию основных учебных процессов в едином образовательном пространстве. Его назначение заключается в упрощении взаимодействия участников образовательного процесса и повышении эффективности освоения программирования за счёт систематизации учебных материалов и практической деятельности. Приложение автоматизирует ключевые этапы обучения, связанные с предоставлением учебного контента, выполнением практических заданий и оценкой результатов работы обучающихся. Теоретические материалы и практические задания представлены в согласованной структуре, что позволяет обучающемуся последовательно переходить от изучения темы к её практическому применению. Это снижает разрыв между теорией и практикой и способствует более осознанному усвоению материала <text:span text:style-name="T12">[1</text:span><text:span text:style-name="T22">4</text:span><text:span text:style-name="T12">]</text:span>.</text:p>
      <text:p text:style-name="P37">Существенным направлением автоматизации является процесс проверки программных заданий и фиксации результатов обучения. Обучающиеся получают возможность самостоятельно выполнять задания и получать результаты проверки без задержек, связанных с ручной обработкой решений. Это упрощает процесс обучения, повышает его прозрачность и позволяет обучающимся лучше отслеживать собственный прогресс <text:span text:style-name="T12">[1</text:span><text:span text:style-name="T22">0</text:span><text:span text:style-name="T12">]</text:span>.</text:p>
      <text:p text:style-name="P31"><text:span text:style-name="T15">Для преподавателей и авторов курсов приложение упрощает организацию учебного процесса и сопровождение обучающихся. Централизованное размещение учебных материалов и заданий снижает нагрузку, связанную с управлением образовательным контентом, и позволяет сосредоточиться на </text:span><text:soft-page-break/><text:span text:style-name="T15">методической стороне обучения. Возможность анализа результатов выполнения заданий способствует более точной оценке уровня подготовки обучающихся и корректировке содержания курса </text:span><text:span text:style-name="T19">[</text:span><text:span text:style-name="T24">9</text:span><text:span text:style-name="T19">]</text:span><text:span text:style-name="T15">.</text:span></text:p>
      <text:p text:style-name="P37">Для онлайн-школы в целом разрабатываемое приложение выступает инструментом повышения качества образовательных услуг. Использование единой платформы обучения способствует формированию целостного образовательного продукта, повышает удобство использования и доверие со стороны пользователей. Это создаёт условия для масштабирования образовательных программ и расширения аудитории без существенного увеличения организационных затрат <text:span text:style-name="T12">[1</text:span><text:span text:style-name="T22">1</text:span><text:span text:style-name="T12">]</text:span>.</text:p>
      <text:p text:style-name="P40"><text:span text:style-name="T25">Рассматриваемое приложение, таким образом, органично встраивается в предметную область онлайн-обучения программированию, дополняя и упорядочивая существующие образовательные процессы. Его функциональная направленность определяет требования к структуре, возможностям и </text:span><text:span text:style-name="T15">архитектуре системы, которые будут рассмотрены в последующих главах работы.</text:span></text:p>
      <text:p text:style-name="P41"/>
      <text:p text:style-name="P42">1.3 Техническое задание</text:p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Техническое задание на разработку программы</text:p>
      <text:p text:style-name="P45">«Десктопное приложение для онлайн-школы по программированию»</text:p>
      <text:p text:style-name="P45"/>
      <text:p text:style-name="P46">Содержание</text:p>
      <text:list xml:id="list1751985696" text:style-name="WWNum9">
        <text:list-item text:start-value="1">
          <text:p text:style-name="P47">Введение</text:p>
          <text:list text:style-name="WWNum1">
            <text:list-item>
              <text:p text:style-name="P48">Основание для разработки</text:p>
            </text:list-item>
            <text:list-item>
              <text:p text:style-name="P48">Назначение и область применения</text:p>
            </text:list-item>
          </text:list>
        </text:list-item>
        <text:list-item text:style-override="WWNum1">
          <text:p text:style-name="P48">Требования к программе</text:p>
          <text:list text:style-name="WWNum1">
            <text:list-item>
              <text:p text:style-name="P48">Требования к функциональным характеристикам</text:p>
            </text:list-item>
            <text:list-item>
              <text:p text:style-name="P48">Требования к надёжности</text:p>
              <text:list>
                <text:list-item>
                  <text:p text:style-name="P48">Требования к обеспечению надёжного функционирования программы</text:p>
                </text:list-item>
                <text:list-item>
                  <text:p text:style-name="P48">Время восстановления после отказа</text:p>
                </text:list-item>
                <text:list-item>
                  <text:p text:style-name="P48">Отказы из-за некорректных действий пользовательской системы</text:p>
                </text:list-item>
              </text:list>
            </text:list-item>
          </text:list>
        </text:list-item>
        <text:list-item text:style-override="WWNum1">
          <text:p text:style-name="P48">Условия эксплуатации</text:p>
          <text:list text:style-name="WWNum1">
            <text:list-item>
              <text:p text:style-name="P48">Климатические условия эксплуатации</text:p>
            </text:list-item>
            <text:list-item>
              <text:p text:style-name="P48">Требования к квалификации и численности персонала</text:p>
            </text:list-item>
            <text:list-item>
              <text:p text:style-name="P48">Требования к составу и параметрам технических средств</text:p>
            </text:list-item>
            <text:list-item>
              <text:p text:style-name="P48">Требования к информационной и программной совместимости</text:p>
              <text:list>
                <text:list-item>
                  <text:p text:style-name="P48">Требования к информационным структурам и методам решения</text:p>
                </text:list-item>
                <text:list-item>
                  <text:p text:style-name="P48">Требования к исходным кодам и языкам программирования</text:p>
                </text:list-item>
                <text:list-item>
                  <text:p text:style-name="P48">Требования к программным средствам, используемым программой</text:p>
                </text:list-item>
                <text:list-item>
                  <text:p text:style-name="P48">Требования к защите информации и программ</text:p>
                </text:list-item>
              </text:list>
            </text:list-item>
            <text:list-item>
              <text:p text:style-name="P48">Специальные требования</text:p>
            </text:list-item>
          </text:list>
        </text:list-item>
        <text:list-item text:style-override="WWNum1">
          <text:p text:style-name="P48">Требования к программной документации</text:p>
          <text:list text:style-name="WWNum1">
            <text:list-item>
              <text:p text:style-name="P48">Состав программной документации</text:p>
            </text:list-item>
          </text:list>
        </text:list-item>
        <text:list-item text:style-override="WWNum1">
          <text:p text:style-name="P48">Технико-экономическое обоснование</text:p>
        </text:list-item>
        <text:list-item text:style-override="WWNum1">
          <text:p text:style-name="P48">Стадии и этапы разработки</text:p>
          <text:list text:style-name="WWNum1">
            <text:list-item>
              <text:p text:style-name="P48">Стадии разработки</text:p>
            </text:list-item>
            <text:list-item>
              <text:p text:style-name="P48">Этапы разработки</text:p>
            </text:list-item>
            <text:list-item>
              <text:p text:style-name="P48">Содержание работ по этапам</text:p>
            </text:list-item>
          </text:list>
        </text:list-item>
        <text:list-item text:style-override="WWNum1">
          <text:p text:style-name="P48">Порядок контроля и приемки</text:p>
          <text:list text:style-name="WWNum1">
            <text:list-item>
              <text:p text:style-name="P48">Предварительный контроль</text:p>
            </text:list-item>
            <text:list-item>
              <text:p text:style-name="P48">Тестирование</text:p>
            </text:list-item>
            <text:list-item>
              <text:p text:style-name="P48">Приёмка</text:p>
            </text:list-item>
          </text:list>
        </text:list-item>
      </text:list>
      <text:list xml:id="list196492303" text:style-name="WWNum10">
        <text:list-item text:start-value="1">
          <text:p text:style-name="P49">Введение</text:p>
          <text:list text:style-name="WWNum5">
            <text:list-item>
              <text:p text:style-name="P50">Основание для разработки</text:p>
              <text:list>
                <text:list-item>
                  <text:p text:style-name="P51">Наименование работы: «Десктопное приложение для онлайн-школы по программированию».</text:p>
                </text:list-item>
                <text:list-item>
                  <text:p text:style-name="P51">Основанием для разработки является задание на выпускную квалификационную работу.</text:p>
                </text:list-item>
                <text:list-item>
                  <text:p text:style-name="P51">Организация, утвердившая договор: Читинский Педагогический колледж.</text:p>
                </text:list-item>
              </text:list>
            </text:list-item>
            <text:list-item>
              <text:p text:style-name="P50">Назначение и область применения</text:p>
              <text:list>
                <text:list-item>
                  <text:p text:style-name="P51">Назначение разработки - создание настольного клиент-серверного приложения для обучения программированию, включающего каталог курсов, теоретические материалы, практические задания, запуск пользовательского кода и проверку решений на сервере.</text:p>
                </text:list-item>
                <text:list-item>
                  <text:p text:style-name="P51">Область применения - учебный процесс в онлайн-школе программирования для студентов и преподавателей.</text:p>
                </text:list-item>
                <text:list-item>
                  <text:p text:style-name="P51">Основные функциональные задачи приложения включают:</text:p>
                  <text:list>
                    <text:list-item>
                      <text:p text:style-name="P51">Регистрацию и авторизацию пользователей с разделением ролей (student, teacher);</text:p>
                    </text:list-item>
                    <text:list-item>
                      <text:p text:style-name="P51">Просмотр списка курсов (языков программирования), списка тем и связанных заданий;</text:p>
                    </text:list-item>
                    <text:list-item>
                      <text:p text:style-name="P51">Просмотр теоретических материалов по выбранной теме (поддержка HTML-разметки в тексте теории);</text:p>
                    </text:list-item>
                    <text:list-item>
                      <text:p text:style-name="P51">Просмотр условия задания и публичного примера ввода/вывода;</text:p>
                    </text:list-item>
                    <text:list-item>
                      <text:p text:style-name="P51">Редактирование и запуск пользовательского кода с передачей входных данных;</text:p>
                    </text:list-item>
                    <text:list-item>
                      <text:p text:style-name="P51">Автоматическую проверку решения на тестах и возврат количества пройденных тестов;</text:p>
                    </text:list-item>
                    <text:list-item>
                      <text:p text:style-name="P51">Отображение прогресса обучения по темам и курсам в профиле пользователя;</text:p>
                    </text:list-item>
                    <text:list-item>
                      <text:p text:style-name="P51">Восстановление пароля по секретному восстановительному полю;</text:p>
                    </text:list-item>
                    <text:list-item>
                      <text:p text:style-name="P51">Администрирование учебного контента преподавателем (создание курсов, тем, заданий и тестов).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text:continue-list="list196492303" text:style-name="WWNum5">
        <text:list-item>
          <text:p text:style-name="P52"><text:span text:style-name="T26">Требова</text:span><text:span text:style-name="T27">ния</text:span></text:p>
          <text:list>
            <text:list-item>
              <text:p text:style-name="P50">Требования к функциональным характеристикам</text:p>
              <text:list>
                <text:list-item>
                  <text:p text:style-name="P53">Работа с учетными записями и ролями:</text:p>
                  <text:list>
                    <text:list-item>
                      <text:p text:style-name="P53">Программа должна поддерживать регистрацию с обязательным указанием логина, пароля, роли и восстановительного поля;</text:p>
                    </text:list-item>
                    <text:list-item>
                      <text:p text:style-name="P53">Программа должна поддерживать вход по логину и паролю;</text:p>
                    </text:list-item>
                    <text:list-item>
                      <text:p text:style-name="P53">Программа должна поддерживать восстановление пароля по логину, восстановительному полю и новому паролю;</text:p>
                    </text:list-item>
                    <text:list-item>
                      <text:p text:style-name="P53">Для авторизованного пользователя должна поддерживаться сессия по bearer-токену с ограниченным временем жизни;</text:p>
                    </text:list-item>
                    <text:list-item>
                      <text:p text:style-name="P53">Роль teacher должна предоставлять доступ к панели преподавателя, роль student - к пользовательскому режиму обучения.</text:p>
                    </text:list-item>
                  </text:list>
                </text:list-item>
                <text:list-item>
                  <text:p text:style-name="P53">Работа с курсами, темами и заданиями:</text:p>
                  <text:list>
                    <text:list-item>
                      <text:p text:style-name="P53">Должна быть реализована загрузка списка курсов (языков) с кратким описанием и изображением;</text:p>
                    </text:list-item>
                    <text:list-item>
                      <text:p text:style-name="P53">Для выбранного курса должна быть реализована загрузка списка тем;</text:p>
                    </text:list-item>
                    <text:list-item>
                      <text:p text:style-name="P53">Для выбранной темы должна быть реализована загрузка теоретического материала и списка заданий;</text:p>
                    </text:list-item>
                    <text:list-item>
                      <text:p text:style-name="P53">Для выбранного задания должна быть реализована загрузка текста задания и публичного теста (пример входа/выхода);</text:p>
                    </text:list-item>
                    <text:list-item>
                      <text:p text:style-name="P53">Навигация должна обеспечивать последовательный переход: курсы → темы → теория → задание.</text:p>
                    </text:list-item>
                  </text:list>
                </text:list-item>
                <text:list-item>
                  <text:p text:style-name="P53">Редактор и выполнение кода:</text:p>
                  <text:list>
                    <text:list-item>
                      <text:p text:style-name="P53"><text:soft-page-break/>В клиенте должен быть реализован встроенный редактор текста решения;</text:p>
                    </text:list-item>
                    <text:list-item>
                      <text:p text:style-name="P53">Пользователь должен иметь возможность запускать код с произвольным входным набором данных;</text:p>
                    </text:list-item>
                    <text:list-item>
                      <text:p text:style-name="P53">Сервер должен компилировать/исполнять код во временной директории и возвращать результат выполнения;</text:p>
                    </text:list-item>
                    <text:list-item>
                      <text:p text:style-name="P53">Сервер должен поддерживать языки C++, Python, C# и Go;</text:p>
                    </text:list-item>
                    <text:list-item>
                      <text:p text:style-name="P53">При компиляционных ошибках должен возвращаться явный результат «Ошибка компиляции», при ошибках исполнения - соответствующее сообщение.</text:p>
                    </text:list-item>
                  </text:list>
                </text:list-item>
                <text:list-item>
                  <text:p text:style-name="P53">Проверка решений и прогресс:</text:p>
                  <text:list>
                    <text:list-item>
                      <text:p text:style-name="P53">Проверка решения должна выполняться на сервере по набору тестов задания;</text:p>
                    </text:list-item>
                    <text:list-item>
                      <text:p text:style-name="P53">Результатом проверки должно быть количество пройденных тестов и общий итог;</text:p>
                    </text:list-item>
                    <text:list-item>
                      <text:p text:style-name="P53">При полном прохождении тестов задание должно помечаться как решённое;</text:p>
                    </text:list-item>
                    <text:list-item>
                      <text:p text:style-name="P53">При решении всех заданий темы прогресс темы должен устанавливаться в 100%;</text:p>
                    </text:list-item>
                    <text:list-item>
                      <text:p text:style-name="P53">В профиле должен отображаться общий прогресс, список завершённых/незавершённых тем и прогресс по курсам.</text:p>
                    </text:list-item>
                  </text:list>
                </text:list-item>
                <text:list-item>
                  <text:p text:style-name="P53">Функции преподавателя:</text:p>
                  <text:list>
                    <text:list-item>
                      <text:p text:style-name="P53">Преподаватель должен иметь возможность создавать курс (название, краткое описание, URL изображения);</text:p>
                    </text:list-item>
                    <text:list-item>
                      <text:p text:style-name="P53">Преподаватель должен иметь возможность создавать тему (курс, название темы, текст теории);</text:p>
                    </text:list-item>
                    <text:list-item>
                      <text:p text:style-name="P53">Преподаватель должен иметь возможность создавать задание (тема, текст, публичный пример);</text:p>
                    </text:list-item>
                    <text:list-item>
                      <text:p text:style-name="P53">Преподаватель должен иметь возможность добавлять дополнительные тесты к заданию;</text:p>
                    </text:list-item>
                    <text:list-item>
                      <text:p text:style-name="P53">Доступ к операциям создания контента должен быть ограничен серверной проверкой роли teacher.</text:p>
                    </text:list-item>
                  </text:list>
                </text:list-item>
              </text:list>
            </text:list-item>
            <text:list-item>
              <text:p text:style-name="P50">Требования к надёжности</text:p>
              <text:list>
                <text:list-item>
                  <text:p text:style-name="P51">Требования к обеспечению надежного функционирования программы:</text:p>
                  <text:list>
                    <text:list-item>
                      <text:p text:style-name="P51">Все API-методы должны валидировать HTTP-метод запроса и обязательные поля входных данных;</text:p>
                    </text:list-item>
                    <text:list-item>
                      <text:p text:style-name="P51">При ошибках валидации или авторизации сервер должен возвращать структурированный JSON-ответ с кодом ошибки;</text:p>
                    </text:list-item>
                    <text:list-item>
                      <text:p text:style-name="P51">Приложение должно обрабатывать сетевые и серверные ошибки с выводом текста ошибки пользователю;</text:p>
                    </text:list-item>
                    <text:list-item>
                      <text:p text:style-name="P51">Для снижения риска зависаний выполнения кода должны использоваться ограничения по времени компиляции и запуска;</text:p>
                    </text:list-item>
                    <text:list-item>
                      <text:p text:style-name="P51">Временные каталоги выполнения должны очищаться после завершения запуска/проверки;</text:p>
                    </text:list-item>
                    <text:list-item>
                      <text:p text:style-name="P51">Состояние авторизации должно корректно сбрасываться при выходе из аккаунта.</text:p>
                    </text:list-item>
                  </text:list>
                </text:list-item>
                <text:list-item>
                  <text:p text:style-name="P51">Время восстановления после отказа:</text:p>
                  <text:list>
                    <text:list-item>
                      <text:p text:style-name="P51">При отказе клиентской программы восстановление обеспечивается перезапуском приложения;</text:p>
                    </text:list-item>
                    <text:list-item>
                      <text:p text:style-name="P51">При истечении серверной сессии пользователь должен повторно авторизоваться;</text:p>
                    </text:list-item>
                    <text:list-item>
                      <text:p text:style-name="P51">При сбое серверной части восстановление зависит от причины и включает перезапуск web/API-сервиса и проверку БД.</text:p>
                    </text:list-item>
                  </text:list>
                </text:list-item>
                <text:list-item>
                  <text:p text:style-name="P51">Отказы из-за некорректных действий пользователей системы</text:p>
                  <text:list>
                    <text:list-item>
                      <text:p text:style-name="P51">При пустом или некорректном вводе (логин/пароль/код/ID) должны возвращаться сообщения об ошибке;</text:p>
                    </text:list-item>
                    <text:list-item>
                      <text:p text:style-name="P51">При попытке вызова защищённых методов без токена должен возвращаться отказ авторизации;</text:p>
                    </text:list-item>
                    <text:list-item>
                      <text:p text:style-name="P51"><text:soft-page-break/>При попытке доступа студента к операциям преподавателя должен возвращаться отказ по правам доступа.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text:continue-numbering="true" text:style-name="WWNum5">
        <text:list-item>
          <text:p text:style-name="P50">Условия эксплуатации</text:p>
          <text:list>
            <text:list-item>
              <text:p text:style-name="P50">Климатические условия эксплуатации</text:p>
              <text:list>
                <text:list-item>
                  <text:p text:style-name="P51">Рабочая температура должна находиться в диапазоне от 10 до 35 градусов Цельсия;</text:p>
                </text:list-item>
                <text:list-item>
                  <text:p text:style-name="P51">Рабочая влажность должна быть в диапазоне от 30% до 80%.</text:p>
                </text:list-item>
              </text:list>
            </text:list-item>
            <text:list-item>
              <text:p text:style-name="P50">Требования к квалификации и численности персонала</text:p>
              <text:list>
                <text:list-item>
                  <text:p text:style-name="P51">Для студента и преподавателя специальных навыков администрирования системы не требуется;</text:p>
                </text:list-item>
                <text:list-item>
                  <text:p text:style-name="P51">Для сопровождения серверной части требуется специалист, владеющий PHP, SQL и администрированием Linux-сервера.</text:p>
                </text:list-item>
              </text:list>
            </text:list-item>
            <text:list-item>
              <text:p text:style-name="P50">Требования к составу и параметрам технических средств</text:p>
              <text:list>
                <text:list-item>
                  <text:p text:style-name="P51">Клиентская ОС: Windows 10+ или Linux;</text:p>
                </text:list-item>
                <text:list-item>
                  <text:p text:style-name="P51">Процессор: Intel Core i3 или эквивалент;</text:p>
                </text:list-item>
                <text:list-item>
                  <text:p text:style-name="P51">ОЗУ: не менее <text:span text:style-name="T28">1</text:span> ГБ;</text:p>
                </text:list-item>
                <text:list-item>
                  <text:p text:style-name="P51">Свободное место на диске: не менее <text:span text:style-name="T28">2</text:span>00 МБ для клиента;</text:p>
                </text:list-item>
                <text:list-item>
                  <text:p text:style-name="P51">Постоянное интернет-соединение для работы с API;</text:p>
                </text:list-item>
                <text:list-item>
                  <text:p text:style-name="P51">Сервер: Linux/Unix-подобная ОС, PHP с PDO MySQL, СУБД MySQL/MariaDB;</text:p>
                </text:list-item>
                <text:list-item>
                  <text:p text:style-name="P51">Для выполнения кода на сервере требуются установленные инструменты: g++, python3, mono (mcs/csc+mono), go.</text:p>
                </text:list-item>
              </text:list>
            </text:list-item>
            <text:list-item>
              <text:p text:style-name="P50">Требования к информационной и программной совместимости</text:p>
              <text:list>
                <text:list-item>
                  <text:p text:style-name="P51">Требования к информационным структурам и методам решения:</text:p>
                  <text:list>
                    <text:list-item>
                      <text:p text:style-name="P51">Данные должны храниться в реляционной БД с сущностями пользователей, сессий, языков, тем, заданий, тестов и прогресса;</text:p>
                    </text:list-item>
                    <text:list-item>
                      <text:p text:style-name="P51">Обмен между клиентом и сервером должен осуществляться по HTTP(S) с JSON-полями;</text:p>
                    </text:list-item>
                    <text:list-item>
                      <text:p text:style-name="P51">Идентификаторы курсов, тем и заданий должны использоваться в API-запросах для выборки контента;</text:p>
                    </text:list-item>
                    <text:list-item>
                      <text:p text:style-name="P51">Прогресс должен вычисляться на сервере и передаваться клиенту в агрегированном виде.</text:p>
                    </text:list-item>
                  </text:list>
                </text:list-item>
                <text:list-item>
                  <text:p text:style-name="P51">Требования к исходным кодам и языкам программирования:</text:p>
                  <text:list>
                    <text:list-item>
                      <text:p text:style-name="P51">Клиентская часть реализуется на C++ (Qt) и QML;</text:p>
                    </text:list-item>
                    <text:list-item>
                      <text:p text:style-name="P51">Серверная API-часть реализуется на PHP;</text:p>
                    </text:list-item>
                    <text:list-item>
                      <text:p text:style-name="P51">SQL-скрипт и структура БД должны быть совместимы с MySQL/MariaDB;</text:p>
                    </text:list-item>
                    <text:list-item>
                      <text:p text:style-name="P51">Код должен быть структурирован по модулям: клиентский UI, клиентский API-слой, серверные endpoint-методы.</text:p>
                    </text:list-item>
                  </text:list>
                </text:list-item>
                <text:list-item>
                  <text:p text:style-name="P51">Требования к программным средствам, используемым программой:</text:p>
                  <text:list>
                    <text:list-item>
                      <text:p text:style-name="P51">Клиент использует Qt Quick / Qt Quick Controls / Qt Network;</text:p>
                    </text:list-item>
                    <text:list-item>
                      <text:p text:style-name="P51">Сервер использует PHP PDO и веб-сервер с поддержкой запуска PHP-скриптов;</text:p>
                    </text:list-item>
                    <text:list-item>
                      <text:p text:style-name="P51">Для выполнения пользовательского кода используются системные компиляторы/интерпретаторы и утилита timeout;</text:p>
                    </text:list-item>
                    <text:list-item>
                      <text:p text:style-name="P51">Система должна обеспечивать совместимость протокола API между клиентом и сервером при единых именах endpoint-методов.</text:p>
                    </text:list-item>
                  </text:list>
                </text:list-item>
                <text:list-item>
                  <text:p text:style-name="P51">Требования к защите информации и программ:</text:p>
                  <text:list>
                    <text:list-item>
                      <text:p text:style-name="P51">Пароли и восстановительные данные должны храниться в виде хэшей;</text:p>
                    </text:list-item>
                    <text:list-item>
                      <text:p text:style-name="P51">Доступ к защищённым API-методам должен осуществляться только по bearer-токену;</text:p>
                    </text:list-item>
                    <text:list-item>
                      <text:p text:style-name="P51">Для выполнения пользовательского кода должны применяться ограничения времени выполнения;</text:p>
                    </text:list-item>
                    <text:list-item>
                      <text:p text:style-name="P51">Должно быть реализовано разграничение доступа по ролям и запрет несанкционированных операций.</text:p>
                    </text:list-item>
                  </text:list>
                </text:list-item>
              </text:list>
            </text:list-item>
            <text:list-item>
              <text:p text:style-name="P50"><text:soft-page-break/>Специальные требования</text:p>
              <text:list>
                <text:list-item>
                  <text:p text:style-name="P51">Интерфейс должен поддерживать пользовательский сценарий без стандартной системной рамки окна (кастомный заголовок окна);</text:p>
                </text:list-item>
                <text:list-item>
                  <text:p text:style-name="P51">Должна поддерживаться стартовая заставка (Splash Screen);</text:p>
                </text:list-item>
                <text:list-item>
                  <text:p text:style-name="P51">В профиле должен отображаться детализированный прогресс по темам и курсам;</text:p>
                </text:list-item>
                <text:list-item>
                  <text:p text:style-name="P51">Панель преподавателя должна быть доступна только после авторизации учётной записи с ролью teacher;</text:p>
                </text:list-item>
                <text:list-item>
                  <text:p text:style-name="P51">В программе должен быть реализован выход из аккаунта с очисткой локального состояния авторизации.</text:p>
                </text:list-item>
              </text:list>
            </text:list-item>
          </text:list>
        </text:list-item>
      </text:list>
      <text:p text:style-name="P55"/>
      <text:list text:continue-numbering="true" text:style-name="WWNum5">
        <text:list-item>
          <text:p text:style-name="P50">Требования к программной документации</text:p>
          <text:list>
            <text:list-item>
              <text:p text:style-name="P50">Состав программной документации</text:p>
              <text:list>
                <text:list-item>
                  <text:p text:style-name="P51">Техническое задание;</text:p>
                </text:list-item>
                <text:list-item>
                  <text:p text:style-name="P51">Руководство пользователя.</text:p>
                </text:list-item>
              </text:list>
            </text:list-item>
          </text:list>
        </text:list-item>
      </text:list>
      <text:p text:style-name="P55"/>
      <text:list text:continue-numbering="true" text:style-name="WWNum5">
        <text:list-item>
          <text:p text:style-name="P50">Технико-экономическое обоснование</text:p>
          <text:list>
            <text:list-item>
              <text:p text:style-name="P51">Разработка ориентирована на учебный процесс и не предполагает коммерческого лицензирования на этапе ВКР;</text:p>
            </text:list-item>
            <text:list-item>
              <text:p text:style-name="P51">Экономическая эффективность выражается в сокращении времени проверки типовых практических задач за счёт автоматизированной проверки;</text:p>
            </text:list-item>
            <text:list-item>
              <text:p text:style-name="P51">Использование открытых технологий (Qt, PHP, MySQL, компиляторы/интерпретаторы) снижает стоимость внедрения.</text:p>
            </text:list-item>
          </text:list>
        </text:list-item>
      </text:list>
      <text:p text:style-name="P55"/>
      <text:list text:continue-numbering="true" text:style-name="WWNum5">
        <text:list-item>
          <text:p text:style-name="P50">Стадии и этапы разработки</text:p>
          <text:list>
            <text:list-item>
              <text:p text:style-name="P50">Стадии разработки</text:p>
              <text:list>
                <text:list-item>
                  <text:p text:style-name="P51">Разработка технического задания;</text:p>
                </text:list-item>
                <text:list-item>
                  <text:p text:style-name="P51">Рабочее проектирование;</text:p>
                </text:list-item>
                <text:list-item>
                  <text:p text:style-name="P51">Внедрение.</text:p>
                </text:list-item>
              </text:list>
            </text:list-item>
            <text:list-item>
              <text:p text:style-name="P50">Этапы разработки</text:p>
              <text:list>
                <text:list-item>
                  <text:p text:style-name="P51">Разработка технического задания;</text:p>
                </text:list-item>
                <text:list-item>
                  <text:p text:style-name="P51">Разработка программы;</text:p>
                </text:list-item>
                <text:list-item>
                  <text:p text:style-name="P51">Разработка программной документации;</text:p>
                </text:list-item>
                <text:list-item>
                  <text:p text:style-name="P51">Испытания программы;</text:p>
                </text:list-item>
                <text:list-item>
                  <text:p text:style-name="P51">Подготовка и передача программы.</text:p>
                </text:list-item>
              </text:list>
            </text:list-item>
            <text:list-item>
              <text:p text:style-name="P50">Содержание работ по этапам</text:p>
              <text:list>
                <text:list-item>
                  <text:p text:style-name="P51">Разработка технического задания:</text:p>
                  <text:list>
                    <text:list-item>
                      <text:p text:style-name="P51">Постановка задачи;</text:p>
                    </text:list-item>
                    <text:list-item>
                      <text:p text:style-name="P51">Определение и уточнение требований к техническим средствам;</text:p>
                    </text:list-item>
                    <text:list-item>
                      <text:p text:style-name="P51">Определение требований к программе;</text:p>
                    </text:list-item>
                    <text:list-item>
                      <text:p text:style-name="P51">Определение стадий, этапов и сроков разработки программы и документации на неё;</text:p>
                    </text:list-item>
                    <text:list-item>
                      <text:p text:style-name="P51">Согласование и утверждение технического задания.</text:p>
                    </text:list-item>
                  </text:list>
                </text:list-item>
                <text:list-item>
                  <text:p text:style-name="P51">Разработка программы:</text:p>
                  <text:list>
                    <text:list-item>
                      <text:p text:style-name="P51">Программирование;</text:p>
                    </text:list-item>
                    <text:list-item>
                      <text:p text:style-name="P51">Отладка программы.</text:p>
                    </text:list-item>
                    <text:list-item>
                      <text:p text:style-name="P51">Разработка программной документации:</text:p>
                      <text:list>
                        <text:list-item>
                          <text:p text:style-name="P51">Разработка программных документов в соответствии с требованиями к составу документации.</text:p>
                        </text:list-item>
                      </text:list>
                    </text:list-item>
                  </text:list>
                </text:list-item>
                <text:list-item>
                  <text:p text:style-name="P51">Испытаний программы:</text:p>
                  <text:list>
                    <text:list-item>
                      <text:p text:style-name="P51">Разработка, согласование и утверждение и методики испытаний;</text:p>
                    </text:list-item>
                    <text:list-item>
                      <text:p text:style-name="P51"><text:s/>Проведение приемо-сдаточных испытаний;</text:p>
                    </text:list-item>
                    <text:list-item>
                      <text:p text:style-name="P51">Корректировка программы и программной документации по результатам испытаний.</text:p>
                    </text:list-item>
                  </text:list>
                </text:list-item>
                <text:list-item>
                  <text:p text:style-name="P51"><text:soft-page-break/>Подготовка и передача программы:</text:p>
                  <text:list>
                    <text:list-item>
                      <text:p text:style-name="P51">Работа по подготовке и передаче программы и программной документации в эксплуатацию на объектах Заказчика.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text:continue-numbering="true" text:style-name="WWNum5">
        <text:list-item>
          <text:p text:style-name="P50">Порядок контроля и приемки<text:span text:style-name="T10"/></text:p>
          <text:list>
            <text:list-item>
              <text:p text:style-name="P50">Предварительный контроль</text:p>
              <text:list>
                <text:list-item>
                  <text:p text:style-name="P51">Проверка соответствия функциональности приложения требованиям технического задания. Контроль качества кода и отсутствия ошибок.</text:p>
                </text:list-item>
              </text:list>
            </text:list-item>
            <text:list-item>
              <text:p text:style-name="P50">Тестирование</text:p>
              <text:list>
                <text:list-item>
                  <text:p text:style-name="P51">Проверка всех основных функций приложения;</text:p>
                </text:list-item>
                <text:list-item>
                  <text:p text:style-name="P51">Проверка стабильности работы приложения при различных нагрузках;</text:p>
                </text:list-item>
                <text:list-item>
                  <text:p text:style-name="P51">Проверка защиты данных пользователей.</text:p>
                </text:list-item>
              </text:list>
            </text:list-item>
            <text:list-item>
              <text:p text:style-name="P50">Приёмка</text:p>
              <text:list>
                <text:list-item>
                  <text:p text:style-name="P51">Проверка соответствия приложения требованиям безопасности и конфиденциальности данных;</text:p>
                </text:list-item>
                <text:list-item>
                  <text:p text:style-name="P51">Проверка оформления приложения в соответствии с корпоративным стилем компании;</text:p>
                </text:list-item>
                <text:list-item>
                  <text:p text:style-name="P51">Утверждение результатов тестирования.</text:p>
                </text:list-item>
              </text:list>
            </text:list-item>
          </text:list>
        </text:list-item>
      </text:list>
      <text:p text:style-name="P55"/>
      <text:p text:style-name="P57"/>
      <text:p text:style-name="Text_20_body"/>
      <text:p text:style-name="Text_20_body"/>
      <text:p text:style-name="Text_20_body"/>
      <text:p text:style-name="Text_20_body"/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8">От ИСПОЛНИТЕЛЯ</text:p>
          </table:table-cell>
          <table:table-cell table:style-name="Table4.A1" office:value-type="string">
            <text:p text:style-name="P59"/>
          </table:table-cell>
          <table:table-cell table:style-name="Table4.A1" office:value-type="string">
            <text:p text:style-name="P58">От ЗАКАЗЧИКА</text:p>
          </table:table-cell>
        </table:table-row>
        <table:table-row table:style-name="Table4.2">
          <table:table-cell table:style-name="Table4.A2" office:value-type="string">
            <text:p text:style-name="P60">Богодухов А.Г.</text:p>
          </table:table-cell>
          <table:table-cell table:style-name="Table4.A1" office:value-type="string">
            <text:p text:style-name="P61"/>
          </table:table-cell>
          <table:table-cell table:style-name="Table4.A2" office:value-type="string">
            <text:p text:style-name="P62"/>
          </table:table-cell>
        </table:table-row>
        <table:table-row table:style-name="Table4.3">
          <table:table-cell table:style-name="Table4.A1" office:value-type="string">
            <text:p text:style-name="P58"><text:span text:style-name="T29">«27» января </text:span>202<text:span text:style-name="T29">6</text:span> г.</text:p>
          </table:table-cell>
          <table:table-cell table:style-name="Table4.A1" office:value-type="string">
            <text:p text:style-name="P59"/>
          </table:table-cell>
          <table:table-cell table:style-name="Table4.A1" office:value-type="string">
            <text:p text:style-name="P63"><text:span text:style-name="T29">«27» января </text:span>202<text:span text:style-name="T29">6</text:span> г.</text:p>
          </table:table-cell>
        </table:table-row>
      </table:table>
      <text:p text:style-name="P64"/>
      <text:p text:style-name="P65">2. ПРОЕКТНАЯ ЧАСТЬ</text:p>
      <text:p text:style-name="P39"/>
      <text:p text:style-name="P27">2.1 Проектирование программного продукта</text:p>
      <text:p text:style-name="P66"/>
      <text:p text:style-name="P67">Разрабатываемое приложение предназначено для поддержки процесса обучения программированию в формате онлайн-школы. Продукт обеспечивает просмотр курсов (языков программирования), уроков (тем), теоретических материалов; <text:span text:style-name="T30">в</text:span>ыполнение практических заданий внутри приложения; отправку решений на сервер, запуск кода и проверку по автоматическим тестам; авторизацию пользователя и хранение прогресса. Программный продукт построен по клиент‑серверной архитектуре и состоит из следующих компонентов: <text:span text:style-name="T30">к</text:span>лиентское приложение - десктопное приложение на Qt + QML (Qt Quick Controls) с С++ модулем доступа к API; <text:span text:style-name="T30">с</text:span>ерверная часть (API) - набор PHP‑скриптов, предоставляющих HTTP‑интерфейс для клиента; <text:span text:style-name="T30">б</text:span>аза данных - схема и стартовые данные (курсы, темы, задания, тесты) <text:span text:style-name="T12">[</text:span><text:span text:style-name="T31">3</text:span><text:span text:style-name="T12">]</text:span>.</text:p>
      <text:p text:style-name="P67">Клиентская часть реализована на Qt с использованием QML‑интерфейсов и навигации через стек страниц. Основные особенности: единое окно приложения с пользовательской панелью заголовка и областью контента; навигация между страницами («Курсы» → «Уроки» → «Теория» → «Задание») через StackView; получение данных (курсы/темы/теория/задания) из API и отображение в виде списков и карточек; встроенный редактор кода и блоки для запуска/проверки решения. Также в приложении предусмотрена роль преподавателя (панель учителя), позволяющая создавать курсы, темы, задания и тесты через API <text:span text:style-name="T12">[</text:span><text:span text:style-name="T31">23</text:span><text:span text:style-name="T12">]</text:span>.</text:p>
      <text:p text:style-name="P67">Сервер реализован на PHP и предоставляет отдельные конечные точки для функций приложения: авторизация и управление сессией; получение учебного контента; выполнение и проверка кода; функции преподавателя (создание контента). Выполнение кода организовано через временный каталог на сервере: исходный код сохраняется в файле с соответствующим расширением; для компилируемых языков запускается компиляция с ограничением по времени; <text:soft-page-break/>запуск выполняется с ограничением по времени, входные данные передаются через <text:span text:style-name="T32">стандартный вход</text:span>; вывод программы сравнивается с ожидаемым (для проверки по тестам) <text:span text:style-name="T12">[</text:span><text:span text:style-name="T31">22</text:span><text:span text:style-name="T12">]</text:span>.</text:p>
      <text:p text:style-name="P68">В приложении предусмотрена поддержка нескольких языков программирования: C++, Python, C#, Go. Выбор языка определяется курсом (языком), к которому относится тема и задание. База данных хранит учебный контент, пользователей и результаты обучения. Основные сущности: users - пользователи (логин, хэш пароля, роль); sessions - сессии авторизации (bearer‑токен с временем жизни); languages - курсы по языкам программирования (название, описание, изображение); themes - темы/уроки, привязанные к языку (lang_id), и теоретический материал; tasks - практические задания, привязанные к теме (theme_id); task_tests - набор тестов для задания (вход/ожидаемый вывод); user_theme_progress, user_task_solved - прогресс прохождения тем и решённых заданий. Такая структура позволяет расширять систему: добавлять новые языки, темы и задания без изменения логики клиента.</text:p>
      <text:p text:style-name="P69">При проектировании интерфейса был сделан акцент на следующих принципах: видимость контента: увеличенные шрифты и размеры элементов управления для более комфортного чтения теории и заданий; последовательная навигация: пользователь всегда понимает, где находится, и может вернуться на шаг назад; разделение теории и практики: теория отображается отдельной страницей, задания - отдельной страницей с редактором; оперативная обратная связь: после запуска кода и проверки по тестам пользователь получает статус выполнения.</text:p>
      <text:p text:style-name="P70"/>
      <text:p text:style-name="P71">2.2 Руководство пользователя</text:p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/>
      <text:p text:style-name="P75"/>
      <text:p text:style-name="P75"/>
      <text:p text:style-name="P76"><text:span text:style-name="T33">Д</text:span>есктопно<text:span text:style-name="T33">е </text:span>приложени<text:span text:style-name="T33">е</text:span> для онлайн-школы по программированию</text:p>
      <text:p text:style-name="P76">Руководство пользователя</text:p>
      <text:p text:style-name="P76">Версия 1.0 </text:p>
      <text:p text:style-name="P76">2026 год</text:p>
      <text:p text:style-name="P77">СОДЕРЖАНИЕ</text:p>
      <text:p text:style-name="P78"/>
      <table:table table:name="Table3" table:style-name="Table3">
        <table:table-column table:style-name="Table3.A"/>
        <table:table-row>
          <table:table-cell table:style-name="Table3.A1" office:value-type="string">
            <text:p text:style-name="P79">1. Введение</text:p>
          </table:table-cell>
        </table:table-row>
        <table:table-row>
          <table:table-cell table:style-name="Table3.A1" office:value-type="string">
            <text:p text:style-name="P79">2. Общие сведения о программе</text:p>
          </table:table-cell>
        </table:table-row>
        <table:table-row>
          <table:table-cell table:style-name="Table3.A1" office:value-type="string">
            <text:p text:style-name="P79">3. Рекомендуемый первичный порядок действий</text:p>
          </table:table-cell>
        </table:table-row>
        <table:table-row>
          <table:table-cell table:style-name="Table3.A1" office:value-type="string">
            <text:p text:style-name="P80">3.1 <text:span text:style-name="T34">У</text:span><text:span text:style-name="T35">становка приложения</text:span></text:p>
          </table:table-cell>
        </table:table-row>
        <table:table-row>
          <table:table-cell table:style-name="Table3.A1" office:value-type="string">
            <text:p text:style-name="P79">4. Работа программы</text:p>
          </table:table-cell>
        </table:table-row>
        <table:table-row>
          <table:table-cell table:style-name="Table3.A1" office:value-type="string">
            <text:p text:style-name="P81">4.1 Запуск приложения и заставка системы</text:p>
          </table:table-cell>
        </table:table-row>
        <table:table-row>
          <table:table-cell table:style-name="Table3.A1" office:value-type="string">
            <text:p text:style-name="P81">4.2 Выбор курса обучения</text:p>
          </table:table-cell>
        </table:table-row>
        <table:table-row>
          <table:table-cell table:style-name="Table3.A1" office:value-type="string">
            <text:p text:style-name="P81">4.3 Выбор темы и навигация по урокам</text:p>
          </table:table-cell>
        </table:table-row>
        <table:table-row>
          <table:table-cell table:style-name="Table3.A1" office:value-type="string">
            <text:p text:style-name="P81">4.4 Просмотр теоретического материала</text:p>
          </table:table-cell>
        </table:table-row>
        <table:table-row>
          <table:table-cell table:style-name="Table3.A1" office:value-type="string">
            <text:p text:style-name="P81">4.5 Авторизация и регистрация пользователя</text:p>
          </table:table-cell>
        </table:table-row>
        <table:table-row>
          <table:table-cell table:style-name="Table3.A1" office:value-type="string">
            <text:p text:style-name="P81">4.6 Выполнение практических заданий</text:p>
          </table:table-cell>
        </table:table-row>
        <table:table-row>
          <table:table-cell table:style-name="Table3.A1" office:value-type="string">
            <text:p text:style-name="P81">4.7 Личный кабинет пользователя и отслеживание прогресса</text:p>
          </table:table-cell>
        </table:table-row>
        <table:table-row>
          <table:table-cell table:style-name="Table3.A1" office:value-type="string">
            <text:p text:style-name="P81">4.8 Панель преподавателя и управление учебным контентом</text:p>
          </table:table-cell>
        </table:table-row>
      </table:table>
      <text:p text:style-name="P82"/>
      <text:p text:style-name="P83">1. ВВЕДЕНИЕ</text:p>
      <text:p text:style-name="P66"/>
      <text:p text:style-name="P84">Цель данного руководства - помочь пользователю быстро освоить программный продукт «Школа программирования»: от первого запуска приложения и регистрации до изучения теоретических материалов, выполнения практических заданий и отслеживания личного прогресса. Продукт представляет собой учебную платформу с клиентским приложением на базе Qt/QML и серверной API-частью, которая обеспечивает хранение данных, авторизацию и работу с курсами, темами, заданиями и тестами. Данное руководство предназначено для студентов, преподавателей и администраторов учебного процесса, использующих систему как в учебной аудитории, так и при самостоятельной подготовке. Платформа позволяет выстроить последовательное обучение: пользователь выбирает курс (язык программирования), затем тему, изучает теорию, после чего переходит к практическому заданию. Такой подход помогает сочетать объяснение материала и немедленную практику, а также делает процесс обучения более наглядным и структурированным.</text:p>
      <text:p text:style-name="P75">В приложении предусмотрены отдельные сценарии работы для двух ролей - «студент» и «преподаватель». Студент получает доступ к каталогу курсов, разделам теории, практическим задачам и странице профиля с прогрессом обучения. Преподаватель, помимо стандартной навигации, может использовать специальную панель для наполнения системы: создавать новые курсы, темы, задания и тесты. Таким образом, продукт одновременно решает две задачи: обучение пользователей и удобное управление образовательным контентом.</text:p>
      <text:p text:style-name="P85">В настоящем руководстве подробно описаны общие сведения о программе, логика интерфейса и пошаговый порядок работы с основными функциями. Структура изложения построена таким образом, чтобы пользователь мог последовательно пройти все ключевые этапы: вход в систему, выбор разделов, выполнение заданий, восстановление пароля при необходимости и выход из учетной записи. Также приведены рекомендации по корректному использованию разделов и контролю результатов обучения.</text:p>
      <text:p text:style-name="P86">2. ОБЩИЕ СВЕДЕНИЯ О ПРОГРАММЕ</text:p>
      <text:p text:style-name="P87"/>
      <text:p text:style-name="P88">Программный продукт «Школа программирования» представляет собой клиент-серверную обучающую систему, ориентированную на изучение программирования по курсам и темам. Архитектура решения включает три основных уровня: серверные HTTP-endpoints, клиентский C++-слой взаимодействия с API и графический интерфейс пользователя на QML. Такое разделение обеспечивает удобство развития проекта: сервер отвечает за бизнес-логику и данные, а клиент - за отображение и взаимодействие с пользователем. Функционально система поддерживает: регистрацию и авторизацию пользователей; разделение прав по ролям «student» и «teacher»; просмотр списка курсов; переход к темам выбранного курса; просмотр теоретических материалов; выполнение практических заданий; просмотр прогресса прохождения; восстановление пароля; создание контента преподавателем.</text:p>
      <text:p text:style-name="P88">Серверная часть предоставляет набор API-методов для операций с пользователями, сессиями, курсами, темами, заданиями и прогрессом. Авторизация реализуется с помощью bearer-токена сессионного типа. При входе пользователя создается сессия, а устаревшие сессии удаляются автоматически. Это позволяет поддерживать контролируемый доступ к защищенным операциям и корректную работу личных данных в профиле. Клиентская часть запускается в окне приложения с пользовательской навигацией и поддерживает сценарий переходов через стек страниц. Если для выполнения целевого действия требуется авторизация, система перенаправляет на страницу входа/регистрации и после успешной аутентификации возвращает пользователя в нужный раздел.</text:p>
      <text:p text:style-name="P88">Для преподавателя доступна отдельная панель с вкладками управления контентом. В ней можно добавлять новые учебные сущности через формы ввода, выбирать существующие курсы и темы из выпадающих списков, а также заполнять текстовые поля теории и условий задач. Это дает возможность использовать систему как конструктор учебных материалов без изменения исходного кода.</text:p>
      <text:p text:style-name="P89">3. РЕКОМЕНДУЕМЫЙ ПЕРВИЧНЫЙ ПОРЯДОК ДЕЙСТВИЙ</text:p>
      <text:p text:style-name="P90"/>
      <text:p text:style-name="P91">3.1 Установка приложения</text:p>
      <text:p text:style-name="P92"/>
      <text:p text:style-name="P93"><text:span text:style-name="T36">Для установки приложения онлайн-школы </text:span><text:span text:style-name="T37">по </text:span><text:span text:style-name="T36">программировани</text:span><text:span text:style-name="T37">ю </text:span><text:span text:style-name="T36">необходимо перейти на официальный сайт проекта: https://diploma.bogaledev.r</text:span><text:span text:style-name="T37">u (</text:span><text:span text:style-name="T36">Рисунок 1), выбрать версию для целевой операционной системы (Windows или Linux), загрузить архив и распаковать его в выбранный рабочий каталог.</text:span></text:p>
      <text:p text:style-name="P94"><draw:frame draw:style-name="fr1" draw:name="Image9" text:anchor-type="paragraph" svg:width="12cm" svg:height="8.25cm" draw:z-index="8"><draw:image xlink:href="Pictures/10000001000006040000041F50745D69.png" xlink:type="simple" xlink:show="embed" xlink:actuate="onLoad" draw:mime-type="image/png"/></draw:frame>Рисунок 1 - <text:span text:style-name="T38">Страница сайта для установки</text:span></text:p>
      <text:p text:style-name="P95">Для операционной системы Windows после распаковки архива приложение готово к запуску. В релизе предварительно выполнено развёртывание необходимых Qt-компонентов (windeployqt), поэтому запуск осуществляется непосредственно через исполняемый файл DiplomaApp.exe.</text:p>
      <text:p text:style-name="P95">Для операционной системы Linux после распаковки архива требуется установить недостающие системные зависимости и дополнительные пакеты Qt с использованием штатного пакетного менеджера дистрибутива. После установки зависимостей приложение запускается через исполняемый файл DiplomaApp.</text:p>
      <text:p text:style-name="P96"><text:span text:style-name="T35">4. </text:span>РАБОТА ПРОГРАММЫ</text:p>
      <text:p text:style-name="P97"/>
      <text:p text:style-name="P98">4.1 Запуск приложения и заставка системы</text:p>
      <text:p text:style-name="P98"/>
      <text:p text:style-name="P99">Пользовательский интерфейс приложения реализован в виде единого оконного пространства с последовательной навигацией по основным этапам обучения: выбор курса → выбор темы → изучение теоретического материала → выполнение практического задания → просмотр результатов и прогресса. После запуска приложения отображается заставка системы (Рисунок 2), содержащая логотип и название программного продукта. Заставка выполняет не только визуальную функцию, но и используется для первоначальной инициализации клиентской части приложения, проверки соединения с сервером и подготовки пользовательского интерфейса к дальнейшей работе. После завершения загрузки автоматически открывается основная рабочая</text:p>
      <text:p text:style-name="P100"><draw:frame draw:style-name="fr2" draw:name="Image1" text:anchor-type="paragraph" svg:width="12cm" svg:height="7.999cm" draw:z-index="0"><draw:image xlink:href="Pictures/10000001000005E3000003F4E19DD676.png" xlink:type="simple" xlink:show="embed" xlink:actuate="onLoad" draw:mime-type="image/png"/></draw:frame>Рисунок <text:span text:style-name="T39">2 - </text:span><text:span text:style-name="T38">Заставка приложения</text:span></text:p>
      <text:p text:style-name="P101"/>
      <text:p text:style-name="P98">4.2 Выбор курса обучения</text:p>
      <text:p text:style-name="P102"/>
      <text:p text:style-name="P99">После завершения заставки пользователь попадает на первую рабочую страницу (Рисунок <text:span text:style-name="T39">3</text:span>) - список курсов (языков программирования). Каждый элемент списка содержит название и описание курса. <text:span text:style-name="T40">В</text:span>ыбор курса выполняется нажатием на карточку элемента. Эта страница является стартовой точкой пользовательского пути.</text:p>
      <text:p text:style-name="P100"><draw:frame draw:style-name="fr3" draw:name="Image2" text:anchor-type="paragraph" svg:width="12cm" svg:height="7.999cm" draw:z-index="1"><draw:image xlink:href="Pictures/10000001000005E3000003F465AC5D0C.png" xlink:type="simple" xlink:show="embed" xlink:actuate="onLoad" draw:mime-type="image/png"/></draw:frame><text:soft-page-break/>Рисунок <text:span text:style-name="T39">3 - </text:span><text:span text:style-name="T38">Список языков</text:span></text:p>
      <text:p text:style-name="P103"/>
      <text:p text:style-name="P104">4.3 Выбор темы и навигация по урокам</text:p>
      <text:p text:style-name="P105"/>
      <text:p text:style-name="P99">После выбора курса открывается окно со списком тем (Рисунок <text:span text:style-name="T39">4</text:span>). На странице отображаются все темы по выбранному языку программирования. <text:span text:style-name="T41">П</text:span>ереход к следующему шагу выполняется выбором нужной темы. Для удобства каждая тема сопровождается кратким пояснением. Такая организация обеспечивает удобную навигацию по учебному материалу и позволяет пользователю последовательно изучать содержимое курса.</text:p>
      <text:p text:style-name="P106"><draw:frame draw:style-name="fr3" draw:name="Image3" text:anchor-type="paragraph" svg:width="12cm" svg:height="7.999cm" draw:z-index="2"><draw:image xlink:href="Pictures/10000001000005E3000003F421C42F62.png" xlink:type="simple" xlink:show="embed" xlink:actuate="onLoad" draw:mime-type="image/png"/></draw:frame>Рисунок <text:span text:style-name="T39">4 - </text:span><text:span text:style-name="T38">Список уроков</text:span></text:p>
      <text:p text:style-name="P107"/>
      <text:p text:style-name="P108">4.4 Просмотр теоретического материала</text:p>
      <text:p text:style-name="P99"><text:soft-page-break/>После выбора темы открывается <text:span text:style-name="T42">окно с</text:span> теоретическ<text:span text:style-name="T42">им</text:span> материа<text:span text:style-name="T42">лом</text:span> (Рисунок <text:span text:style-name="T39">5</text:span>). В верхней части отображается текст теории, а ниже - кнопки перехода к практическим заданиям темы. Выбор задания выполняется нажатием соответствующей кнопки.</text:p>
      <text:p text:style-name="P109"><draw:frame draw:style-name="fr3" draw:name="Image4" text:anchor-type="paragraph" svg:width="12cm" svg:height="7.999cm" draw:z-index="3"><draw:image xlink:href="Pictures/10000001000005E3000003F416332F05.png" xlink:type="simple" xlink:show="embed" xlink:actuate="onLoad" draw:mime-type="image/png"/></draw:frame>Рисунок <text:span text:style-name="T39">5 - </text:span><text:span text:style-name="T38">Теоретический материал</text:span></text:p>
      <text:p text:style-name="P110"/>
      <text:p text:style-name="P111">4.5 Авторизация и регистрация пользователя</text:p>
      <text:p text:style-name="P111"/>
      <text:p text:style-name="P99">Если пользователь откры<text:span text:style-name="T41">вает</text:span> задание или личный кабинет, приложение автоматически открывает окно авторизации (Рисунок <text:span text:style-name="T39">6</text:span>). После успешной авторизации пользователь возвращается к запрошенному ранее действию.</text:p>
      <text:p text:style-name="P109"><draw:frame draw:style-name="fr3" draw:name="Image5" text:anchor-type="paragraph" svg:width="12cm" svg:height="7.999cm" draw:z-index="4"><draw:image xlink:href="Pictures/10000001000005E3000003F4DE5E6B60.png" xlink:type="simple" xlink:show="embed" xlink:actuate="onLoad" draw:mime-type="image/png"/></draw:frame>Рисунок <text:span text:style-name="T39">6 - </text:span><text:span text:style-name="T38">Авторизация</text:span></text:p>
      <text:p text:style-name="P112"><text:soft-page-break/>4.6 Выполнение практических заданий</text:p>
      <text:p text:style-name="P112"/>
      <text:p text:style-name="P99">Окно задания (Рисунок <text:span text:style-name="T39">7</text:span>) содержит все основные элементы практической работы: текст условия задания; поле редактора кода; блок публичного примера (вход/выход); поле «Свой тест» для ввода пользовательских данных; кнопки «Запустить» <text:span text:style-name="T42">для</text:span> запуск решения на пользовательском вводе <text:span text:style-name="T42">и </text:span>«Отправить» <text:span text:style-name="T42">для</text:span> проверк<text:span text:style-name="T42">и</text:span> решения на автоматических тестах. Ниже выводится <text:span text:style-name="T42">блок с результатом выполнения</text:span> (успешный запуск, ошибка компиляции/выполнения, число пройденных тестов, принятие решения). Таким образом, пользователь получает оперативную обратную связь после каждого действия.</text:p>
      <text:p text:style-name="P109"><draw:frame draw:style-name="fr3" draw:name="Image6" text:anchor-type="paragraph" svg:width="12cm" svg:height="7.999cm" draw:z-index="5"><draw:image xlink:href="Pictures/10000001000005E3000003F484B186BF.png" xlink:type="simple" xlink:show="embed" xlink:actuate="onLoad" draw:mime-type="image/png"/></draw:frame>Рисунок <text:span text:style-name="T39">7 - </text:span><text:span text:style-name="T38">Практическое задание</text:span></text:p>
      <text:p text:style-name="P113"/>
      <text:p text:style-name="P112">4.7 Личный кабинет пользователя и отслеживание прогресса</text:p>
      <text:p text:style-name="P112"/>
      <text:p text:style-name="P99">Окно личного кабинета открывается по кнопке профиля после авторизации (Рисунок <text:span text:style-name="T39">8</text:span>). Здесь отображаются: общий прогресс обучения в процентах; прогресс по каждому курсу в виде полосы заполнения; кнопка «Выйти из аккаунта» для завершения сессии. Страница используется для мониторинга результатов обучения и управления текущим входом пользователя. Система автоматически сохраняет результаты выполнения заданий пользователя после успешного прохождения тестов. Это позволяет отслеживать степень освоения учебного материала как по курсам, так и по всей образовательной программе.</text:p>
      <text:p text:style-name="P109"><draw:frame draw:style-name="fr3" draw:name="Image7" text:anchor-type="paragraph" svg:width="12cm" svg:height="7.999cm" draw:z-index="6"><draw:image xlink:href="Pictures/10000001000005E3000003F40E1DBFF7.png" xlink:type="simple" xlink:show="embed" xlink:actuate="onLoad" draw:mime-type="image/png"/></draw:frame><text:soft-page-break/>Рисунок <text:span text:style-name="T39">8 - </text:span><text:span text:style-name="T38">Прогресс обучения</text:span></text:p>
      <text:p text:style-name="P110"/>
      <text:p text:style-name="P114">4.8 Панель преподавателя и управление учебным контентом</text:p>
      <text:p text:style-name="P114"/>
      <text:p text:style-name="P115">Если аккаунт имеет роль <text:span text:style-name="T43">учителя</text:span>, вместо личного кабинета открывается окно «Панель учителя» (Рисунок <text:span text:style-name="T39">9</text:span>). Вкладки панели предоставляют инструменты администрирования учебного контента: «Новый курс» - создание нового курса (языка); «Новая тема» - добавление темы и теоретического материала; «Новое задание» - создание практического задания; «Новый тест» - добавление теста для автоматической проверки; «Выйти» - выход из учётной записи преподавателя.</text:p>
      <text:p text:style-name="P116"><draw:frame draw:style-name="fr3" draw:name="Image8" text:anchor-type="paragraph" svg:width="12cm" svg:height="7.999cm" draw:z-index="7"><draw:image xlink:href="Pictures/10000001000005E3000003F4C418C31F.png" xlink:type="simple" xlink:show="embed" xlink:actuate="onLoad" draw:mime-type="image/png"/></draw:frame>Рисунок <text:span text:style-name="T39">9 - </text:span><text:span text:style-name="T38">Панель учителя</text:span></text:p>
      <text:p text:style-name="P117"><text:soft-page-break/>2.3 Результаты апробации</text:p>
      <text:p text:style-name="P117"/>
      <text:p text:style-name="P115">Апробация разработанного программного приложения проводилась на заключительном этапе выполнения выпускной квалификационной работы и была направлена на проверку его практической применимости, устойчивости работы пользовательских сценариев и качества восприятия целевой аудиторией.</text:p>
      <text:p text:style-name="P115">В рамках внешней профессионально-ориентированной оценки проект был представлен 24 апреля 2026 года на XXII Межрегиональной студенческой научно-практической конференции «Студент. Образование. Общество XXI века: профессиональное становление в эпоху цифровой трансформации и искусственного интеллекта» в тематическом направлении «Цифровая трансформация общества: цифровые проекты, ИИ, Интернет вещей, большие данные, блокчейн». Демонстрация приложения в формате научного доклада позволила получить экспертную обратную связь в академической среде.</text:p>
      <text:p text:style-name="P115">Дополнительно была проведена пользовательская апробация с участием преподавателей и студентов. Проверка включала базовые сценарии взаимодействия с интерфейсом, навигацию по ключевым разделам, выполнение целевых действий пользователя и общую оценку удобства использования. По результатам тестирования существенных затруднений в работе с системой выявлено не было; участники отметили логичность структуры, понятность интерфейса и практическую полезность реализованного функционала.</text:p>
      <text:p text:style-name="P118">Содержательный анализ собранной обратной связи показал, что разработанное приложение корректно решает поставленные прикладные задачи и может быть рекомендовано к дальнейшему использованию и развитию. Таким образом, результаты апробации подтверждают работоспособность, востребованность и практическую значимость разработанного приложения. Полученные данные могут служить основанием для последующего расширения функциональных возможностей системы, углубления аналитических модулей и масштабирования опыта применения в смежных образовательных и проектных контекстах.</text:p>
      <text:p text:style-name="P119">ЗАКЛЮЧЕНИЕ</text:p>
      <text:p text:style-name="P120"/>
      <text:p text:style-name="P115">Выпускная квалификационная работа на тему «Разработка десктопного приложения для онлайн-школы по программированию» посвящена решению практико-ориентированной задачи повышения качества обучения в цифровой среде. Актуальность проекта обусловлена тем, что современное онлайн-обучение программированию требует не только доступа к теории, но и непрерывной практики, оперативной проверки решений и удобной учебной инфраструктуры. На этапе постановки задачи была определена ключевая проблема: разрыв между изучением материалов и выполнением программных заданий, а также высокая зависимость эффективности обучения от технической подготовки обучающихся <text:span text:style-name="T12">[</text:span><text:span text:style-name="T22">3</text:span><text:span text:style-name="T12">]</text:span>.</text:p>
      <text:p text:style-name="P115">В соответствии с поставленной целью в проекте последовательно решены все запланированные задачи. <text:span text:style-name="T44">А</text:span>нализ предметной области выполнен через изучение специфики онлайн-обучения программированию, образовательных сценариев и потребностей целевых пользователей. В результате сформировано обоснование структуры будущей системы: единое приложение, объединяющее теоретический контент, практические задания и инструменты контроля результатов. <text:span text:style-name="T44">Т</text:span>ехническо<text:span text:style-name="T44">е</text:span> задани<text:span text:style-name="T44">е</text:span> <text:span text:style-name="T44">разработано </text:span>с определением функциональных и нефункциональных требований, ролей пользователей, ограничений и критериев качества. Это позволило сформировать прозрачную основу для проектирования и дальнейшей реализации решения, а также обеспечить проверяемость соответствия итогового продукта заявленным требованиям.</text:p>
      <text:p text:style-name="P115"><text:span text:style-name="T44">П</text:span>рограммно<text:span text:style-name="T44">е</text:span> обеспечени<text:span text:style-name="T44">е создано </text:span>через реализацию клиент-серверной архитектуры приложения. В ходе разработки обеспечено взаимодействие между пользовательским интерфейсом и серверной частью, реализованы механизмы аутентификации, управление учебным контентом, получение и обработка результатов выполнения заданий. Отдельное внимание уделено целостности данных и устойчивости основных пользовательских сценариев, что критически <text:soft-page-break/>важно для образовательных систем, ориентированных на регулярную учебную работу <text:span text:style-name="T12">[</text:span><text:span text:style-name="T45">20</text:span><text:span text:style-name="T12">]</text:span>.</text:p>
      <text:p text:style-name="P115"><text:span text:style-name="T44">Р</text:span>азработка пользовательского интерфейса выполнена с учётом принципов понятности, логичности и минимизации когнитивной нагрузки. В интерфейсе организована последовательная навигация по разделам «темы», «теория», «задания» и «результаты», что делает учебный процесс структурированным и предсказуемым для обучающегося. Для преподавателя обеспечены инструменты формирования и сопровождения учебных материалов. <text:span text:style-name="T44">Р</text:span>уководств<text:span text:style-name="T44">о</text:span> пользователя <text:span text:style-name="T44">п</text:span>одгото<text:span text:style-name="T44">влено</text:span>. Документация описывает ключевые сценарии работы с системой и снижает порог входа для разных категорий пользователей.</text:p>
      <text:p text:style-name="P115">В ходе проектирования и реализации подтверждена достижимость главного результата: создано работоспособное десктопное приложение для онлайн-школы по программированию, обеспечивающее интеграцию теоретической и практической составляющих обучения. Разработанное решение позволяет обучающемуся проходить материал последовательно, выполнять задания в единой среде, оперативно получать обратную связь и видеть динамику собственного прогресса. Для преподавателя система формирует удобный контур управления контентом и контроля учебной активности <text:span text:style-name="T12">[</text:span><text:span text:style-name="T22">10</text:span><text:span text:style-name="T12">]</text:span>.</text:p>
      <text:p text:style-name="P115">Практическая значимость проекта заключается в возможности непосредственного внедрения результата в деятельность онлайн-школ, колледжей и иных образовательных организаций, реализующих подготовку в сфере программирования. Приложение может использоваться как самостоятельный учебный инструмент и как компонент существующей цифровой образовательной среды. В обоих случаях достигается снижение технических барьеров, сокращение времени на организацию учебной работы и повышение дисциплины прохождения материалов за счёт понятного маршрута обучения <text:span text:style-name="T12">[</text:span><text:span text:style-name="T22">9</text:span><text:span text:style-name="T12">]</text:span>.</text:p>
      <text:p text:style-name="P115">Результаты апробации показали, что пользователи положительно оценивают удобство интерфейса, структурированность контента и полезность <text:soft-page-break/>практических модулей. Это подтверждает корректность принятых архитектурных и интерфейсных решений, а также обоснованность выбранной концепции объединения теории и практики в едином приложении. Полученные выводы позволяют рассматривать разработку как устойчивую основу для дальнейшего развития.</text:p>
      <text:p text:style-name="P115">Перспективы совершенствования проекта включают расширение набора поддерживаемых языков программирования, внедрение адаптивных траекторий обучения, развитие аналитических инструментов для преподавателя и интеграцию с внешними образовательными сервисами. Дополнительным направлением может стать <text:span text:style-name="T31">изоляция выполнения</text:span> кода <text:span text:style-name="T46">для дополнительной защиты</text:span>, <text:span text:style-name="T31">а также </text:span>оценк<text:span text:style-name="T46">а</text:span> качества решений по нескольким критериям и персонализированные рекомендации по <text:span text:style-name="T31">направлению</text:span> <text:span text:style-name="T45">[16]</text:span>.</text:p>
      <text:p text:style-name="P115">Таким образом, цель выпускной квалификационной работы достигнута в полном объёме, а все поставленные задачи последовательно решены. Разработанное десктопное приложение подтвердило работоспособность, методическую обоснованность и прикладную ценность. Итоговый результат имеет практическую применимость в образовательной сфере, способствует повышению качества обучения программированию и может быть масштабирован в рамках дальнейшей цифровой трансформации учебного процесса.</text:p>
      <text:p text:style-name="P121">СПИСОК ИСПОЛЬЗОВАННЫХ ИСТОЧНИКОВ</text:p>
      <text:p text:style-name="P120"/>
      <text:list text:style-name="L1">
        <text:list-item>
          <text:p text:style-name="P122">ГОСТ Р 56939-2024. Защита информации. Разработка безопасного программного обеспечения. Общие требования.</text:p>
        </text:list-item>
        <text:list-item>
          <text:p text:style-name="P123">ГОСТ Р 59547-2021. Защита информации. <text:span text:style-name="T47">М</text:span>ониторинг информационной безопасности. Общие положения.</text:p>
        </text:list-item>
        <text:list-item>
          <text:p text:style-name="P122">ГОСТ Р 59793-­2021. Информационные технологии. <text:span text:style-name="T47">К</text:span>омплекс стандартов на автоматизированные системы. Автоматизированные системы. Стадии создания.</text:p>
        </text:list-item>
        <text:list-item>
          <text:p text:style-name="P122">ГОСТ Р ИСО/МЭК 25022-2021. Системная и программная инженерия. Требования и оценка качества систем и программного обеспечения (SquaRE). Измерение качества при использовании.</text:p>
        </text:list-item>
        <text:list-item>
          <text:p text:style-name="P124">Российская федерация. Федеральный закон. Об образовании в российской федерации : <text:span text:style-name="T48">Ф</text:span>едеральный закон от 29.12.2012 № 273-ФЗ (ред. от 29.12.2025).</text:p>
        </text:list-item>
        <text:list-item>
          <text:p text:style-name="P125"><text:span text:style-name="T49">О</text:span>б утверждении федерального государственного образовательного стандарта среднего профессионального образования по специальности 09.02.07 Информационные системы и программирование : Приказ Министерства образования и науки РФ от 9.<text:span text:style-name="T49">12.</text:span>2016 г. <text:span text:style-name="T49">№</text:span> 1547 (ред. от 23.08.2024).</text:p>
        </text:list-item>
        <text:list-item>
          <text:p text:style-name="P125">Правительство российской федерации. Об утверждении положения о государственной аккредитации образовательной деятельности : <text:span text:style-name="T48">П</text:span>остановление <text:span text:style-name="T49">п</text:span>равительства РФ от 19.05.2023 <text:span text:style-name="T49">№</text:span> 797.</text:p>
        </text:list-item>
        <text:list-item>
          <text:p text:style-name="P126">Правительство российской федерации. Об утверждении Правил применения организациями, осуществляющими образовательную деятельность, электронного обучения, дистанционных образовательных технологий при реализации образовательных программ : Постановление Правительства <text:span text:style-name="T48">РФ </text:span>от 11.10.2023 <text:span text:style-name="T48">№ </text:span>1678.</text:p>
        </text:list-item>
        <text:list-item>
          <text:p text:style-name="P126">Сафонов, А. А. <text:s/>Цифровая трансформация образования : учебник и практикум для вузов / А. А. Сафонов, М. А. Сафонова. - Москва : Издательство Юрайт, 2026. - 100 с.</text:p>
        </text:list-item>
        <text:list-item>
          <text:p text:style-name="P122"><text:soft-page-break/>Савиных, Г. П. <text:s/>Дидактика и оценивание в цифровую эпоху : учебник для вузов / Г. П. Савиных. - Москва : Издательство Юрайт, 2026. - 99 с.</text:p>
        </text:list-item>
        <text:list-item>
          <text:p text:style-name="P122">Дрозд, К. В. <text:s/>Проектирование образовательной среды : учебник для вузов / К. В. Дрозд, И. В. Плаксина. - 2-е изд., испр. и доп. - Москва : Издательство Юрайт, 2026. - 421 с.</text:p>
        </text:list-item>
        <text:list-item>
          <text:p text:style-name="P127"><text:span text:style-name="T50">Национальный проект «Экономика данных и цифровая трансформация государства» [Электронный ресурс]. URL: http://government.ru/rugovclassifier/923/about (дата обращения: 05.02.2026).</text:span></text:p>
        </text:list-item>
        <text:list-item>
          <text:p text:style-name="P127"><text:span text:style-name="T50">Федеральный проект «Профессионалитет» [Электронный ресурс]. URL: https://firpo.ru/activities/projects/federalnyy-proekt-professionalitet (дата обращения: 15.02.2026).</text:span></text:p>
        </text:list-item>
        <text:list-item>
          <text:p text:style-name="P127"><text:span text:style-name="T50">Цифровой образовательный контент. </text:span><text:span text:style-name="T51">Информатизация образования </text:span><text:span text:style-name="T50">[Электронный ресурс]. URL: https://kirovipk.ru/informatization/digital-educational-content (дата обращения: 19.02.2026).</text:span></text:p>
        </text:list-item>
        <text:list-item>
          <text:p text:style-name="P127"><text:span text:style-name="T50">Цифровые технологии в образовании: как современные инструменты помогают учителям [Электронный ресурс]. URL: https://ioe.hse.ru/digitalineducation (дата обращения: 11.01.2026).</text:span></text:p>
        </text:list-item>
        <text:list-item>
          <text:p text:style-name="P127"><text:span text:style-name="T50">Docker Inc. Docker Docs [Электронный ресурс]. URL: https://docs.docker.com (дата обращения: 07.02.2026).</text:span></text:p>
        </text:list-item>
        <text:list-item>
          <text:p text:style-name="P127"><text:span text:style-name="T50">MariaDB Server Documentation [Электронный ресурс]. URL: https://mariadb.com/docs/server (дата обращения: 04.03.2026).</text:span></text:p>
        </text:list-item>
        <text:list-item>
          <text:p text:style-name="P127"><text:span text:style-name="T50">Mozilla Developer Network. HTTP overview [Электронный ресурс]. URL: https://developer.mozilla.org/en-US/docs/Web/HTTP/Guides/Overview (дата обращения: 19.01.2026).</text:span></text:p>
        </text:list-item>
        <text:list-item>
          <text:p text:style-name="P127"><text:span text:style-name="T50">NIST. Secure Software Development Framework (SSDF) [Электронный ресурс]. URL: https://csrc.nist.gov/projects/ssdf (дата обращения: 31.01.2026).</text:span></text:p>
        </text:list-item>
        <text:list-item>
          <text:p text:style-name="P127"><text:span text:style-name="T50">OpenAPI Initiative. OpenAPI Specification v3.2.0 [Электронный ресурс]. URL: https://spec.openapis.org/oas/latest.html (дата обращения: 21.02.2026).</text:span></text:p>
        </text:list-item>
        <text:list-item>
          <text:p text:style-name="P127"><text:soft-page-break/><text:span text:style-name="T50">The OWASP Foundation. OWASP Top Ten Web Application Security Risks [Электронный ресурс]. URL: https://owasp.org/www-project-top-ten (дата обращения: 26.01.2026).</text:span></text:p>
        </text:list-item>
        <text:list-item>
          <text:p text:style-name="P127"><text:span text:style-name="T52">The </text:span><text:span text:style-name="T50">PHP Group. PHP Manual [Электронный ресурс]. URL: https://www.php.net/docs.php (дата обращения: 07.03.2026).</text:span></text:p>
        </text:list-item>
        <text:list-item>
          <text:p text:style-name="P128"><text:span text:style-name="T50">Qt Company. Qt Quick and QML [Электронный ресурс]. URL: https://doc.qt.io/qt-6/qtquick-index.html (дата обращения: 26.02.2026).</text:span></text:p>
        </text:list-item>
        <text:list-item>
          <text:p text:style-name="P127"><text:span text:style-name="T50">Qt Company. Qt 6 Documentation [Электронный ресурс]. URL: https://doc.qt.io/qt-6 (дата обращения: 02.02.2026).</text:span></text:p>
        </text:list-item>
        <text:list-item>
          <text:p text:style-name="P127"><text:span text:style-name="T50">Qt Company. Qt Network [Электронный ресурс]. URL: https://doc.qt.io/qt-6/qtnetwork-index.html (дата обращения: 0</text:span><text:span text:style-name="T52">1</text:span><text:span text:style-name="T50">.03.2026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line-height="100%" fo:text-indent="1.251cm" style:auto-text-indent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00%" fo:text-indent="0cm" style:auto-text-indent="false"/>
      <style:text-properties fo:font-weight="bold" style:letter-kerning="false" style:font-name-asian="Calibri1" style:font-family-asian="Calibri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2.04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M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f53be" style:font-size-asian="14pt" style:font-name-complex="Times New Roman1" style:font-size-complex="14pt">
        <loext:char-complex-color loext:theme-type="dark1" loext:color-type="theme"/>
      </style:text-properties>
    </style:style>
    <style:style style:name="MT1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8</text:page-number></text:p>
      </style:footer>
      <style:footer-first>
        <text:h text:style-name="MP2" text:outline-level="2" loext:marker-style-name="MT1">Чита</text:h>
        <text:h text:style-name="MP2" text:outline-level="2" loext:marker-style-name="MT1">2026</text:h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14T10:11:00</meta:creation-date>
    <meta:initial-creator>bogale</meta:initial-creator>
    <dc:language>ru-RU</dc:language>
    <dc:date>2026-05-25T15:03:41.589084085</dc:date>
    <meta:editing-cycles>153</meta:editing-cycles>
    <meta:editing-duration>P2DT10H10M56S</meta:editing-duration>
    <meta:generator>LibreOffice/25.8.7.3$Linux_X86_64 LibreOffice_project/580$Build-3</meta:generator>
    <meta:print-date>2026-05-24T22:29:35.743211737</meta:print-date>
    <meta:printed-by>PDF files</meta:printed-by>
    <meta:document-statistic meta:table-count="4" meta:image-count="9" meta:object-count="0" meta:page-count="38" meta:paragraph-count="394" meta:word-count="6108" meta:character-count="53275" meta:non-whitespace-character-count="47552"/>
    <meta:user-defined meta:name="AppVersion">15.0000</meta:user-defined>
    <meta:template xlink:type="simple" xlink:actuate="onRequest" xlink:title="Normal.dotm" xlink:href=""/>
  </office:meta>
</office:document-meta>
</file>