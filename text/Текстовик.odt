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503cm" fo:margin-left="0cm" fo:margin-top="0cm" fo:margin-bottom="0cm" table:align="left" style:writing-mode="lr-tb"/>
    </style:style>
    <style:style style:name="Table1.A" style:family="table-column">
      <style:table-column-properties style:column-width="7.001cm"/>
    </style:style>
    <style:style style:name="Table1.B" style:family="table-column">
      <style:table-column-properties style:column-width="8.50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1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.B2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15.896cm" style:rel-column-width="9012*"/>
    </style:style>
    <style:style style:name="Table2.B" style:family="table-column">
      <style:table-column-properties style:column-width="1.104cm" style:rel-column-width="626*"/>
    </style:style>
    <style:style style:name="Table2.1" style:family="table-row"/>
    <style:style style:name="Table2.A1" style:family="table-cell">
      <style:table-cell-properties fo:padding="0.097cm" fo:border="none"/>
    </style:style>
    <style:style style:name="Table2.B3" style:family="table-cell" style:data-style-name="N0">
      <style:table-cell-properties fo:padding="0.097cm" fo:border="none"/>
    </style:style>
    <style:style style:name="P1" style:family="paragraph" style:parent-style-name="Standard" style:list-style-name="">
      <style:paragraph-properties fo:margin-left="0cm" fo:margin-top="0cm" fo:margin-bottom="0cm" style:contextual-spacing="false" fo:line-height="100%" fo:text-align="center" style:justify-single-word="false" fo:text-indent="1.251cm" style:auto-text-indent="false"/>
      <style:text-properties style:font-name="Times New Roman" fo:font-size="14pt" fo:font-weight="bold" officeooo:paragraph-rsid="000f53be" style:font-size-asian="14pt" style:font-weight-asian="bold" style:font-name-complex="Times New Roman1" style:font-size-complex="14pt" style:font-weight-complex="bold"/>
    </style:style>
    <style:style style:name="P2" style:family="paragraph" style:parent-style-name="Standard" style:list-style-name="">
      <style:paragraph-properties fo:margin-left="0cm" fo:margin-top="0cm" fo:margin-bottom="0cm" style:contextual-spacing="false" fo:line-height="100%" fo:text-align="center" style:justify-single-word="false" fo:text-indent="1.251cm" style:auto-text-indent="false"/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Standard" style:list-style-name="">
      <style:paragraph-properties fo:margin-left="0cm" fo:margin-top="0cm" fo:margin-bottom="0cm" style:contextual-spacing="false" fo:line-height="100%" fo:text-align="center" style:justify-single-word="false" fo:text-indent="1.251cm" style:auto-text-indent="false"/>
    </style:style>
    <style:style style:name="P4" style:family="paragraph" style:parent-style-name="Standard" style:list-style-name="">
      <style:paragraph-properties fo:margin-left="0cm" fo:margin-top="0cm" fo:margin-bottom="0cm" style:contextual-spacing="false" fo:line-height="100%" fo:text-align="center" style:justify-single-word="false" fo:text-indent="1.251cm" style:auto-text-indent="false"/>
      <style:text-properties style:font-name="Times New Roman" fo:font-size="14pt" fo:font-style="normal" style:text-underline-style="solid" style:text-underline-width="auto" style:text-underline-color="font-color" style:font-size-asian="14pt" style:font-style-asian="normal" style:font-name-complex="Times New Roman1" style:font-size-complex="14pt" style:font-style-complex="normal"/>
    </style:style>
    <style:style style:name="P5" style:family="paragraph" style:parent-style-name="Standard" style:list-style-name="">
      <style:paragraph-properties fo:margin-left="0cm" fo:margin-top="0cm" fo:margin-bottom="0cm" style:contextual-spacing="false" fo:line-height="100%" fo:text-align="center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style:font-name="Times New Roman" fo:font-size="14pt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 style:list-style-name="">
      <style:paragraph-properties fo:margin-left="0cm"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 style:list-style-name="">
      <style:paragraph-properties fo:margin-left="0cm" fo:margin-top="0cm" fo:margin-bottom="0cm" style:contextual-spacing="false" fo:line-height="100%" fo:text-align="end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9" style:family="paragraph" style:parent-style-name="Contents_20_Heading">
      <style:paragraph-properties fo:margin-top="0cm" fo:margin-bottom="0cm" style:contextual-spacing="false" fo:line-height="100%" fo:text-align="center" style:justify-single-word="false" fo:break-before="page"/>
    </style:style>
    <style:style style:name="P10" style:family="paragraph" style:parent-style-name="Contents_20_1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1" style:family="paragraph" style:parent-style-name="Contents_20_1">
      <style:paragraph-properties fo:margin-top="0cm" fo:margin-bottom="0cm" style:contextual-spacing="false" fo:line-height="150%"/>
    </style:style>
    <style:style style:name="P12" style:family="paragraph" style:parent-style-name="Table_20_Contents">
      <style:text-properties style:font-name="Times New Roman" fo:font-size="14pt" officeooo:rsid="001015cf" officeooo:paragraph-rsid="001015cf" style:font-size-asian="14pt" style:font-size-complex="14pt"/>
    </style:style>
    <style:style style:name="P13" style:family="paragraph" style:parent-style-name="Contents_20_2">
      <style:paragraph-properties fo:margin-right="0cm" fo:margin-top="0cm" fo:margin-bottom="0cm" style:contextual-spacing="false" fo:line-height="150%" fo:text-align="start" style:justify-single-word="false" fo:orphans="2" fo:widows="2" fo:hyphenation-ladder-count="no-limit" fo:hyphenation-keep="page" loext:hyphenation-keep-type="column" loext:hyphenation-keep-line="true" style:writing-mode="lr-tb"/>
      <style:text-properties style:use-window-font-color="true" loext:opacity="0%" style:font-name="Times New Roman" fo:font-size="14pt" fo:language="ru" fo:country="RU" officeooo:paragraph-rsid="001015cf" style:letter-kerning="false" style:font-name-asian="Calibri1" style:font-size-asian="14pt" style:language-asian="ru" style:country-asian="RU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Contents_20_2">
      <style:paragraph-properties fo:margin-left="0cm" fo:margin-top="0cm" fo:margin-bottom="0cm" style:contextual-spacing="false" fo:line-height="150%" fo:text-indent="1.249cm" style:auto-text-indent="false"/>
    </style:style>
    <style:style style:name="P15" style:family="paragraph" style:parent-style-name="Table_20_Contents">
      <style:text-properties style:font-name="Times New Roman" fo:font-size="14pt" officeooo:rsid="00132d4f" officeooo:paragraph-rsid="00132d4f" style:font-size-asian="14pt" style:font-size-complex="14pt"/>
    </style:style>
    <style:style style:name="P16" style:family="paragraph" style:parent-style-name="Table_20_Contents">
      <style:text-properties style:font-name="Times New Roman" fo:font-size="14pt" style:font-size-asian="14pt" style:font-size-complex="14pt"/>
    </style:style>
    <style:style style:name="P17" style:family="paragraph" style:parent-style-name="List_20_Paragraph">
      <style:paragraph-properties fo:margin-left="0cm" fo:margin-top="0cm" fo:margin-bottom="0cm" style:contextual-spacing="false" fo:line-height="100%" fo:text-align="center" style:justify-single-word="false" fo:text-indent="1.251cm" style:auto-text-indent="false" fo:break-before="page"/>
    </style:style>
    <style:style style:name="P18" style:family="paragraph" style:parent-style-name="Standard">
      <style:paragraph-properties fo:margin-top="0cm" fo:margin-bottom="0cm" style:contextual-spacing="false" fo:line-height="10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9" style:family="paragraph" style:parent-style-name="Standard">
      <style:paragraph-properties fo:margin-top="0cm" fo:margin-bottom="0cm" style:contextual-spacing="false" fo:line-height="100%" fo:text-align="justify" style:justify-single-word="false" fo:text-indent="1.251cm" style:auto-text-indent="false" loext:word-spacing-minimum="75%" loext:word-spacing-maximum="133%"/>
    </style:style>
    <style:style style:name="P20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</style:style>
    <style:style style:name="P21" style:family="paragraph" style:parent-style-name="List_20_Paragraph" style:list-style-name="WWNum7">
      <style:paragraph-properties fo:margin-left="0cm" fo:margin-top="0cm" fo:margin-bottom="0cm" style:contextual-spacing="true" fo:line-height="150%" fo:text-align="justify" style:justify-single-word="false" fo:hyphenation-ladder-count="no-limit" fo:hyphenation-keep="auto" loext:hyphenation-keep-type="column" loext:hyphenation-keep-line="false" fo:text-indent="1.251cm" style:auto-text-indent="false" loext:word-spacing-minimum="75%" loext:word-spacing-maximum="133%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List_20_Paragraph" style:list-style-name="WWNum3">
      <style:paragraph-properties fo:margin-left="0cm" fo:margin-top="0cm" fo:margin-bottom="0cm" style:contextual-spacing="true" fo:line-height="150%" fo:text-align="justify" style:justify-single-word="false" fo:hyphenation-ladder-count="no-limit" fo:hyphenation-keep="auto" loext:hyphenation-keep-type="column" loext:hyphenation-keep-line="false" fo:text-indent="1.251cm" style:auto-text-indent="false" loext:word-spacing-minimum="75%" loext:word-spacing-maximum="133%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List_20_Paragraph" style:list-style-name="WWNum2">
      <style:paragraph-properties fo:margin-left="0cm"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</style:style>
    <style:style style:name="P24" style:family="paragraph" style:parent-style-name="List_20_Paragraph" style:list-style-name="WWNum8">
      <style:paragraph-properties fo:margin-left="0cm" fo:margin-top="0cm" fo:margin-bottom="0cm" style:contextual-spacing="true" fo:line-height="150%" fo:text-align="justify" style:justify-single-word="false" fo:hyphenation-ladder-count="no-limit" fo:hyphenation-keep="auto" loext:hyphenation-keep-type="column" loext:hyphenation-keep-line="false" fo:text-indent="1.251cm" style:auto-text-indent="false" loext:word-spacing-minimum="75%" loext:word-spacing-maximum="133%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List_20_Paragraph" style:list-style-name="WWNum4">
      <style:paragraph-properties fo:margin-left="0cm" fo:margin-top="0cm" fo:margin-bottom="0cm" style:contextual-spacing="true" fo:line-height="150%" fo:text-align="justify" style:justify-single-word="false" fo:hyphenation-ladder-count="no-limit" fo:hyphenation-keep="auto" loext:hyphenation-keep-type="column" loext:hyphenation-keep-line="false" fo:text-indent="1.251cm" style:auto-text-indent="false" loext:word-spacing-minimum="75%" loext:word-spacing-maximum="133%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>
      <style:paragraph-properties fo:margin-top="0cm" fo:margin-bottom="0cm" style:contextual-spacing="false" fo:line-height="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7" style:family="paragraph" style:parent-style-name="Standard">
      <style:paragraph-properties fo:margin-top="0cm" fo:margin-bottom="0cm" style:contextual-spacing="false" fo:line-height="100%" fo:text-align="justify" style:justify-single-word="false" fo:text-indent="1.251cm" style:auto-text-indent="false" loext:word-spacing-minimum="75%" loext:word-spacing-maximum="133%"/>
      <style:text-properties style:font-name="Times New Roman" fo:font-size="14pt" style:font-size-asian="14pt" style:font-name-complex="Times New Roman1" style:font-size-complex="14pt"/>
    </style:style>
    <style:style style:name="P28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officeooo:paragraph-rsid="001015cf"/>
    </style:style>
    <style:style style:name="P29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fo:break-before="page" loext:word-spacing-minimum="75%" loext:word-spacing-maximum="133%"/>
      <style:text-properties officeooo:paragraph-rsid="001015cf"/>
    </style:style>
    <style:style style:name="P30" style:family="paragraph" style:parent-style-name="Standard">
      <style:paragraph-properties fo:margin-top="0cm" fo:margin-bottom="0cm" style:contextual-spacing="false" fo:line-height="100%" fo:text-align="justify" style:justify-single-word="false" loext:word-spacing-minimum="75%" loext:word-spacing-maximum="133%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3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33" style:family="paragraph" style:parent-style-name="Standard">
      <style:paragraph-properties fo:margin-top="0cm" fo:margin-bottom="0cm" style:contextual-spacing="false" fo:line-height="100%" fo:text-align="justify" style:justify-single-word="false" fo:break-before="page" loext:word-spacing-minimum="75%" loext:word-spacing-maximum="133%"/>
    </style:style>
    <style:style style:name="P34" style:family="paragraph" style:parent-style-name="List_20_Paragraph" style:list-style-name="WWNum9">
      <style:paragraph-properties fo:margin-top="0cm" fo:margin-bottom="0cm" style:contextual-spacing="true" fo:line-height="100%" fo:text-align="justify" style:justify-single-word="false" loext:word-spacing-minimum="75%" loext:word-spacing-maximum="133%"/>
    </style:style>
    <style:style style:name="P35" style:family="paragraph" style:parent-style-name="List_20_Paragraph" style:list-style-name="WWNum1">
      <style:paragraph-properties fo:margin-top="0cm" fo:margin-bottom="0cm" style:contextual-spacing="true" fo:line-height="100%" fo:text-align="justify" style:justify-single-word="false" loext:word-spacing-minimum="75%" loext:word-spacing-maximum="133%"/>
    </style:style>
    <style:style style:name="P36" style:family="paragraph" style:parent-style-name="List_20_Paragraph" style:list-style-name="WWNum10">
      <style:paragraph-properties fo:margin-top="0cm" fo:margin-bottom="0cm" style:contextual-spacing="true" fo:line-height="100%" fo:text-align="justify" style:justify-single-word="false" fo:break-before="page" loext:word-spacing-minimum="75%" loext:word-spacing-maximum="133%"/>
    </style:style>
    <style:style style:name="P37" style:family="paragraph" style:parent-style-name="List_20_Paragraph" style:list-style-name="WWNum5">
      <style:paragraph-properties fo:margin-top="0cm" fo:margin-bottom="0cm" style:contextual-spacing="true" fo:line-height="100%" fo:text-align="justify" style:justify-single-word="false" loext:word-spacing-minimum="75%" loext:word-spacing-maximum="133%"/>
    </style:style>
    <style:style style:name="P38" style:family="paragraph" style:parent-style-name="Standard">
      <style:paragraph-properties fo:margin-top="0cm" fo:margin-bottom="0cm" style:contextual-spacing="false" fo:line-height="100%" fo:text-align="justify" style:justify-single-word="false" loext:word-spacing-minimum="75%" loext:word-spacing-maximum="133%"/>
      <style:text-properties style:font-name="Times New Roman" fo:font-size="12pt" style:font-size-asian="12pt" style:font-name-complex="Times New Roman1" style:font-size-complex="12pt"/>
    </style:style>
    <style:style style:name="P39" style:family="paragraph" style:parent-style-name="List_20_Paragraph">
      <style:paragraph-properties fo:margin-left="0cm" fo:margin-top="0cm" fo:margin-bottom="0cm" style:contextual-spacing="true" fo:line-height="100%" fo:text-align="justify" style:justify-single-word="false" loext:word-spacing-minimum="75%" loext:word-spacing-maximum="133%"/>
      <style:text-properties style:font-name="Times New Roman" fo:font-size="12pt" style:font-size-asian="12pt" style:font-name-complex="Times New Roman1" style:font-size-complex="12pt"/>
    </style:style>
    <style:style style:name="P40" style:family="paragraph" style:parent-style-name="Standard">
      <style:paragraph-properties fo:margin-top="0cm" fo:margin-bottom="0cm" style:contextual-spacing="false" fo:line-height="100%" fo:text-align="justify" style:justify-single-word="false" loext:word-spacing-minimum="75%" loext:word-spacing-maximum="133%"/>
      <style:text-properties style:font-name="Times New Roman" fo:font-size="14pt" style:font-size-asian="14pt" style:font-name-complex="Times New Roman1" style:font-size-complex="14pt"/>
    </style:style>
    <style:style style:name="P41" style:family="paragraph" style:parent-style-name="Standard">
      <style:paragraph-properties fo:margin-top="0cm" fo:margin-bottom="0cm" style:contextual-spacing="false" fo:line-height="100%" fo:text-align="center" style:justify-single-word="false" fo:break-before="page"/>
    </style:style>
    <style:style style:name="P42" style:family="paragraph" style:parent-style-name="Standard">
      <style:paragraph-properties fo:margin-top="0cm" fo:margin-bottom="0cm" style:contextual-spacing="false" fo:line-height="10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43" style:family="paragraph" style:parent-style-name="Standard">
      <style:paragraph-properties fo:margin-left="0cm"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44" style:family="paragraph" style:parent-style-name="Standard" style:list-style-name="L1">
      <style:paragraph-properties fo:margin-left="0cm"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45" style:family="paragraph" style:parent-style-name="Standard" style:list-style-name="L2">
      <style:paragraph-properties fo:margin-left="0cm"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46" style:family="paragraph" style:parent-style-name="Standard" style:list-style-name="L3">
      <style:paragraph-properties fo:margin-left="0cm"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47" style:family="paragraph" style:parent-style-name="Standard" style:list-style-name="L4">
      <style:paragraph-properties fo:margin-left="0cm"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48" style:family="paragraph" style:parent-style-name="Standard" style:list-style-name="L5">
      <style:paragraph-properties fo:margin-left="0cm"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49" style:family="paragraph" style:parent-style-name="Standard" style:list-style-name="L6">
      <style:paragraph-properties fo:margin-left="0cm"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50" style:family="paragraph" style:parent-style-name="Standard" style:list-style-name="L7">
      <style:paragraph-properties fo:margin-left="0cm"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51" style:family="paragraph" style:parent-style-name="Standard">
      <style:paragraph-properties fo:margin-top="0cm" fo:margin-bottom="0cm" style:contextual-spacing="false" fo:line-height="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52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bold" officeooo:paragraph-rsid="000d01d4" style:font-size-asian="14pt" style:font-weight-asian="bold" style:font-name-complex="Times New Roman1" style:font-size-complex="14pt" style:font-weight-complex="bold"/>
    </style:style>
    <style:style style:name="P53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fo:break-before="page" loext:word-spacing-minimum="75%" loext:word-spacing-maximum="133%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54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55" style:family="paragraph" style:parent-style-name="Standard">
      <style:paragraph-properties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56" style:family="paragraph" style:parent-style-name="Standard">
      <style:paragraph-properties fo:margin-top="0cm" fo:margin-bottom="0cm" style:contextual-spacing="false" fo:line-height="100%" fo:text-align="center" style:justify-single-word="false" fo:text-indent="0cm" style:auto-text-indent="false" fo:break-before="pag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57" style:family="paragraph" style:parent-style-name="Standard">
      <style:paragraph-properties fo:margin-top="0cm" fo:margin-bottom="0cm" style:contextual-spacing="false" fo:line-height="100%" fo:text-align="justify" style:justify-single-word="false" fo:text-indent="0cm" style:auto-text-indent="false" loext:word-spacing-minimum="75%" loext:word-spacing-maximum="133%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58" style:family="paragraph" style:parent-style-name="Standard">
      <style:paragraph-properties fo:margin-top="0cm" fo:margin-bottom="0cm" style:contextual-spacing="false" fo:line-height="150%" fo:text-align="justify" style:justify-single-word="false" fo:text-indent="0cm" style:auto-text-indent="false" loext:word-spacing-minimum="75%" loext:word-spacing-maximum="133%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59" style:family="paragraph" style:parent-style-name="Standard">
      <style:paragraph-properties fo:margin-top="0cm" fo:margin-bottom="0cm" style:contextual-spacing="false" fo:line-height="150%" fo:text-align="justify" style:justify-single-word="false" fo:text-indent="0cm" style:auto-text-indent="false" loext:word-spacing-minimum="75%" loext:word-spacing-maximum="133%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60" style:family="paragraph" style:parent-style-name="Standard">
      <style:paragraph-properties fo:margin-top="0cm" fo:margin-bottom="0cm" style:contextual-spacing="false" fo:line-height="100%" fo:text-align="center" style:justify-single-word="false" fo:text-indent="0cm" style:auto-text-indent="false" fo:break-before="page"/>
      <style:text-properties style:font-name="Times New Roman" fo:font-size="14pt" fo:font-weight="bold" officeooo:rsid="000ee979" officeooo:paragraph-rsid="000ee979" style:font-size-asian="14pt" style:font-weight-asian="bold" style:font-name-complex="Times New Roman1" style:font-size-complex="14pt" style:font-weight-complex="bold"/>
    </style:style>
    <style:style style:name="P61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officeooo:paragraph-rsid="000ee979" style:font-size-asian="14pt" style:font-weight-asian="normal" style:font-name-complex="Times New Roman1" style:font-size-complex="14pt" style:font-weight-complex="normal"/>
    </style:style>
    <style:style style:name="P62" style:family="paragraph" style:parent-style-name="Standard">
      <style:paragraph-properties fo:margin-top="0cm" fo:margin-bottom="0cm" style:contextual-spacing="false" fo:line-height="200%" fo:text-align="center" style:justify-single-word="false" fo:text-indent="0cm" style:auto-text-indent="false" fo:break-before="page"/>
      <style:text-properties style:font-name="Times New Roman" fo:font-size="14pt" fo:font-weight="bold" officeooo:paragraph-rsid="000ee979" style:font-size-asian="14pt" style:font-weight-asian="bold" style:font-name-complex="Times New Roman1" style:font-size-complex="14pt" style:font-weight-complex="bold"/>
    </style:style>
    <style:style style:name="P63" style:family="paragraph" style:parent-style-name="Standard">
      <style:paragraph-properties fo:margin-left="0cm"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officeooo:paragraph-rsid="000ee979" style:font-size-asian="14pt" style:font-weight-asian="normal" style:font-name-complex="Times New Roman1" style:font-size-complex="14pt" style:font-weight-complex="normal"/>
    </style:style>
    <style:style style:name="P64" style:family="paragraph" style:parent-style-name="Standard" style:list-style-name="L8">
      <style:paragraph-properties fo:margin-left="0cm"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officeooo:paragraph-rsid="000ee979" style:font-size-asian="14pt" style:font-weight-asian="normal" style:font-name-complex="Times New Roman1" style:font-size-complex="14pt" style:font-weight-complex="normal"/>
    </style:style>
    <style:style style:name="P65" style:family="paragraph" style:parent-style-name="Standard" style:list-style-name="L9">
      <style:paragraph-properties fo:margin-left="0cm"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officeooo:paragraph-rsid="000ee979" style:font-size-asian="14pt" style:font-weight-asian="normal" style:font-name-complex="Times New Roman1" style:font-size-complex="14pt" style:font-weight-complex="normal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T4" style:family="text">
      <style:text-properties style:font-name="Times New Roman" fo:font-size="12pt" style:font-size-asian="12pt" style:font-name-complex="Times New Roman1" style:font-size-complex="12pt"/>
    </style:style>
    <style:style style:name="T5" style:family="text">
      <style:text-properties style:font-name="Times New Roman" fo:font-size="12pt" fo:language="ru" fo:country="RU" style:letter-kerning="tru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T6" style:family="text">
      <style:text-properties style:text-position="super 58%" style:font-name="Times New Roman" fo:font-size="12pt" style:font-size-asian="12pt" style:font-name-complex="Times New Roman1" style:font-size-complex="12pt"/>
    </style:style>
    <style:style style:name="T7" style:family="text">
      <style:text-properties style:text-position="super 58%" style:font-name="Times New Roman" fo:font-size="12pt" fo:language="ru" fo:country="RU" style:letter-kerning="tru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T8" style:family="text">
      <style:text-properties fo:color="#000000" loext:opacity="100%" style:font-name="Times New Roman" fo:font-size="14pt" fo:font-weight="bold" style:font-size-asian="14pt" style:font-weight-asian="bold" style:font-name-complex="Times New Roman1" style:font-size-complex="14pt" style:font-weight-complex="bold">
        <loext:char-complex-color loext:theme-type="dark1" loext:color-type="theme"/>
      </style:text-properties>
    </style:style>
    <style:style style:name="T9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0" style:family="text">
      <style:text-properties style:font-name="Times New Roman" fo:font-size="14pt" style:font-size-asian="14pt" style:font-size-complex="14pt"/>
    </style:style>
    <style:style style:name="T11" style:family="text">
      <style:text-properties style:font-name="Times New Roman" fo:font-size="14pt" fo:language="en" fo:country="US" style:font-size-asian="14pt" style:font-size-complex="14pt"/>
    </style:style>
    <style:style style:name="T12" style:family="text">
      <style:text-properties fo:color="#000000" loext:opacity="100%" style:font-name="Times New Roman" fo:font-size="14pt" style:font-size-asian="14pt" style:font-name-complex="Times New Roman1" style:font-size-complex="14pt">
        <loext:char-complex-color loext:theme-type="dark1" loext:color-type="theme"/>
      </style:text-properties>
    </style:style>
    <style:style style:name="T13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4" style:family="text">
      <style:text-properties style:font-name="Times New Roman" fo:font-size="14pt" style:letter-kerning="false" style:font-size-asian="14pt" style:font-name-complex="Times New Roman1" style:font-size-complex="14pt"/>
    </style:style>
    <style:style style:name="T15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16" style:family="text">
      <style:text-properties officeooo:rsid="0009e7a5"/>
    </style:style>
    <style:style style:name="T17" style:family="text">
      <style:text-properties officeooo:rsid="000d01d4"/>
    </style:style>
    <style:style style:name="T18" style:family="text">
      <style:text-properties officeooo:rsid="000ee979"/>
    </style:style>
    <text:list-style style:name="L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-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 loext:marker-style-name="T1">Государственное автономное профессиональное</text:h>
      <text:h text:style-name="P1" text:outline-level="2" loext:marker-style-name="T1">образовательное учреждение</text:h>
      <text:h text:style-name="P1" text:outline-level="2" loext:marker-style-name="T1">«Читинский педагогический колледж»</text:h>
      <text:h text:style-name="P2" text:outline-level="2" loext:marker-style-name="T2"/>
      <text:h text:style-name="P3" text:outline-level="2" loext:marker-style-name="T3"><text:span text:style-name="T3">Кафедра информационных технологий и программирования</text:span><text:span text:style-name="T3"/></text:h>
      <text:h text:style-name="P2" text:outline-level="2" loext:marker-style-name="T2"/>
      <text:h text:style-name="P4" text:outline-level="2">Специальность 09.02.07 Информационные системы и программирование</text:h>
      <text:h text:style-name="P2" text:outline-level="2" loext:marker-style-name="T2"/>
      <text:h text:style-name="P2" text:outline-level="2" loext:marker-style-name="T2"/>
      <text:h text:style-name="P2" text:outline-level="2" loext:marker-style-name="T2"/>
      <text:h text:style-name="P2" text:outline-level="2" loext:marker-style-name="T2"/>
      <text:h text:style-name="P2" text:outline-level="2" loext:marker-style-name="T2"/>
      <text:h text:style-name="P3" text:outline-level="2" loext:marker-style-name="T1"><text:span text:style-name="T1">ВЫПУСКНАЯ КВАЛИФИКАЦИОННАЯ РАБОТА</text:span><text:span text:style-name="T1"/></text:h>
      <text:h text:style-name="P3" text:outline-level="2" loext:marker-style-name="T1"><text:span text:style-name="T1">Дипломный проект</text:span><text:span text:style-name="T1"/></text:h>
      <text:h text:style-name="P2" text:outline-level="2" loext:marker-style-name="T2"/>
      <text:h text:style-name="P3" text:outline-level="2" loext:marker-style-name="T1"><text:span text:style-name="T1">Разработка десктопного приложения для онлайн-школы по программированию</text:span><text:span text:style-name="T1"/></text:h>
      <text:h text:style-name="P2" text:outline-level="2" loext:marker-style-name="T2"/>
      <text:h text:style-name="P2" text:outline-level="2" loext:marker-style-name="T2"/>
      <text:h text:style-name="P2" text:outline-level="2" loext:marker-style-name="T2"/>
      <text:h text:style-name="P2" text:outline-level="2" loext:marker-style-name="T2"/>
      <text:h text:style-name="P2" text:outline-level="2" loext:marker-style-name="T2"/>
      <text:h text:style-name="P2" text:outline-level="2" loext:marker-style-name="T2"/>
      <text:h text:style-name="P2" text:outline-level="2" loext:marker-style-name="T2"/>
      <text:h text:style-name="P2" text:outline-level="2" loext:marker-style-name="T2"/>
      <text:h text:style-name="P2" text:outline-level="2" loext:marker-style-name="T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P5" text:outline-level="2" loext:marker-style-name="T2"/>
          </table:table-cell>
          <table:table-cell table:style-name="Table1.B1" office:value-type="string">
            <text:h text:style-name="P6" text:outline-level="2" loext:marker-style-name="T4"><text:span text:style-name="T5">Выполнил: <text:s text:c="4"/>Богодухов А.Г</text:span><text:span text:style-name="T5"/></text:h>
          </table:table-cell>
        </table:table-row>
        <table:table-row table:style-name="Table1.1">
          <table:table-cell table:style-name="Table1.A1" office:value-type="string">
            <text:h text:style-name="P5" text:outline-level="2" loext:marker-style-name="T2"/>
          </table:table-cell>
          <table:table-cell table:style-name="Table1.B2" office:value-type="string">
            <text:h text:style-name="P6" text:outline-level="2" loext:marker-style-name="T4"><text:span text:style-name="T5">Студент 401 группы</text:span><text:span text:style-name="T5"/></text:h>
          </table:table-cell>
        </table:table-row>
        <table:table-row table:style-name="Table1.1">
          <table:table-cell table:style-name="Table1.A1" office:value-type="string">
            <text:h text:style-name="P5" text:outline-level="2" loext:marker-style-name="T2"/>
          </table:table-cell>
          <table:table-cell table:style-name="Table1.B2" office:value-type="string">
            <text:h text:style-name="P6" text:outline-level="2" loext:marker-style-name="T4"><text:span text:style-name="T5">Руководитель <text:s text:c="9"/>Трушина Е.Г</text:span><text:span text:style-name="T5"/></text:h>
          </table:table-cell>
        </table:table-row>
        <table:table-row table:style-name="Table1.1">
          <table:table-cell table:style-name="Table1.A1" office:value-type="string">
            <text:h text:style-name="P5" text:outline-level="2" loext:marker-style-name="T2"/>
          </table:table-cell>
          <table:table-cell table:style-name="Table1.B2" office:value-type="string">
            <text:h text:style-name="P7" text:outline-level="2" loext:marker-style-name="T6"><text:span text:style-name="T7">подпись</text:span><text:span text:style-name="T7"/></text:h>
          </table:table-cell>
        </table:table-row>
        <table:table-row table:style-name="Table1.1">
          <table:table-cell table:style-name="Table1.A1" office:value-type="string">
            <text:h text:style-name="P5" text:outline-level="2" loext:marker-style-name="T2"/>
          </table:table-cell>
          <table:table-cell table:style-name="Table1.B2" office:value-type="string">
            <text:h text:style-name="P6" text:outline-level="2" loext:marker-style-name="T4"><text:span text:style-name="T5">« <text:s text:c="9"/>» <text:s text:c="39"/>20 <text:s text:c="6"/>г.</text:span><text:span text:style-name="T5"/></text:h>
          </table:table-cell>
        </table:table-row>
        <table:table-row table:style-name="Table1.1">
          <table:table-cell table:style-name="Table1.A1" office:value-type="string">
            <text:h text:style-name="P5" text:outline-level="2" loext:marker-style-name="T2"/>
          </table:table-cell>
          <table:table-cell table:style-name="Table1.B2" office:value-type="string">
            <text:h text:style-name="P6" text:outline-level="2" loext:marker-style-name="T4"><text:span text:style-name="T5">Допущен к защите</text:span><text:span text:style-name="T5"/></text:h>
          </table:table-cell>
        </table:table-row>
        <table:table-row table:style-name="Table1.1">
          <table:table-cell table:style-name="Table1.A1" office:value-type="string">
            <text:h text:style-name="P5" text:outline-level="2" loext:marker-style-name="T2"/>
          </table:table-cell>
          <table:table-cell table:style-name="Table1.B2" office:value-type="string">
            <text:h text:style-name="P6" text:outline-level="2" loext:marker-style-name="T4"><text:span text:style-name="T5">Зав. кафедрой <text:s text:c="4"/>Медведкова Ю.К</text:span><text:span text:style-name="T5"/></text:h>
          </table:table-cell>
        </table:table-row>
        <table:table-row table:style-name="Table1.1">
          <table:table-cell table:style-name="Table1.A1" office:value-type="string">
            <text:h text:style-name="P5" text:outline-level="2" loext:marker-style-name="T2"/>
          </table:table-cell>
          <table:table-cell table:style-name="Table1.B2" office:value-type="string">
            <text:h text:style-name="P7" text:outline-level="2" loext:marker-style-name="T6"><text:span text:style-name="T7">подпись</text:span><text:span text:style-name="T7"/></text:h>
          </table:table-cell>
        </table:table-row>
        <table:table-row table:style-name="Table1.1">
          <table:table-cell table:style-name="Table1.A1" office:value-type="string">
            <text:h text:style-name="P5" text:outline-level="2" loext:marker-style-name="T2"/>
          </table:table-cell>
          <table:table-cell table:style-name="Table1.B2" office:value-type="string">
            <text:h text:style-name="P6" text:outline-level="2" loext:marker-style-name="T4"><text:span text:style-name="T5">« <text:s text:c="9"/>» <text:s text:c="39"/>20 <text:s text:c="6"/>г.</text:span><text:span text:style-name="T5"/></text:h>
          </table:table-cell>
        </table:table-row>
        <table:table-row table:style-name="Table1.1">
          <table:table-cell table:style-name="Table1.A1" office:value-type="string">
            <text:h text:style-name="P5" text:outline-level="2" loext:marker-style-name="T2"/>
          </table:table-cell>
          <table:table-cell table:style-name="Table1.B2" office:value-type="string">
            <text:h text:style-name="P6" text:outline-level="2" loext:marker-style-name="T4"><text:span text:style-name="T5">Оценка</text:span><text:span text:style-name="T5"/></text:h>
          </table:table-cell>
        </table:table-row>
        <table:table-row table:style-name="Table1.1">
          <table:table-cell table:style-name="Table1.A1" office:value-type="string">
            <text:h text:style-name="P5" text:outline-level="2" loext:marker-style-name="T2"/>
          </table:table-cell>
          <table:table-cell table:style-name="Table1.B2" office:value-type="string">
            <text:h text:style-name="P6" text:outline-level="2" loext:marker-style-name="T4"><text:span text:style-name="T5">« <text:s text:c="9"/>» <text:s text:c="39"/>20 <text:s text:c="6"/>г.</text:span><text:span text:style-name="T5"/></text:h>
          </table:table-cell>
        </table:table-row>
      </table:table>
      <text:p text:style-name="P8" loext:marker-style-name="T2"/>
      <text:p text:style-name="P9" loext:marker-style-name="T8"><text:span text:style-name="T8">СОДЕРЖАНИЕ</text:span><text:span text:style-name="T8"/></text:p>
      <text:p text:style-name="P10" loext:marker-style-name="T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 loext:marker-style-name="T10"><text:span text:style-name="T9">1. Пояснительная записка</text:span></text:p>
          </table:table-cell>
          <table:table-cell table:style-name="Table2.A1" office:value-type="string">
            <text:p text:style-name="P12">3</text:p>
          </table:table-cell>
        </table:table-row>
        <table:table-row table:style-name="Table2.1">
          <table:table-cell table:style-name="Table2.A1" office:value-type="string">
            <text:p text:style-name="P13">1.1. Квалификационные характеристики проекта</text:p>
          </table:table-cell>
          <table:table-cell table:style-name="Table2.A1" office:value-type="string">
            <text:p text:style-name="P12">3</text:p>
          </table:table-cell>
        </table:table-row>
        <table:table-row table:style-name="Table2.1">
          <table:table-cell table:style-name="Table2.A1" office:value-type="string">
            <text:p text:style-name="P14" loext:marker-style-name="T11"><text:span text:style-name="T10">1.2. Описание предметной области</text:span></text:p>
          </table:table-cell>
          <table:table-cell table:style-name="Table2.B3" office:value-type="float" office:value="5">
            <text:p text:style-name="P12">5</text:p>
          </table:table-cell>
        </table:table-row>
        <table:table-row table:style-name="Table2.1">
          <table:table-cell table:style-name="Table2.A1" office:value-type="string">
            <text:p text:style-name="P14" loext:marker-style-name="T11"><text:span text:style-name="T10">1.</text:span><text:span text:style-name="T11">3</text:span><text:span text:style-name="T10">. Техническое задание</text:span></text:p>
          </table:table-cell>
          <table:table-cell table:style-name="Table2.A1" office:value-type="string">
            <text:p text:style-name="P15">12</text:p>
          </table:table-cell>
        </table:table-row>
        <table:table-row table:style-name="Table2.1">
          <table:table-cell table:style-name="Table2.A1" office:value-type="string">
            <text:p text:style-name="P11" loext:marker-style-name="T11"><text:span text:style-name="T9">2. Проектная часть</text:span></text:p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4" loext:marker-style-name="T10"><text:span text:style-name="T10">2.1. Проектирование программного продукта</text:span></text:p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4" loext:marker-style-name="T10"><text:span text:style-name="T10">2.2. Руководство пользователя</text:span></text:p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4" loext:marker-style-name="T10"><text:span text:style-name="T10">2.3. Результаты апробации</text:span></text:p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1" loext:marker-style-name="T10"><text:span text:style-name="T9">Заключение</text:span></text:p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1" loext:marker-style-name="T10"><text:span text:style-name="T9">Список использованных источников</text:span></text:p>
          </table:table-cell>
          <table:table-cell table:style-name="Table2.A1" office:value-type="string">
            <text:p text:style-name="P16"/>
          </table:table-cell>
        </table:table-row>
      </table:table>
      <text:p text:style-name="P8" loext:marker-style-name="T2"/>
      <text:p text:style-name="P17" loext:marker-style-name="T1"><text:span text:style-name="T1">1. ПОЯСНИТЕЛЬНАЯ ЗАПИСКА</text:span><text:span text:style-name="T1"/></text:p>
      <text:p text:style-name="P18" loext:marker-style-name="T1"/>
      <text:p text:style-name="P19" loext:marker-style-name="T1"><text:span text:style-name="T1">1.1. Квалификационные характеристики проекта</text:span><text:span text:style-name="T1"/></text:p>
      <text:p text:style-name="P18" loext:marker-style-name="T1"/>
      <text:p text:style-name="P20" loext:marker-style-name="T12"><text:span text:style-name="T12">В условиях цифровизации образования всё больше людей осваивают программирование в онлайн-формате, включая школьников, студентов и взрослых, проходящих профессиональную переподготовку. Онлайн-обучение позволяет получать знания независимо от места проживания и графика, однако одновременно обостряет проблему качества усвоения материала. Для эффективного изучения программирования недостаточно только теоретических лекций и тестовых заданий — ключевую роль играет регулярная практическая работа с кодом и получение оперативной обратной связи по результатам выполнения заданий.</text:span><text:span text:style-name="T12"/></text:p>
      <text:p text:style-name="P20" loext:marker-style-name="T12"><text:span text:style-name="T12">Существующие онлайн-платформы для обучения программированию нередко ориентированы либо на просмотр видеоматериалов, либо на выполнение ограниченного набора упражнений в браузере. Такой подход может снижать вовлечённость обучающихся и затруднять формирование устойчивых практических навыков. Кроме того, пользователи сталкиваются с трудностями при настройке рабочей среды, что особенно критично для начинающих, не обладающих достаточным техническим опытом.</text:span><text:span text:style-name="T12"/></text:p>
      <text:p text:style-name="P20" loext:marker-style-name="T12"><text:span text:style-name="T12">Актуальной является задача создания удобного и безопасного инструмента, который объединяет теоретическое обучение и практику программирования в едином образовательном пространстве, минимизируя технические барьеры для обучающихся. Десктопное приложение в данном контексте способно обеспечить стабильную работу, привычный интерфейс и возможность локального хранения учебных материалов, что повышает доступность обучения и снижает зависимость от качества интернет-соединения.</text:span><text:span text:style-name="T12"/></text:p>
      <text:p text:style-name="P20" loext:marker-style-name="T12"><text:span text:style-name="T12">Таким образом, разработка десктопного приложения для онлайн-школы по программированию является актуальной задачей, направленной на повышение эффективности обучения, удобства использования образовательных платформ и </text:span><text:soft-page-break/><text:span text:style-name="T12">качества формирования практических навыков программирования у обучающихся.</text:span><text:span text:style-name="T12"/></text:p>
      <text:p text:style-name="P20" loext:marker-style-name="T2"><text:span text:style-name="T1">Объектом</text:span><text:span text:style-name="T2"> дипломного проекта является процесс разработки приложения.</text:span></text:p>
      <text:p text:style-name="P20" loext:marker-style-name="T2"><text:span text:style-name="T1">Предметом</text:span><text:span text:style-name="T2"> дипломного проекта является создание десктопного приложения с клиент-серверной архитектурой с помощью </text:span><text:span text:style-name="T13">Qt</text:span><text:span text:style-name="T2"> на языке </text:span><text:span text:style-name="T13">C</text:span><text:span text:style-name="T2">++.</text:span></text:p>
      <text:p text:style-name="P20" loext:marker-style-name="T2"><text:span text:style-name="T1">Целью</text:span><text:span text:style-name="T2"> дипломного проекта является разработка десктопного приложения для онлайн-школы по программированию, обеспечивающее эффективное обучение с безопасным выполнением пользовательского кода и удобным интерфейсом для изучения теории и практики.</text:span></text:p>
      <text:p text:style-name="P20" loext:marker-style-name="T2"><text:span text:style-name="T2">В соответствии с поставленной целью в работе необходимо решить следующие </text:span><text:span text:style-name="T1">задачи</text:span><text:span text:style-name="T2">:</text:span></text:p>
      <text:list xml:id="list919880097" text:style-name="WWNum7">
        <text:list-item text:start-value="1">
          <text:p text:style-name="P21" loext:marker-style-name="T2"><text:span text:style-name="T2">Изучить и проанализировать предметную область.</text:span><text:span text:style-name="T2"/></text:p>
        </text:list-item>
        <text:list-item text:style-override="WWNum3">
          <text:p text:style-name="P22" loext:marker-style-name="T2"><text:span text:style-name="T2">Разработать техническое задание.</text:span><text:span text:style-name="T2"/></text:p>
        </text:list-item>
        <text:list-item text:style-override="WWNum3">
          <text:p text:style-name="P22" loext:marker-style-name="T2"><text:span text:style-name="T2">Создать программное обеспечение.</text:span><text:span text:style-name="T2"/></text:p>
        </text:list-item>
        <text:list-item text:style-override="WWNum3">
          <text:p text:style-name="P22" loext:marker-style-name="T2"><text:span text:style-name="T2">Разработать пользовательский интерфейс приложения.</text:span><text:span text:style-name="T2"/></text:p>
        </text:list-item>
        <text:list-item text:style-override="WWNum3">
          <text:p text:style-name="P22" loext:marker-style-name="T2"><text:span text:style-name="T2">Подготовить руководство пользователя.</text:span><text:span text:style-name="T2"/></text:p>
        </text:list-item>
      </text:list>
      <text:p text:style-name="P20" loext:marker-style-name="T12"><text:span text:style-name="T8">Тип проекта</text:span><text:span text:style-name="T12">: практико-ориентированный.</text:span></text:p>
      <text:p text:style-name="P20" loext:marker-style-name="T12"><text:span text:style-name="T8">Этапы работы над проектом</text:span><text:span text:style-name="T12">:</text:span></text:p>
      <text:list text:style-name="WWNum2">
        <text:list-item>
          <text:p text:style-name="P23" loext:marker-style-name="T12"><text:span text:style-name="T12">Аналитический этап: исследование предметной области, анализ требований</text:span><text:span text:style-name="T12"/></text:p>
        </text:list-item>
        <text:list-item>
          <text:p text:style-name="P23" loext:marker-style-name="T12"><text:span text:style-name="T12">Проектирование: разработка архитектуры, проектирование интерфейсов</text:span><text:span text:style-name="T12"/></text:p>
        </text:list-item>
        <text:list-item>
          <text:p text:style-name="P23" loext:marker-style-name="T12"><text:span text:style-name="T12">Реализация: программирование клиентской и серверной частей</text:span><text:span text:style-name="T12"/></text:p>
        </text:list-item>
        <text:list-item>
          <text:p text:style-name="P23" loext:marker-style-name="T12"><text:span text:style-name="T12">Интеграция: объединение компонентов</text:span><text:span text:style-name="T12"/></text:p>
        </text:list-item>
        <text:list-item>
          <text:p text:style-name="P23" loext:marker-style-name="T12"><text:span text:style-name="T12">Тестирование: функциональное и интеграционное тестирование</text:span><text:span text:style-name="T12"/></text:p>
        </text:list-item>
        <text:list-item>
          <text:p text:style-name="P23" loext:marker-style-name="T12"><text:span text:style-name="T12">Документирование: написание технической документации</text:span><text:span text:style-name="T12"/></text:p>
        </text:list-item>
      </text:list>
      <text:p text:style-name="P20" loext:marker-style-name="T2"><text:span text:style-name="T1">Прикладная ценность проекта</text:span><text:span text:style-name="T2"> заключается в создании удобного программного средства, предназначенного для поддержки процесса обучения программированию в онлайн-школах. Разрабатываемое приложение предоставляет обучающимся единое образовательное пространство, в котором </text:span><text:soft-page-break/><text:span text:style-name="T2">теоретические материалы и практические задания объединены в одном интерфейсе. Такой подход упрощает процесс обучения, повышает вовлечённость пользователей и способствует более эффективному закреплению изучаемого материала за счёт немедленного применения знаний на практике.</text:span></text:p>
      <text:p text:style-name="P20" loext:marker-style-name="T2"><text:span text:style-name="T1">Критерии эффективности проекта</text:span><text:span text:style-name="T2">:</text:span></text:p>
      <text:list xml:id="list643433170" text:style-name="WWNum8">
        <text:list-item text:start-value="1">
          <text:p text:style-name="P24" loext:marker-style-name="T2"><text:span text:style-name="T2">Корректность выполнения программных заданий и точность проверки результатов работы пользователей.</text:span><text:span text:style-name="T2"/></text:p>
        </text:list-item>
        <text:list-item text:style-override="WWNum4">
          <text:p text:style-name="P25" loext:marker-style-name="T2"><text:span text:style-name="T2">Понятность и простота использования приложения.</text:span><text:span text:style-name="T2"/></text:p>
        </text:list-item>
        <text:list-item text:style-override="WWNum4">
          <text:p text:style-name="P25" loext:marker-style-name="T2"><text:span text:style-name="T2">Стабильность работы системы при взаимодействии пользователей с учебными материалами и заданиями.</text:span><text:span text:style-name="T2"/></text:p>
        </text:list-item>
      </text:list>
      <text:p text:style-name="P20" loext:marker-style-name="T2"><text:span text:style-name="T2">Теоретическая часть проекта включает анализ современных подходов к организации онлайн-обучения программированию, с акцентом на сочетание теоретических материалов и практических заданий. Рассматриваются принципы построения обучающих систем, обеспечивающих поэтапное освоение материала и формирование практических навыков программирования.</text:span><text:span text:style-name="T2"/></text:p>
      <text:p text:style-name="P20" loext:marker-style-name="T2"><text:span text:style-name="T2">Проведённый анализ позволяет обосновать выбранную структуру образовательной платформы и подходы к организации учебного процесса, направленные на повышение эффективности обучения и удобства взаимодействия пользователей с системой.</text:span><text:span text:style-name="T2"/></text:p>
      <text:p text:style-name="P26" loext:marker-style-name="T1"/>
      <text:p text:style-name="P19" loext:marker-style-name="T2"><text:span text:style-name="T1">1.2. Описание предметной области</text:span><text:span text:style-name="T1"/></text:p>
      <text:p text:style-name="P27" loext:marker-style-name="T2"/>
      <text:p text:style-name="P20" loext:marker-style-name="T2"><text:span text:style-name="T2">Онлайн-обучение программированию представляет собой форму образовательного процесса, при которой освоение знаний и практических навыков в области разработки программного обеспечения осуществляется с использованием цифровых образовательных платформ и программных средств. В отличие от традиционного очного обучения, онлайн-формат предоставляет обучающимся возможность получать знания независимо от географического положения, временных ограничений и индивидуального графика. Это делает обучение программированию более доступным и гибким, особенно в условиях </text:span><text:soft-page-break/><text:span text:style-name="T2">быстрого развития информационных технологий и роста потребности в ИТ-специалистах.</text:span><text:span text:style-name="T2"/></text:p>
      <text:p text:style-name="P20" loext:marker-style-name="T2"><text:span text:style-name="T2">Особенностью онлайн-обучения является высокая степень самостоятельности обучающихся. Пользователь самостоятельно планирует темп прохождения курса, выбирает время для изучения материалов и выполнения заданий. При этом эффективность такого обучения во многом зависит от качества используемой образовательной платформы, структуры учебных материалов и наличия инструментов, обеспечивающих практическое применение полученных знаний. В области программирования данные факторы приобретают особую значимость, поскольку формирование навыков невозможно без регулярной практической деятельности.</text:span><text:span text:style-name="T2"/></text:p>
      <text:p text:style-name="P20" loext:marker-style-name="T2"><text:span text:style-name="T2">Целевой аудиторией онлайн-обучения программированию являются различные категории пользователей, отличающиеся уровнем подготовки, возрастом и образовательными целями. К одной из ключевых групп относятся школьники старших классов, которые рассматривают программирование как перспективное направление для дальнейшего обучения и профессиональной деятельности. Для данной категории особенно важны наглядность учебных материалов, поэтапное объяснение базовых понятий и простота взаимодействия с образовательной средой, поскольку большинство обучающихся не обладает предварительным техническим опытом.</text:span><text:span text:style-name="T2"/></text:p>
      <text:p text:style-name="P20" loext:marker-style-name="T2"><text:span text:style-name="T2">Программирование как учебная дисциплина имеет ряд существенных особенностей, отличающих его от большинства гуманитарных и даже многих технических предметов. В первую очередь, программирование ориентировано не только на усвоение теоретических знаний, но и на формирование устойчивых практических навыков. Понимание синтаксиса языков программирования, алгоритмов и принципов разработки программных систем не приводит к ожидаемому результату без регулярной работы с кодом и самостоятельного решения практических задач.</text:span><text:span text:style-name="T2"/></text:p>
      <text:p text:style-name="P20" loext:marker-style-name="T2"><text:span text:style-name="T2">Процесс обучения программированию предполагает активное взаимодействие обучающегося с программной средой. В ходе выполнения </text:span><text:soft-page-break/><text:span text:style-name="T2">заданий пользователь сталкивается с ошибками, анализирует результаты работы программы, вносит исправления и повторно проверяет решение. Такой итеративный характер обучения способствует развитию аналитического мышления, навыков поиска и устранения ошибок, а также способности к самостоятельному решению задач. В отличие от дисциплин, где результат может быть выражен в виде тестового ответа или письменного рассуждения, в программировании корректность решения определяется фактическим поведением созданной программы.</text:span><text:span text:style-name="T2"/></text:p>
      <text:p text:style-name="P20" loext:marker-style-name="T2"><text:span text:style-name="T2">Таким образом, онлайн-обучение программированию представляет собой сложную и многоаспектную предметную область, в которой пересекаются образовательные цели, потребности различных категорий пользователей и требования к практической направленности учебного процесса. Эффективная организация обучения в данной области требует использования специализированных программных средств, способных обеспечить удобный доступ к учебным материалам, поддержку практической деятельности и получение обратной связи, что делает разработку соответствующих образовательных приложений актуальной и востребованной задачей.</text:span><text:span text:style-name="T2"/></text:p>
      <text:p text:style-name="P20" loext:marker-style-name="T2"><text:span text:style-name="T2">Онлайн-обучение программированию представляет собой последовательность взаимосвязанных учебных процессов, направленных на формирование у обучающихся теоретических знаний и практических навыков. Эффективность обучения определяется тем, насколько логично и согласованно организованы данные процессы в рамках образовательной платформы.</text:span><text:span text:style-name="T2"/></text:p>
      <text:p text:style-name="P20" loext:marker-style-name="T2"><text:span text:style-name="T2">Процесс обучения начинается с изучения теоретического материала. Теоретическая часть включает объяснение базовых понятий, принципов и подходов, необходимых для понимания изучаемой темы. В онлайн-формате теоретические материалы должны быть структурированы и представлены в доступной форме, позволяющей обучающемуся последовательно осваивать новые знания и возвращаться к ранее изученному материалу при необходимости. Чёткая логика изложения способствует снижению когнитивной нагрузки и повышает усвоение информации.</text:span><text:span text:style-name="T2"/></text:p>
      <text:p text:style-name="P20" loext:marker-style-name="T2"><text:soft-page-break/><text:span text:style-name="T2">Следующим этапом является выполнение практических заданий, направленных на закрепление теоретических знаний. Практика играет ключевую роль в обучении программированию, поскольку именно в процессе написания кода формируются навыки анализа задач, поиска решений и устранения ошибок. Задания должны соответствовать изучаемой теме и усложняться по мере продвижения обучающегося, обеспечивая поэтапное развитие навыков программирования.</text:span><text:span text:style-name="T2"/></text:p>
      <text:p text:style-name="P20" loext:marker-style-name="T2"><text:span text:style-name="T2">Важным процессом является проверка решений, выполненных обучающимися. Проверка позволяет определить корректность выполнения задания и степень усвоения материала. В условиях онлайн-обучения данный процесс должен быть организован таким образом, чтобы обеспечивать объективность оценки и минимизировать субъективные факторы. Наличие чётких критериев проверки способствует формированию у обучающихся понимания требований к результатам работы.</text:span><text:span text:style-name="T2"/></text:p>
      <text:p text:style-name="P20" loext:marker-style-name="T2"><text:span text:style-name="T2">Результаты проверки сопровождаются получением обратной связи, которая является неотъемлемой частью образовательного процесса. Обратная связь позволяет обучающемуся понять допущенные ошибки, скорректировать подход к решению задач и улучшить качество выполняемых работ. Своевременная и понятная обратная связь повышает мотивацию обучающихся и способствует более глубокому усвоению учебного материала.</text:span><text:span text:style-name="T2"/></text:p>
      <text:p text:style-name="P20" loext:marker-style-name="T2"><text:span text:style-name="T2">Завершающим процессом является отслеживание прогресса обучения. Фиксация результатов выполнения заданий и прохождения учебных тем позволяет обучающемуся оценивать собственные достижения и планировать дальнейшее обучение. Для преподавателя и образовательной платформы данный процесс обеспечивает контроль за ходом обучения и позволяет выявлять трудности, возникающие у обучающихся на различных этапах освоения курса.</text:span><text:span text:style-name="T2"/></text:p>
      <text:p text:style-name="P20" loext:marker-style-name="T2"><text:span text:style-name="T2">Таким образом, основные процессы онлайн-обучения программированию образуют целостную систему, в которой теоретическое обучение, практика, проверка и обратная связь взаимно дополняют друг друга. Эффективная </text:span><text:soft-page-break/><text:span text:style-name="T2">реализация данных процессов является ключевым фактором успешного формирования практических навыков программирования в онлайн-среде.</text:span><text:span text:style-name="T2"/></text:p>
      <text:p text:style-name="P20" loext:marker-style-name="T2"><text:span text:style-name="T2">Несмотря на широкое распространение онлайн-платформ для обучения программированию, существующие решения не всегда обеспечивают полноценное и удобное освоение учебного материала. Многие проблемы проявляются именно на уровне пользовательского опыта и организации учебного процесса, что может снижать эффективность обучения и мотивацию обучающихся.</text:span><text:span text:style-name="T2"/></text:p>
      <text:p text:style-name="P20" loext:marker-style-name="T2"><text:span text:style-name="T2">Одной из распространённых проблем является разрыв между теоретическим материалом и практической деятельностью. Во многих образовательных ресурсах теория и практика представлены раздельно: обучающимся предлагается сначала изучить лекционный материал, а затем самостоятельно искать способы применить полученные знания. Отсутствие тесной связи между объяснением темы и немедленным выполнением практических заданий затрудняет понимание материала и замедляет формирование практических навыков.</text:span><text:span text:style-name="T2"/></text:p>
      <text:p text:style-name="P20" loext:marker-style-name="T2"><text:span text:style-name="T2">Существенные сложности возникают у начинающих обучающихся при подготовке рабочей среды для выполнения программных заданий. Необходимость установки и настройки дополнительных инструментов может отвлекать от учебного процесса и вызывать затруднения у пользователей, не обладающих достаточным техническим опытом. В результате внимание обучающегося смещается с изучения программирования на решение вспомогательных технических задач.</text:span><text:span text:style-name="T2"/></text:p>
      <text:p text:style-name="P20" loext:marker-style-name="T2"><text:span text:style-name="T2">Ограниченные возможности проверки программных заданий также являются распространённой проблемой онлайн-обучения. В ряде систем проверка сводится к формальному сравнению результата или требует ручного вмешательства со стороны преподавателя. Это снижает оперативность получения обратной связи и ограничивает возможности объективной оценки выполненных работ, особенно при большом количестве обучающихся.</text:span><text:span text:style-name="T2"/></text:p>
      <text:p text:style-name="P20" loext:marker-style-name="T2"><text:soft-page-break/><text:span text:style-name="T2">Зависимость от стабильного интернет-соединения оказывает негативное влияние на доступность онлайн-обучения. При нестабильном или ограниченном доступе к сети обучающиеся могут испытывать трудности при изучении материалов и выполнении заданий, что нарушает непрерывность учебного процесса. Отсутствие возможности продолжить обучение в офлайн-режиме снижает гибкость образовательных платформ.</text:span><text:span text:style-name="T2"/></text:p>
      <text:p text:style-name="P20" loext:marker-style-name="T2"><text:span text:style-name="T2">Дополнительным ограничением является отсутствие единого и согласованного интерфейса обучения. Использование нескольких разрозненных инструментов для просмотра теоретических материалов, выполнения заданий и отслеживания прогресса усложняет взаимодействие с образовательной средой. Это повышает когнитивную нагрузку на обучающегося и может отрицательно сказываться на вовлечённости в учебный процесс.</text:span><text:span text:style-name="T2"/></text:p>
      <text:p text:style-name="P20" loext:marker-style-name="T2"><text:span text:style-name="T2">Перечисленные проблемы указывают на необходимость создания образовательного решения, ориентированного на потребности пользователей и специфику обучения программированию. Повышение связности учебных процессов, упрощение практической работы и улучшение пользовательского опыта являются важными направлениями развития онлайн-образования в данной области.</text:span><text:span text:style-name="T2"/></text:p>
      <text:p text:style-name="P20" loext:marker-style-name="T2"><text:span text:style-name="T2">Разрабатываемое приложение занимает место комплексного инструмента поддержки онлайн-обучения программированию, ориентированного на интеграцию основных учебных процессов в едином образовательном пространстве. Его назначение заключается в упрощении взаимодействия участников образовательного процесса и повышении эффективности освоения программирования за счёт систематизации учебных материалов и практической деятельности.</text:span><text:span text:style-name="T2"/></text:p>
      <text:p text:style-name="P20" loext:marker-style-name="T2"><text:span text:style-name="T2">Приложение автоматизирует ключевые этапы обучения, связанные с предоставлением учебного контента, выполнением практических заданий и оценкой результатов работы обучающихся. Теоретические материалы и практические задания представлены в согласованной структуре, что позволяет обучающемуся последовательно переходить от изучения темы к её </text:span><text:soft-page-break/><text:span text:style-name="T2">практическому применению. Это снижает разрыв между теорией и практикой и способствует более осознанному усвоению материала.</text:span><text:span text:style-name="T2"/></text:p>
      <text:p text:style-name="P20" loext:marker-style-name="T2"><text:span text:style-name="T2">Существенным направлением автоматизации является процесс проверки программных заданий и фиксации результатов обучения. Обучающиеся получают возможность самостоятельно выполнять задания и получать результаты проверки без задержек, связанных с ручной обработкой решений. Это упрощает процесс обучения, повышает его прозрачность и позволяет обучающимся лучше отслеживать собственный прогресс.</text:span><text:span text:style-name="T2"/></text:p>
      <text:p text:style-name="P20" loext:marker-style-name="T2"><text:span text:style-name="T2">Для преподавателей и авторов курсов приложение упрощает организацию учебного процесса и сопровождение обучающихся. Централизованное размещение учебных материалов и заданий снижает нагрузку, связанную с управлением образовательным контентом, и позволяет сосредоточиться на методической стороне обучения. Возможность анализа результатов выполнения заданий способствует более точной оценке уровня подготовки обучающихся и корректировке содержания курса.</text:span><text:span text:style-name="T2"/></text:p>
      <text:p text:style-name="P20" loext:marker-style-name="T2"><text:span text:style-name="T2">Для онлайн-школы в целом разрабатываемое приложение выступает инструментом повышения качества образовательных услуг. Использование единой платформы обучения способствует формированию целостного образовательного продукта, повышает удобство использования и доверие со стороны пользователей. Это создаёт условия для масштабирования образовательных программ и расширения аудитории без существенного увеличения организационных затрат.</text:span><text:span text:style-name="T2"/></text:p>
      <text:p text:style-name="P28" loext:marker-style-name="T2"><text:span text:style-name="T14">Рассматриваемое приложение, таким образом, органично встраивается в предметную область онлайн-обучения программированию, дополняя и упорядочивая существующие образовательные процессы. Его функциональная направленность определяет требования к структуре, возможностям и </text:span><text:span text:style-name="T2">архитектуре системы, которые будут рассмотрены в последующих главах работы.</text:span></text:p>
      <text:p text:style-name="P29" loext:marker-style-name="T2"><text:span text:style-name="T1">1.3. </text:span><text:span text:style-name="T1">Техническое задание</text:span></text:p>
      <text:p text:style-name="P30" loext:marker-style-name="T15"/>
      <text:p text:style-name="P30" loext:marker-style-name="T15"/>
      <text:p text:style-name="P30" loext:marker-style-name="T15"/>
      <text:p text:style-name="P30" loext:marker-style-name="T15"/>
      <text:p text:style-name="P30" loext:marker-style-name="T15"/>
      <text:p text:style-name="P30" loext:marker-style-name="T15"/>
      <text:p text:style-name="P30" loext:marker-style-name="T15"/>
      <text:p text:style-name="P30" loext:marker-style-name="T15"/>
      <text:p text:style-name="P30" loext:marker-style-name="T15"/>
      <text:p text:style-name="P30" loext:marker-style-name="T15"/>
      <text:p text:style-name="P30" loext:marker-style-name="T15"/>
      <text:p text:style-name="P30" loext:marker-style-name="T15"/>
      <text:p text:style-name="P30" loext:marker-style-name="T15"/>
      <text:p text:style-name="P30" loext:marker-style-name="T15"/>
      <text:p text:style-name="P30" loext:marker-style-name="T15"/>
      <text:p text:style-name="P30" loext:marker-style-name="T15"/>
      <text:p text:style-name="P30" loext:marker-style-name="T15"/>
      <text:p text:style-name="P30" loext:marker-style-name="T15"/>
      <text:p text:style-name="P30" loext:marker-style-name="T15"/>
      <text:p text:style-name="P30" loext:marker-style-name="T15"/>
      <text:p text:style-name="P30" loext:marker-style-name="T15"/>
      <text:p text:style-name="P30" loext:marker-style-name="T15"/>
      <text:p text:style-name="P31" loext:marker-style-name="T15"><text:span text:style-name="T15">Техническое задание на разработку программы</text:span><text:span text:style-name="T15"/></text:p>
      <text:p text:style-name="P31" loext:marker-style-name="T15"><text:span text:style-name="T15">«Десктопное приложение для онлайн-школы по программированию»</text:span><text:span text:style-name="T15"/></text:p>
      <text:p text:style-name="P32" loext:marker-style-name="T15"/>
      <text:p text:style-name="P33" loext:marker-style-name="T15"><text:span text:style-name="T15">Содержание</text:span><text:span text:style-name="T15"/></text:p>
      <text:list xml:id="list2524133443" text:style-name="WWNum9">
        <text:list-item text:start-value="1">
          <text:p text:style-name="P34" loext:marker-style-name="T4"><text:span text:style-name="T4">Введение</text:span><text:span text:style-name="T4"/></text:p>
          <text:list text:style-name="WWNum1">
            <text:list-item>
              <text:p text:style-name="P35" loext:marker-style-name="T4"><text:span text:style-name="T4">Основание для разработки</text:span><text:span text:style-name="T4"/></text:p>
            </text:list-item>
            <text:list-item>
              <text:p text:style-name="P35" loext:marker-style-name="T4"><text:span text:style-name="T4">Назначение и область применения</text:span><text:span text:style-name="T4"/></text:p>
            </text:list-item>
          </text:list>
        </text:list-item>
        <text:list-item text:style-override="WWNum1">
          <text:p text:style-name="P35" loext:marker-style-name="T4"><text:span text:style-name="T4">Требования к программе</text:span><text:span text:style-name="T4"/></text:p>
          <text:list text:style-name="WWNum1">
            <text:list-item>
              <text:p text:style-name="P35" loext:marker-style-name="T4"><text:span text:style-name="T4">Требования к функциональным характеристикам</text:span><text:span text:style-name="T4"/></text:p>
            </text:list-item>
            <text:list-item>
              <text:p text:style-name="P35" loext:marker-style-name="T4"><text:span text:style-name="T4">Требования к надёжности</text:span><text:span text:style-name="T4"/></text:p>
              <text:list>
                <text:list-item>
                  <text:p text:style-name="P35" loext:marker-style-name="T4"><text:span text:style-name="T4">Требования к обеспечению надёжного функционирования программы</text:span><text:span text:style-name="T4"/></text:p>
                </text:list-item>
                <text:list-item>
                  <text:p text:style-name="P35" loext:marker-style-name="T4"><text:span text:style-name="T4">Время восстановления после отказа</text:span><text:span text:style-name="T4"/></text:p>
                </text:list-item>
                <text:list-item>
                  <text:p text:style-name="P35" loext:marker-style-name="T4"><text:span text:style-name="T4">Отказы из-за некорректных действий пользовательской системы</text:span><text:span text:style-name="T4"/></text:p>
                </text:list-item>
              </text:list>
            </text:list-item>
          </text:list>
        </text:list-item>
        <text:list-item text:style-override="WWNum1">
          <text:p text:style-name="P35" loext:marker-style-name="T4"><text:span text:style-name="T4">Условия эксплуатации</text:span><text:span text:style-name="T4"/></text:p>
          <text:list text:style-name="WWNum1">
            <text:list-item>
              <text:p text:style-name="P35" loext:marker-style-name="T4"><text:span text:style-name="T4">Климатические условия эксплуатации</text:span><text:span text:style-name="T4"/></text:p>
            </text:list-item>
            <text:list-item>
              <text:p text:style-name="P35" loext:marker-style-name="T4"><text:span text:style-name="T4">Требования к квалификации и численности персонала</text:span><text:span text:style-name="T4"/></text:p>
            </text:list-item>
            <text:list-item>
              <text:p text:style-name="P35" loext:marker-style-name="T4"><text:span text:style-name="T4">Требования к составу и параметрам технических средств</text:span><text:span text:style-name="T4"/></text:p>
            </text:list-item>
            <text:list-item>
              <text:p text:style-name="P35" loext:marker-style-name="T4"><text:span text:style-name="T4">Требования к информационной и программной совместимости</text:span><text:span text:style-name="T4"/></text:p>
              <text:list>
                <text:list-item>
                  <text:p text:style-name="P35" loext:marker-style-name="T4"><text:span text:style-name="T4">Требования к информационным структурам и методам решения</text:span><text:span text:style-name="T4"/></text:p>
                </text:list-item>
                <text:list-item>
                  <text:p text:style-name="P35" loext:marker-style-name="T4"><text:span text:style-name="T4">Требования к исходным кодам и языкам программирования</text:span><text:span text:style-name="T4"/></text:p>
                </text:list-item>
                <text:list-item>
                  <text:p text:style-name="P35" loext:marker-style-name="T4"><text:span text:style-name="T4">Требования к программным средствам, используемым программой</text:span><text:span text:style-name="T4"/></text:p>
                </text:list-item>
                <text:list-item>
                  <text:p text:style-name="P35" loext:marker-style-name="T4"><text:span text:style-name="T4">Требования к защите информации и программ</text:span><text:span text:style-name="T4"/></text:p>
                </text:list-item>
              </text:list>
            </text:list-item>
            <text:list-item>
              <text:p text:style-name="P35" loext:marker-style-name="T4"><text:span text:style-name="T4">Специальные требования</text:span><text:span text:style-name="T4"/></text:p>
            </text:list-item>
          </text:list>
        </text:list-item>
        <text:list-item text:style-override="WWNum1">
          <text:p text:style-name="P35" loext:marker-style-name="T4"><text:span text:style-name="T4">Требования к программной документации</text:span><text:span text:style-name="T4"/></text:p>
          <text:list text:style-name="WWNum1">
            <text:list-item>
              <text:p text:style-name="P35" loext:marker-style-name="T4"><text:span text:style-name="T4">Состав программной документации</text:span><text:span text:style-name="T4"/></text:p>
            </text:list-item>
          </text:list>
        </text:list-item>
        <text:list-item text:style-override="WWNum1">
          <text:p text:style-name="P35" loext:marker-style-name="T4"><text:span text:style-name="T4">Технико-экономическое обоснование</text:span><text:span text:style-name="T4"/></text:p>
        </text:list-item>
        <text:list-item text:style-override="WWNum1">
          <text:p text:style-name="P35" loext:marker-style-name="T4"><text:span text:style-name="T4">Стадии и этапы разработки</text:span><text:span text:style-name="T4"/></text:p>
          <text:list text:style-name="WWNum1">
            <text:list-item>
              <text:p text:style-name="P35" loext:marker-style-name="T4"><text:span text:style-name="T4">Стадии разработки</text:span><text:span text:style-name="T4"/></text:p>
            </text:list-item>
            <text:list-item>
              <text:p text:style-name="P35" loext:marker-style-name="T4"><text:span text:style-name="T4">Этапы разработки</text:span><text:span text:style-name="T4"/></text:p>
            </text:list-item>
            <text:list-item>
              <text:p text:style-name="P35" loext:marker-style-name="T4"><text:span text:style-name="T4">Содержание работ по этапам</text:span><text:span text:style-name="T4"/></text:p>
            </text:list-item>
          </text:list>
        </text:list-item>
        <text:list-item text:style-override="WWNum1">
          <text:p text:style-name="P35" loext:marker-style-name="T4"><text:span text:style-name="T4">Порядок контроля и приемки</text:span><text:span text:style-name="T4"/></text:p>
          <text:list text:style-name="WWNum1">
            <text:list-item>
              <text:p text:style-name="P35" loext:marker-style-name="T4"><text:span text:style-name="T4">Предварительный контроль</text:span><text:span text:style-name="T4"/></text:p>
            </text:list-item>
            <text:list-item>
              <text:p text:style-name="P35" loext:marker-style-name="T4"><text:span text:style-name="T4">Тестирование</text:span><text:span text:style-name="T4"/></text:p>
            </text:list-item>
            <text:list-item>
              <text:p text:style-name="P35" loext:marker-style-name="T4"><text:span text:style-name="T4">Приёмка</text:span><text:span text:style-name="T4"/></text:p>
            </text:list-item>
          </text:list>
        </text:list-item>
      </text:list>
      <text:list xml:id="list296124646" text:style-name="WWNum10">
        <text:list-item text:start-value="1">
          <text:p text:style-name="P36" loext:marker-style-name="T15"><text:span text:style-name="T15">Введение</text:span><text:span text:style-name="T15"/></text:p>
          <text:list text:style-name="WWNum5">
            <text:list-item>
              <text:p text:style-name="P37" loext:marker-style-name="T15"><text:span text:style-name="T15">Основание для разработки</text:span><text:span text:style-name="T15"/></text:p>
              <text:list>
                <text:list-item>
                  <text:p text:style-name="P37" loext:marker-style-name="T4"><text:span text:style-name="T4">Наименование работы: «Десктопное приложение для онлайн-школы по программированию».</text:span><text:span text:style-name="T4"/></text:p>
                </text:list-item>
                <text:list-item>
                  <text:p text:style-name="P37" loext:marker-style-name="T4"><text:span text:style-name="T4">Основанием для разработки является задание на выпускную квалификационную работу.</text:span><text:span text:style-name="T4"/></text:p>
                </text:list-item>
                <text:list-item>
                  <text:p text:style-name="P37" loext:marker-style-name="T4"><text:span text:style-name="T4">Организация, утвердившая договор: Читинский Педагогический колледж.</text:span><text:span text:style-name="T4"/></text:p>
                </text:list-item>
              </text:list>
            </text:list-item>
            <text:list-item>
              <text:p text:style-name="P37" loext:marker-style-name="T15"><text:span text:style-name="T15">Назначение и область применения</text:span><text:span text:style-name="T15"/></text:p>
              <text:list>
                <text:list-item>
                  <text:p text:style-name="P37" loext:marker-style-name="T4"><text:span text:style-name="T4">Назначение разработки заключается в создании инструмента для обучения программированию, который объединяет теоретический материал и практические задания в одном приложении с безопасным выполнением кода пользователей.</text:span><text:span text:style-name="T4"/></text:p>
                </text:list-item>
                <text:list-item>
                  <text:p text:style-name="P37" loext:marker-style-name="T4"><text:span text:style-name="T4">Основные функциональные задачи приложения включают:</text:span><text:span text:style-name="T4"/></text:p>
                  <text:list>
                    <text:list-item>
                      <text:p text:style-name="P37" loext:marker-style-name="T4"><text:span text:style-name="T4">Просмотр теоретических материалов по темам программирования;</text:span><text:span text:style-name="T4"/></text:p>
                    </text:list-item>
                    <text:list-item>
                      <text:p text:style-name="P37" loext:marker-style-name="T4"><text:span text:style-name="T4">Выбор и выполнение практических заданий;</text:span><text:span text:style-name="T4"/></text:p>
                    </text:list-item>
                    <text:list-item>
                      <text:p text:style-name="P37" loext:marker-style-name="T4"><text:span text:style-name="T4">Редактирование и отправка кода на сервер для проверки;</text:span><text:span text:style-name="T4"/></text:p>
                    </text:list-item>
                    <text:list-item>
                      <text:p text:style-name="P37" loext:marker-style-name="T4"><text:span text:style-name="T4">Получение результатов выполнения и обратной связи;</text:span><text:span text:style-name="T4"/></text:p>
                    </text:list-item>
                    <text:list-item>
                      <text:p text:style-name="P37" loext:marker-style-name="T4"><text:span text:style-name="T4">Навигация по курсу обучения.</text:span><text:span text:style-name="T4"/></text:p>
                    </text:list-item>
                  </text:list>
                </text:list-item>
              </text:list>
            </text:list-item>
          </text:list>
        </text:list-item>
      </text:list>
      <text:p text:style-name="P38" loext:marker-style-name="T4"/>
      <text:list text:continue-list="list296124646" text:style-name="WWNum5">
        <text:list-item>
          <text:p text:style-name="P37" loext:marker-style-name="T15"><text:span text:style-name="T15">Требования к программе</text:span><text:span text:style-name="T15"/></text:p>
          <text:list>
            <text:list-item>
              <text:p text:style-name="P37" loext:marker-style-name="T15"><text:span text:style-name="T15">Требования к функциональным характеристикам</text:span><text:span text:style-name="T15"/></text:p>
              <text:list>
                <text:list-item>
                  <text:p text:style-name="P37" loext:marker-style-name="T4"><text:span text:style-name="T4">Работа с курсами и темами:</text:span><text:span text:style-name="T4"/></text:p>
                  <text:list>
                    <text:list-item>
                      <text:p text:style-name="P37" loext:marker-style-name="T4"><text:span text:style-name="T4">Возможность загрузки списка тем и заданий с сервера;</text:span><text:span text:style-name="T4"/></text:p>
                    </text:list-item>
                    <text:list-item>
                      <text:p text:style-name="P37" loext:marker-style-name="T4"><text:span text:style-name="T4">Постраничное отображение теоретического материала;</text:span><text:span text:style-name="T4"/></text:p>
                    </text:list-item>
                    <text:list-item>
                      <text:p text:style-name="P37" loext:marker-style-name="T4"><text:span text:style-name="T4">Отслеживание прогресса пользователя по темам и заданиям.</text:span><text:span text:style-name="T4"/></text:p>
                    </text:list-item>
                  </text:list>
                </text:list-item>
                <text:list-item>
                  <text:p text:style-name="P37" loext:marker-style-name="T4"><text:span text:style-name="T4">Редактор кода:</text:span><text:span text:style-name="T4"/></text:p>
                  <text:list>
                    <text:list-item>
                      <text:p text:style-name="P37" loext:marker-style-name="T4"><text:span text:style-name="T4">Встроенный редактор с подсветкой синтаксиса;</text:span><text:span text:style-name="T4"/></text:p>
                    </text:list-item>
                    <text:list-item>
                      <text:p text:style-name="P37" loext:marker-style-name="T4"><text:span text:style-name="T4">Возможность редактирования, сохранения и отправки кода на сервер;</text:span><text:span text:style-name="T4"/></text:p>
                    </text:list-item>
                    <text:list-item>
                      <text:p text:style-name="P37" loext:marker-style-name="T4"><text:span text:style-name="T4">Поддержка нескольких языков программирования (в будущем).</text:span><text:span text:style-name="T4"/></text:p>
                    </text:list-item>
                  </text:list>
                </text:list-item>
                <text:list-item>
                  <text:p text:style-name="P37" loext:marker-style-name="T4"><text:span text:style-name="T4">Система проверки решений:</text:span><text:span text:style-name="T4"/></text:p>
                  <text:list>
                    <text:list-item>
                      <text:p text:style-name="P37" loext:marker-style-name="T4"><text:span text:style-name="T4">Выполнение пользовательского кода на сервере в изолированной среде Docker;</text:span><text:span text:style-name="T4"/></text:p>
                    </text:list-item>
                    <text:list-item>
                      <text:p text:style-name="P37" loext:marker-style-name="T4"><text:span text:style-name="T4">Контроль ресурсов: память, CPU, время выполнения;</text:span><text:span text:style-name="T4"/></text:p>
                    </text:list-item>
                    <text:list-item>
                      <text:p text:style-name="P37" loext:marker-style-name="T4"><text:span text:style-name="T4">Сравнение результатов с эталонными значениями;</text:span><text:span text:style-name="T4"/></text:p>
                    </text:list-item>
                    <text:list-item>
                      <text:p text:style-name="P37" loext:marker-style-name="T4"><text:span text:style-name="T4">Формирование обратной связи для пользователя.</text:span><text:span text:style-name="T4"/></text:p>
                    </text:list-item>
                  </text:list>
                </text:list-item>
              </text:list>
            </text:list-item>
            <text:list-item>
              <text:p text:style-name="P37" loext:marker-style-name="T15"><text:span text:style-name="T15">Требования к надёжности</text:span><text:span text:style-name="T15"/></text:p>
              <text:list>
                <text:list-item>
                  <text:p text:style-name="P37" loext:marker-style-name="T4"><text:span text:style-name="T4">Требования к обеспечению надежного функционирования программы:</text:span><text:span text:style-name="T4"/></text:p>
                  <text:list>
                    <text:list-item>
                      <text:p text:style-name="P37" loext:marker-style-name="T4"><text:span text:style-name="T4">Программа должна продолжать функционировать при сбоях оборудования или сетевого соединения;</text:span><text:span text:style-name="T4"/></text:p>
                    </text:list-item>
                    <text:list-item>
                      <text:p text:style-name="P37" loext:marker-style-name="T4"><text:span text:style-name="T4">Обеспечение сохранности и конфиденциальности данных через аутентификацию и шифрование;</text:span><text:span text:style-name="T4"/></text:p>
                    </text:list-item>
                    <text:list-item>
                      <text:p text:style-name="P37" loext:marker-style-name="T4"><text:span text:style-name="T4">Интуитивно понятный и удобный интерфейс для пользователя без специальных навыков;</text:span><text:span text:style-name="T4"/></text:p>
                    </text:list-item>
                    <text:list-item>
                      <text:p text:style-name="P37" loext:marker-style-name="T4"><text:span text:style-name="T4">Простота сопровождения и расширяемость системы;</text:span><text:span text:style-name="T4"/></text:p>
                    </text:list-item>
                    <text:list-item>
                      <text:p text:style-name="P37" loext:marker-style-name="T4"><text:span text:style-name="T4">Корректное и стабильное выполнение всех функций;</text:span><text:span text:style-name="T4"/></text:p>
                    </text:list-item>
                    <text:list-item>
                      <text:p text:style-name="P37" loext:marker-style-name="T4"><text:span text:style-name="T4">Совместимость с другими программами и операционными системами, поддерживающими стандарты HTTP и JSON.</text:span><text:span text:style-name="T4"/></text:p>
                    </text:list-item>
                  </text:list>
                </text:list-item>
                <text:list-item>
                  <text:p text:style-name="P37" loext:marker-style-name="T4"><text:span text:style-name="T4">Время восстановления после отказа:</text:span><text:span text:style-name="T4"/></text:p>
                  <text:list>
                    <text:list-item>
                      <text:p text:style-name="P37" loext:marker-style-name="T4"><text:span text:style-name="T4">При отказе клиентской программы восстановление возможно через перезапуск приложения;</text:span><text:span text:style-name="T4"/></text:p>
                    </text:list-item>
                    <text:list-item>
                      <text:p text:style-name="P37" loext:marker-style-name="T4"><text:span text:style-name="T4">При сбое серверной части восстановление может потребовать нескольких минут до нескольких часов в зависимости от характера ошибки.</text:span><text:span text:style-name="T4"/></text:p>
                    </text:list-item>
                  </text:list>
                </text:list-item>
                <text:list-item>
                  <text:p text:style-name="P37" loext:marker-style-name="T4"><text:span text:style-name="T4">Отказы из-за некорректных действий пользователей системы</text:span><text:span text:style-name="T4"/></text:p>
                  <text:list>
                    <text:list-item>
                      <text:p text:style-name="P37" loext:marker-style-name="T4"><text:span text:style-name="T4">Некорректный ввод данных в редакторе кода вызывает уведомление об ошибке;</text:span><text:span text:style-name="T4"/></text:p>
                    </text:list-item>
                    <text:list-item>
                      <text:p text:style-name="P37" loext:marker-style-name="T4"><text:soft-page-break/><text:span text:style-name="T4">Попытка выполнения запрещённых действий или превышение прав доступа блокируется системой.</text:span><text:span text:style-name="T4"/></text:p>
                    </text:list-item>
                  </text:list>
                </text:list-item>
              </text:list>
            </text:list-item>
          </text:list>
        </text:list-item>
      </text:list>
      <text:p text:style-name="P38" loext:marker-style-name="T4"/>
      <text:list text:continue-numbering="true" text:style-name="WWNum5">
        <text:list-item>
          <text:p text:style-name="P37" loext:marker-style-name="T15"><text:span text:style-name="T15">Условия эксплуатации</text:span><text:span text:style-name="T15"/></text:p>
          <text:list>
            <text:list-item>
              <text:p text:style-name="P37" loext:marker-style-name="T15"><text:span text:style-name="T15">Климатические условия эксплуатации</text:span><text:span text:style-name="T15"/></text:p>
              <text:list>
                <text:list-item>
                  <text:p text:style-name="P37" loext:marker-style-name="T4"><text:span text:style-name="T4">Рабочая температура должна находиться в диапазоне от 10 до 35 градусов Цельсия;</text:span><text:span text:style-name="T4"/></text:p>
                </text:list-item>
                <text:list-item>
                  <text:p text:style-name="P37" loext:marker-style-name="T4"><text:span text:style-name="T4">Рабочая влажность должна быть в диапазоне от 30% до 80%.</text:span><text:span text:style-name="T4"/></text:p>
                </text:list-item>
              </text:list>
            </text:list-item>
            <text:list-item>
              <text:p text:style-name="P37" loext:marker-style-name="T15"><text:span text:style-name="T15">Требования к квалификации и численности персонала</text:span><text:span text:style-name="T15"/></text:p>
              <text:list>
                <text:list-item>
                  <text:p text:style-name="P37" loext:marker-style-name="T4"><text:span text:style-name="T4">Требований к квалификации или численности персонала не предъявляется. Программа рассчитана на пользователя без специальных навыков.</text:span><text:span text:style-name="T4"/></text:p>
                </text:list-item>
              </text:list>
            </text:list-item>
            <text:list-item>
              <text:p text:style-name="P37" loext:marker-style-name="T15"><text:span text:style-name="T15">Требования к составу и параметрам технических средств</text:span><text:span text:style-name="T15"/></text:p>
              <text:list>
                <text:list-item>
                  <text:p text:style-name="P37" loext:marker-style-name="T4"><text:span text:style-name="T4">ОС: Windows 10 или выше / Linux;</text:span><text:span text:style-name="T4"/></text:p>
                </text:list-item>
                <text:list-item>
                  <text:p text:style-name="P37" loext:marker-style-name="T4"><text:span text:style-name="T4">Процессор: Intel Core i3 или выше;</text:span><text:span text:style-name="T4"/></text:p>
                </text:list-item>
                <text:list-item>
                  <text:p text:style-name="P37" loext:marker-style-name="T4"><text:span text:style-name="T4">ОЗУ: минимум 4 ГБ;</text:span><text:span text:style-name="T4"/></text:p>
                </text:list-item>
                <text:list-item>
                  <text:p text:style-name="P37" loext:marker-style-name="T4"><text:span text:style-name="T4">Свободное место на диске: 500 МБ;</text:span><text:span text:style-name="T4"/></text:p>
                </text:list-item>
                <text:list-item>
                  <text:p text:style-name="P37" loext:marker-style-name="T4"><text:span text:style-name="T4">Интернет-соединение для синхронизации с сервером.</text:span><text:span text:style-name="T4"/></text:p>
                </text:list-item>
              </text:list>
            </text:list-item>
            <text:list-item>
              <text:p text:style-name="P37" loext:marker-style-name="T15"><text:span text:style-name="T15">Требования к информационной и программной совместимости</text:span><text:span text:style-name="T15"/></text:p>
              <text:list>
                <text:list-item>
                  <text:p text:style-name="P37" loext:marker-style-name="T4"><text:span text:style-name="T4">Требования к информационным структурам и методам решения:</text:span><text:span text:style-name="T4"/></text:p>
                  <text:list>
                    <text:list-item>
                      <text:p text:style-name="P37" loext:marker-style-name="T4"><text:span text:style-name="T4">Серверная часть использует базу данных для хранения информации о пользователях, курсах и заданиях;</text:span><text:span text:style-name="T4"/></text:p>
                    </text:list-item>
                    <text:list-item>
                      <text:p text:style-name="P37" loext:marker-style-name="T4"><text:span text:style-name="T4">Клиент работает с API сервера через HTTP-запросы и JSON-ответы;</text:span><text:span text:style-name="T4"/></text:p>
                    </text:list-item>
                    <text:list-item>
                      <text:p text:style-name="P37" loext:marker-style-name="T4"><text:span text:style-name="T4">Структура базы данных должна поддерживать хранение пользователей, ролей, курсов и результатов выполнения заданий.</text:span><text:span text:style-name="T4"/></text:p>
                    </text:list-item>
                  </text:list>
                </text:list-item>
                <text:list-item>
                  <text:p text:style-name="P37" loext:marker-style-name="T4"><text:span text:style-name="T4">Требования к исходным кодам и языкам программирования:</text:span><text:span text:style-name="T4"/></text:p>
                  <text:list>
                    <text:list-item>
                      <text:p text:style-name="P37" loext:marker-style-name="T4"><text:span text:style-name="T4">Проект разрабатывается на C++ с использованием Qt Quick для клиента и PHP для сервера;</text:span><text:span text:style-name="T4"/></text:p>
                    </text:list-item>
                    <text:list-item>
                      <text:p text:style-name="P37" loext:marker-style-name="T4"><text:span text:style-name="T4">Код должен быть чистым, структурированным и документированным;</text:span><text:span text:style-name="T4"/></text:p>
                    </text:list-item>
                    <text:list-item>
                      <text:p text:style-name="P37" loext:marker-style-name="T4"><text:span text:style-name="T4">Поддержка open-source разработки (по согласованию).</text:span><text:span text:style-name="T4"/></text:p>
                    </text:list-item>
                  </text:list>
                </text:list-item>
                <text:list-item>
                  <text:p text:style-name="P37" loext:marker-style-name="T4"><text:span text:style-name="T4">Требования к программным средствам, используемым программой:</text:span><text:span text:style-name="T4"/></text:p>
                  <text:list>
                    <text:list-item>
                      <text:p text:style-name="P37" loext:marker-style-name="T4"><text:span text:style-name="T4">Поддержка ОС Windows и Linux;</text:span><text:span text:style-name="T4"/></text:p>
                    </text:list-item>
                    <text:list-item>
                      <text:p text:style-name="P37" loext:marker-style-name="T4"><text:span text:style-name="T4">Использование Docker для безопасного выполнения кода;</text:span><text:span text:style-name="T4"/></text:p>
                    </text:list-item>
                    <text:list-item>
                      <text:p text:style-name="P37" loext:marker-style-name="T4"><text:span text:style-name="T4">Интеграция с веб-сервером Apache/Nginx.</text:span><text:span text:style-name="T4"/></text:p>
                    </text:list-item>
                  </text:list>
                </text:list-item>
                <text:list-item>
                  <text:p text:style-name="P37" loext:marker-style-name="T4"><text:span text:style-name="T4">Требования к защите информации и программ:</text:span><text:span text:style-name="T4"/></text:p>
                  <text:list>
                    <text:list-item>
                      <text:p text:style-name="P37" loext:marker-style-name="T4"><text:span text:style-name="T4">Система аутентификации пользователей с разграничением прав доступа;</text:span><text:span text:style-name="T4"/></text:p>
                    </text:list-item>
                    <text:list-item>
                      <text:p text:style-name="P37" loext:marker-style-name="T4"><text:span text:style-name="T4">Шифрование конфиденциальной информации;</text:span><text:span text:style-name="T4"/></text:p>
                    </text:list-item>
                    <text:list-item>
                      <text:p text:style-name="P37" loext:marker-style-name="T4"><text:span text:style-name="T4">Ограничение прав и ресурсов при выполнении кода;</text:span><text:span text:style-name="T4"/></text:p>
                    </text:list-item>
                    <text:list-item>
                      <text:p text:style-name="P37" loext:marker-style-name="T4"><text:span text:style-name="T4">Регулярные обновления программного обеспечения.</text:span><text:span text:style-name="T4"/></text:p>
                    </text:list-item>
                  </text:list>
                </text:list-item>
              </text:list>
            </text:list-item>
            <text:list-item>
              <text:p text:style-name="P37" loext:marker-style-name="T15"><text:span text:style-name="T15">Специальные требования</text:span><text:span text:style-name="T15"/></text:p>
              <text:list>
                <text:list-item>
                  <text:p text:style-name="P37" loext:marker-style-name="T4"><text:span text:style-name="T4">Авторизация по логину и паролю;</text:span><text:span text:style-name="T4"/></text:p>
                </text:list-item>
                <text:list-item>
                  <text:p text:style-name="P37" loext:marker-style-name="T4"><text:span text:style-name="T4">Разграничение прав пользователей: студент, преподаватель, администратор;</text:span><text:span text:style-name="T4"/></text:p>
                </text:list-item>
                <text:list-item>
                  <text:p text:style-name="P37" loext:marker-style-name="T4"><text:span text:style-name="T4">Возможность редактирования только допустимых разделов;</text:span><text:span text:style-name="T4"/></text:p>
                </text:list-item>
                <text:list-item>
                  <text:p text:style-name="P37" loext:marker-style-name="T4"><text:span text:style-name="T4">Защита данных при передаче и хранении;</text:span><text:span text:style-name="T4"/></text:p>
                </text:list-item>
                <text:list-item>
                  <text:p text:style-name="P37" loext:marker-style-name="T4"><text:span text:style-name="T4">Регулярное обновление и поддержка системы.</text:span><text:span text:style-name="T4"/></text:p>
                </text:list-item>
              </text:list>
            </text:list-item>
          </text:list>
        </text:list-item>
      </text:list>
      <text:p text:style-name="P38" loext:marker-style-name="T4"/>
      <text:list text:continue-numbering="true" text:style-name="WWNum5">
        <text:list-item>
          <text:p text:style-name="P37" loext:marker-style-name="T15"><text:span text:style-name="T15">Требования к программной документации</text:span><text:span text:style-name="T15"/></text:p>
          <text:list>
            <text:list-item>
              <text:p text:style-name="P37" loext:marker-style-name="T15"><text:span text:style-name="T15">Состав программной документации</text:span><text:span text:style-name="T15"/></text:p>
              <text:list>
                <text:list-item>
                  <text:p text:style-name="P37" loext:marker-style-name="T4"><text:span text:style-name="T4">Техническое задание;</text:span><text:span text:style-name="T4"/></text:p>
                </text:list-item>
                <text:list-item>
                  <text:p text:style-name="P37" loext:marker-style-name="T4"><text:span text:style-name="T4">Руководство пользователя.</text:span><text:span text:style-name="T4"/></text:p>
                </text:list-item>
              </text:list>
            </text:list-item>
          </text:list>
        </text:list-item>
      </text:list>
      <text:p text:style-name="P38" loext:marker-style-name="T4"/>
      <text:list text:continue-numbering="true" text:style-name="WWNum5">
        <text:list-item>
          <text:p text:style-name="P37" loext:marker-style-name="T15"><text:span text:style-name="T15">Технико-экономическое обоснование</text:span><text:span text:style-name="T15"/></text:p>
          <text:list>
            <text:list-item>
              <text:p text:style-name="P37" loext:marker-style-name="T4"><text:span text:style-name="T4">Экономическая эффективность ориентировочно не рассчитывается из-за уникальности требований к проекту.</text:span><text:span text:style-name="T4"/></text:p>
            </text:list-item>
          </text:list>
        </text:list-item>
      </text:list>
      <text:p text:style-name="P38" loext:marker-style-name="T4"><text:soft-page-break/></text:p>
      <text:list text:continue-numbering="true" text:style-name="WWNum5">
        <text:list-item>
          <text:p text:style-name="P37" loext:marker-style-name="T15"><text:span text:style-name="T15">Стадии и этапы разработки</text:span><text:span text:style-name="T15"/></text:p>
          <text:list>
            <text:list-item>
              <text:p text:style-name="P37" loext:marker-style-name="T15"><text:span text:style-name="T15">Стадии разработки</text:span><text:span text:style-name="T15"/></text:p>
              <text:list>
                <text:list-item>
                  <text:p text:style-name="P37" loext:marker-style-name="T4"><text:span text:style-name="T4">Разработка технического задания;</text:span><text:span text:style-name="T4"/></text:p>
                </text:list-item>
                <text:list-item>
                  <text:p text:style-name="P37" loext:marker-style-name="T4"><text:span text:style-name="T4">Рабочее проектирование;</text:span><text:span text:style-name="T4"/></text:p>
                </text:list-item>
                <text:list-item>
                  <text:p text:style-name="P37" loext:marker-style-name="T4"><text:span text:style-name="T4">Внедрение.</text:span><text:span text:style-name="T4"/></text:p>
                </text:list-item>
              </text:list>
            </text:list-item>
            <text:list-item>
              <text:p text:style-name="P37" loext:marker-style-name="T15"><text:span text:style-name="T15">Этапы разработки</text:span><text:span text:style-name="T15"/></text:p>
              <text:list>
                <text:list-item>
                  <text:p text:style-name="P37" loext:marker-style-name="T4"><text:span text:style-name="T4">Разработка технического задания;</text:span><text:span text:style-name="T4"/></text:p>
                </text:list-item>
                <text:list-item>
                  <text:p text:style-name="P37" loext:marker-style-name="T4"><text:span text:style-name="T4">Разработка программы;</text:span><text:span text:style-name="T4"/></text:p>
                </text:list-item>
                <text:list-item>
                  <text:p text:style-name="P37" loext:marker-style-name="T4"><text:span text:style-name="T4">Разработка программной документации;</text:span><text:span text:style-name="T4"/></text:p>
                </text:list-item>
                <text:list-item>
                  <text:p text:style-name="P37" loext:marker-style-name="T4"><text:span text:style-name="T4">Испытания программы;</text:span><text:span text:style-name="T4"/></text:p>
                </text:list-item>
                <text:list-item>
                  <text:p text:style-name="P37" loext:marker-style-name="T4"><text:span text:style-name="T4">Подготовка и передача программы.</text:span><text:span text:style-name="T4"/></text:p>
                </text:list-item>
              </text:list>
            </text:list-item>
            <text:list-item>
              <text:p text:style-name="P37" loext:marker-style-name="T15"><text:span text:style-name="T15">Содержание работ по этапам</text:span><text:span text:style-name="T15"/></text:p>
              <text:list>
                <text:list-item>
                  <text:p text:style-name="P37" loext:marker-style-name="T4"><text:span text:style-name="T4">Разработка технического задания:</text:span><text:span text:style-name="T4"/></text:p>
                  <text:list>
                    <text:list-item>
                      <text:p text:style-name="P37" loext:marker-style-name="T4"><text:span text:style-name="T4">Постановка задачи;</text:span><text:span text:style-name="T4"/></text:p>
                    </text:list-item>
                    <text:list-item>
                      <text:p text:style-name="P37" loext:marker-style-name="T4"><text:span text:style-name="T4">Определение и уточнение требований к техническим средствам;</text:span><text:span text:style-name="T4"/></text:p>
                    </text:list-item>
                    <text:list-item>
                      <text:p text:style-name="P37" loext:marker-style-name="T4"><text:span text:style-name="T4">Определение требований к программе;</text:span><text:span text:style-name="T4"/></text:p>
                    </text:list-item>
                    <text:list-item>
                      <text:p text:style-name="P37" loext:marker-style-name="T4"><text:span text:style-name="T4">Определение стадий, этапов и сроков разработки программы и документации на неё;</text:span><text:span text:style-name="T4"/></text:p>
                    </text:list-item>
                    <text:list-item>
                      <text:p text:style-name="P37" loext:marker-style-name="T4"><text:span text:style-name="T4">Согласование и утверждение технического задания.</text:span><text:span text:style-name="T4"/></text:p>
                    </text:list-item>
                  </text:list>
                </text:list-item>
                <text:list-item>
                  <text:p text:style-name="P37" loext:marker-style-name="T4"><text:span text:style-name="T4">Разработка программы:</text:span><text:span text:style-name="T4"/></text:p>
                  <text:list>
                    <text:list-item>
                      <text:p text:style-name="P37" loext:marker-style-name="T4"><text:span text:style-name="T4">Программирование;</text:span><text:span text:style-name="T4"/></text:p>
                    </text:list-item>
                    <text:list-item>
                      <text:p text:style-name="P37" loext:marker-style-name="T4"><text:span text:style-name="T4">Отладка программы.</text:span><text:span text:style-name="T4"/></text:p>
                    </text:list-item>
                    <text:list-item>
                      <text:p text:style-name="P37" loext:marker-style-name="T4"><text:span text:style-name="T4">Разработка программной документации:</text:span><text:span text:style-name="T4"/></text:p>
                      <text:list>
                        <text:list-item>
                          <text:p text:style-name="P37" loext:marker-style-name="T4"><text:span text:style-name="T4">Разработка программных документов в соответствии с требованиями к составу документации.</text:span><text:span text:style-name="T4"/></text:p>
                        </text:list-item>
                      </text:list>
                    </text:list-item>
                  </text:list>
                </text:list-item>
                <text:list-item>
                  <text:p text:style-name="P37" loext:marker-style-name="T4"><text:span text:style-name="T4">Испытаний программы:</text:span><text:span text:style-name="T4"/></text:p>
                  <text:list>
                    <text:list-item>
                      <text:p text:style-name="P37" loext:marker-style-name="T4"><text:span text:style-name="T4">Разработка, согласование и утверждение и методики испытаний;</text:span><text:span text:style-name="T4"/></text:p>
                    </text:list-item>
                    <text:list-item>
                      <text:p text:style-name="P37" loext:marker-style-name="T4"><text:span text:style-name="T4"><text:s/>Проведение приемо-сдаточных испытаний;</text:span><text:span text:style-name="T4"/></text:p>
                    </text:list-item>
                    <text:list-item>
                      <text:p text:style-name="P37" loext:marker-style-name="T4"><text:span text:style-name="T4">Корректировка программы и программной документации по результатам испытаний.</text:span><text:span text:style-name="T4"/></text:p>
                    </text:list-item>
                  </text:list>
                </text:list-item>
                <text:list-item>
                  <text:p text:style-name="P37" loext:marker-style-name="T4"><text:span text:style-name="T4">Подготовка и передача программы:</text:span><text:span text:style-name="T4"/></text:p>
                  <text:list>
                    <text:list-item>
                      <text:p text:style-name="P37" loext:marker-style-name="T4"><text:span text:style-name="T4">Работа по подготовке и передаче программы и программной документации в эксплуатацию на объектах Заказчика.</text:span><text:span text:style-name="T4"/></text:p>
                    </text:list-item>
                  </text:list>
                </text:list-item>
              </text:list>
            </text:list-item>
          </text:list>
        </text:list-item>
      </text:list>
      <text:p text:style-name="P39" loext:marker-style-name="T4"/>
      <text:list text:continue-numbering="true" text:style-name="WWNum5">
        <text:list-item>
          <text:p text:style-name="P37" loext:marker-style-name="T15"><text:span text:style-name="T15">Порядок контроля и приемки</text:span><text:span text:style-name="T15"/></text:p>
          <text:list>
            <text:list-item>
              <text:p text:style-name="P37" loext:marker-style-name="T15"><text:span text:style-name="T15">Предварительный контроль</text:span><text:span text:style-name="T15"/></text:p>
              <text:list>
                <text:list-item>
                  <text:p text:style-name="P37" loext:marker-style-name="T4"><text:span text:style-name="T4">Проверка соответствия функциональности приложения требованиям технического задания. Контроль качества кода и отсутствия ошибок.</text:span><text:span text:style-name="T4"/></text:p>
                </text:list-item>
              </text:list>
            </text:list-item>
            <text:list-item>
              <text:p text:style-name="P37" loext:marker-style-name="T15"><text:span text:style-name="T15">Тестирование</text:span><text:span text:style-name="T15"/></text:p>
              <text:list>
                <text:list-item>
                  <text:p text:style-name="P37" loext:marker-style-name="T4"><text:span text:style-name="T4">Проверка всех основных функций приложения;</text:span><text:span text:style-name="T4"/></text:p>
                </text:list-item>
                <text:list-item>
                  <text:p text:style-name="P37" loext:marker-style-name="T4"><text:span text:style-name="T4">Проверка стабильности работы приложения при различных нагрузках;</text:span><text:span text:style-name="T4"/></text:p>
                </text:list-item>
                <text:list-item>
                  <text:p text:style-name="P37" loext:marker-style-name="T4"><text:span text:style-name="T4">Проверка защиты данных пользователей.</text:span><text:span text:style-name="T4"/></text:p>
                </text:list-item>
              </text:list>
            </text:list-item>
            <text:list-item>
              <text:p text:style-name="P37" loext:marker-style-name="T15"><text:span text:style-name="T15">Приёмка</text:span><text:span text:style-name="T15"/></text:p>
              <text:list>
                <text:list-item>
                  <text:p text:style-name="P37" loext:marker-style-name="T4"><text:span text:style-name="T4">Проверка соответствия приложения требованиям безопасности и конфиденциальности данных;</text:span><text:span text:style-name="T4"/></text:p>
                </text:list-item>
                <text:list-item>
                  <text:p text:style-name="P37" loext:marker-style-name="T4"><text:span text:style-name="T4">Проверка оформления приложения в соответствии с корпоративным стилем компании;</text:span><text:span text:style-name="T4"/></text:p>
                </text:list-item>
                <text:list-item>
                  <text:p text:style-name="P37" loext:marker-style-name="T4"><text:span text:style-name="T4">Утверждение результатов тестирования.</text:span><text:span text:style-name="T4"/></text:p>
                </text:list-item>
              </text:list>
            </text:list-item>
          </text:list>
        </text:list-item>
      </text:list>
      <text:p text:style-name="P40" loext:marker-style-name="T2"/>
      <text:p text:style-name="P41" loext:marker-style-name="T1"><text:span text:style-name="T1">2. ПРОЕКТНАЯ ЧАСТЬ</text:span><text:span text:style-name="T1"/></text:p>
      <text:p text:style-name="P27"/>
      <text:p text:style-name="P18">2.1. Проектирование программного продукта</text:p>
      <text:p text:style-name="P42"/>
      <text:p text:style-name="P43">Разрабатываемое приложение предназначено для поддержки процесса обучения программированию в формате онлайн-школы. Продукт обеспечивает:</text:p>
      <text:list text:style-name="L1">
        <text:list-item>
          <text:p text:style-name="P44">просмотр курсов (языков программирования), уроков (тем), теоретических материалов;</text:p>
        </text:list-item>
        <text:list-item>
          <text:p text:style-name="P44">выполнение практических заданий внутри приложения;</text:p>
        </text:list-item>
        <text:list-item>
          <text:p text:style-name="P44">отправку решений на сервер, запуск кода и проверку по автоматическим тестам;</text:p>
        </text:list-item>
        <text:list-item>
          <text:p text:style-name="P44">авторизацию пользователя и хранение прогресса.</text:p>
        </text:list-item>
      </text:list>
      <text:p text:style-name="P43">Программный продукт построен по клиент‑серверной архитектуре и состоит из следующих компонентов:</text:p>
      <text:list text:style-name="L2">
        <text:list-item>
          <text:p text:style-name="P45">Клиентское приложение: десктопное приложение на Qt + QML (Qt Quick Controls) с С++ модулем доступа к API;</text:p>
        </text:list-item>
        <text:list-item>
          <text:p text:style-name="P45">Серверная часть (API): набор PHP‑скриптов, предоставляющих HTTP‑интерфейс для клиента;</text:p>
        </text:list-item>
        <text:list-item>
          <text:p text:style-name="P45">База данных: схема и стартовые данные (курсы, темы, задания, тесты).</text:p>
        </text:list-item>
      </text:list>
      <text:p text:style-name="P43">Клиентская часть реализована на Qt с использованием QML‑интерфейсов и навигации через стек страниц. Основные особенности:</text:p>
      <text:list text:style-name="L3">
        <text:list-item>
          <text:p text:style-name="P46">единое окно приложения с пользовательской панелью заголовка и областью контента;</text:p>
        </text:list-item>
        <text:list-item>
          <text:p text:style-name="P46">навигация между страницами («Курсы» → «Уроки» → «Теория» → «Задание») через StackView;</text:p>
        </text:list-item>
        <text:list-item>
          <text:p text:style-name="P46">получение данных (курсы/темы/теория/задания) из API и отображение в виде списков и карточек;</text:p>
        </text:list-item>
        <text:list-item>
          <text:p text:style-name="P46">встроенный редактор кода и блоки для запуска/проверки решения.</text:p>
        </text:list-item>
      </text:list>
      <text:p text:style-name="P43">Также в приложении предусмотрена роль преподавателя (панель учителя), позволяющая создавать курсы, темы, задания и тесты через API.</text:p>
      <text:p text:style-name="P43"><text:soft-page-break/>Сервер реализован на PHP и предоставляет отдельные конечные точки для функций приложения:</text:p>
      <text:list text:style-name="L4">
        <text:list-item>
          <text:p text:style-name="P47">авторизация и управление сессией: login.php, signup.php, recover_password.php;</text:p>
        </text:list-item>
        <text:list-item>
          <text:p text:style-name="P47">получение учебного контента: languages.php, themes.php, theory.php, tasks.php, task.php, progress.php;</text:p>
        </text:list-item>
        <text:list-item>
          <text:p text:style-name="P47">выполнение и проверка кода: run_task.php, check_task.php;</text:p>
        </text:list-item>
        <text:list-item>
          <text:p text:style-name="P47">функции преподавателя (создание контента): create_language.php, create_theme.php, create_task.php, create_test.php.</text:p>
        </text:list-item>
      </text:list>
      <text:p text:style-name="P43">Выполнение кода организовано через временный каталог на сервере:</text:p>
      <text:list text:style-name="L5">
        <text:list-item>
          <text:p text:style-name="P48">исходный код сохраняется в файле с соответствующим расширением;</text:p>
        </text:list-item>
        <text:list-item>
          <text:p text:style-name="P48">для компилируемых языков запускается компиляция с ограничением по времени;</text:p>
        </text:list-item>
        <text:list-item>
          <text:p text:style-name="P48">запуск выполняется с ограничением по времени, входные данные передаются через <text:span text:style-name="T16">стандартный вход</text:span>;</text:p>
        </text:list-item>
        <text:list-item>
          <text:p text:style-name="P48">вывод программы сравнивается с ожидаемым (для проверки по тестам).</text:p>
        </text:list-item>
      </text:list>
      <text:p text:style-name="P43">В приложении предусмотрена поддержка нескольких языков программирования: C++, Python, C#, Go. Выбор языка определяется курсом (языком), к которому относится тема и задание.</text:p>
      <text:p text:style-name="P43">База данных хранит учебный контент, пользователей и результаты обучения. Основные сущности:</text:p>
      <text:list text:style-name="L6">
        <text:list-item>
          <text:p text:style-name="P49">users: пользователи (логин, хэш пароля, роль);</text:p>
        </text:list-item>
        <text:list-item>
          <text:p text:style-name="P49">sessions: сессии авторизации (bearer‑токен с временем жизни);</text:p>
        </text:list-item>
        <text:list-item>
          <text:p text:style-name="P49">languages: курсы по языкам программирования (название, описание, изображение);</text:p>
        </text:list-item>
        <text:list-item>
          <text:p text:style-name="P49">themes: темы/уроки, привязанные к языку (lang_id), и теоретический материал;</text:p>
        </text:list-item>
        <text:list-item>
          <text:p text:style-name="P49">tasks: практические задания, привязанные к теме (theme_id);</text:p>
        </text:list-item>
        <text:list-item>
          <text:p text:style-name="P49"><text:soft-page-break/>task_tests: набор тестов для задания (вход/ожидаемый вывод);</text:p>
        </text:list-item>
        <text:list-item>
          <text:p text:style-name="P49">user_theme_progress, user_task_solved: прогресс прохождения тем и решённых заданий.</text:p>
        </text:list-item>
      </text:list>
      <text:p text:style-name="P43">Такая структура позволяет расширять систему: добавлять новые языки, темы и задания без изменения логики клиента.</text:p>
      <text:p text:style-name="P43">При проектировании интерфейса был сделан акцент на следующих принципах:</text:p>
      <text:list text:style-name="L7">
        <text:list-item>
          <text:p text:style-name="P50">видимость контента: увеличенные шрифты и размеры элементов управления для более комфортного чтения теории и заданий;</text:p>
        </text:list-item>
        <text:list-item>
          <text:p text:style-name="P50">последовательная навигация: пользователь всегда понимает, где находится, и может вернуться на шаг назад;</text:p>
        </text:list-item>
        <text:list-item>
          <text:p text:style-name="P50">разделение теории и практики: теория отображается отдельной страницей, задания — отдельной страницей с редактором;</text:p>
        </text:list-item>
        <text:list-item>
          <text:p text:style-name="P50">оперативная обратная связь: после запуска кода и проверки по тестам пользователь получает статус выполнения.</text:p>
        </text:list-item>
      </text:list>
      <text:p text:style-name="P51"/>
      <text:p text:style-name="P52">2.2. Руководство пользователя</text:p>
      <text:p text:style-name="P53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5"><text:span text:style-name="T17">Д</text:span>есктопно<text:span text:style-name="T17">е </text:span>приложени<text:span text:style-name="T17">е</text:span> для онлайн-школы по программированию</text:p>
      <text:p text:style-name="P55">Руководство пользователя</text:p>
      <text:p text:style-name="P55">Версия 1.0 </text:p>
      <text:p text:style-name="P55">2026 год</text:p>
      <text:p text:style-name="P56">СОДЕРЖАНИЕ</text:p>
      <text:p text:style-name="P57"/>
      <text:p text:style-name="P58">1. Введение</text:p>
      <text:p text:style-name="P58">2. Общие сведения о программе<text:tab/></text:p>
      <text:p text:style-name="P58">3. Рекомендуемый первичный порядок действий</text:p>
      <text:p text:style-name="P59"><text:tab/>3.1 Установка продукта</text:p>
      <text:p text:style-name="P59"><text:tab/>3.2 Открытие продукта</text:p>
      <text:p text:style-name="P59"><text:tab/>3.3 Установка приложения на <text:span text:style-name="T17">ПК</text:span></text:p>
      <text:p text:style-name="P58">4. Работа программы</text:p>
      <text:p text:style-name="P60">1. ВВЕДЕНИЕ</text:p>
      <text:p text:style-name="P42"/>
      <text:p text:style-name="P54">Цель данного руководства — помочь пользователю быстро освоить программный продукт «Школа программирования»: от первого запуска приложения и регистрации до изучения теоретических материалов, выполнения практических заданий и отслеживания личного прогресса. Продукт представляет собой учебную платформу с клиентским приложением на базе Qt/QML и серверной API-частью, которая обеспечивает хранение данных, авторизацию и работу с курсами, темами, заданиями и тестами.</text:p>
      <text:p text:style-name="P54">Данное руководство предназначено для студентов, преподавателей и администраторов учебного процесса, использующих систему как в учебной аудитории, так и при самостоятельной подготовке. Платформа позволяет выстроить последовательное обучение: пользователь выбирает курс (язык программирования), затем тему, изучает теорию, после чего переходит к практическому заданию. Такой подход помогает сочетать объяснение материала и немедленную практику, а также делает процесс обучения более наглядным и структурированным.</text:p>
      <text:p text:style-name="P54">В приложении предусмотрены отдельные сценарии работы для двух ролей — «студент» и «преподаватель». Студент получает доступ к каталогу курсов, разделам теории, практическим задачам и странице профиля с прогрессом обучения. Преподаватель, помимо стандартной навигации, может использовать специальную панель для наполнения системы: создавать новые курсы, темы, задания и тесты. Таким образом, продукт одновременно решает две задачи: обучение пользователей и удобное управление образовательным контентом.</text:p>
      <text:p text:style-name="P61">В настоящем руководстве подробно описаны общие сведения о программе, логика интерфейса и пошаговый порядок работы с основными функциями. Структура изложения построена таким образом, чтобы пользователь мог последовательно пройти все ключевые этапы: вход в систему, выбор разделов, выполнение заданий, восстановление пароля при необходимости и выход из учетной записи. Также приведены рекомендации по корректному использованию разделов и контролю результатов обучения.</text:p>
      <text:p text:style-name="P62">2. ОБЩИЕ СВЕДЕНИЯ О ПРОГРАММЕ</text:p>
      <text:p text:style-name="P63">Программный продукт «Школа программирования» представляет собой клиент-серверную обучающую систему, ориентированную на изучение программирования по курсам и темам. Архитектура решения включает три основных уровня: серверные HTTP-endpoints в каталоге /api, клиентский C++-слой взаимодействия с API в каталоге /client/App и графический интерфейс пользователя на QML в каталоге /client/DiplomaContent. Такое разделение обеспечивает удобство развития проекта: сервер отвечает за бизнес-логику и данные, а клиент — за отображение и взаимодействие с пользователем.</text:p>
      <text:p text:style-name="P63">Функционально система поддерживает:</text:p>
      <text:list text:style-name="L8">
        <text:list-item>
          <text:p text:style-name="P64">регистрацию и авторизацию пользователей;</text:p>
        </text:list-item>
        <text:list-item>
          <text:p text:style-name="P64">разделение прав по ролям «student» и «teacher»;</text:p>
        </text:list-item>
        <text:list-item>
          <text:p text:style-name="P64">просмотр списка курсов (языков программирования);</text:p>
        </text:list-item>
        <text:list-item>
          <text:p text:style-name="P64">переход к темам выбранного курса;</text:p>
        </text:list-item>
        <text:list-item>
          <text:p text:style-name="P64">просмотр теоретических материалов;</text:p>
        </text:list-item>
        <text:list-item>
          <text:p text:style-name="P64">выполнение практических заданий;</text:p>
        </text:list-item>
        <text:list-item>
          <text:p text:style-name="P64">просмотр прогресса прохождения;</text:p>
        </text:list-item>
        <text:list-item>
          <text:p text:style-name="P64">восстановление пароля;</text:p>
        </text:list-item>
        <text:list-item>
          <text:p text:style-name="P64">создание контента преподавателем (курс, тема, задание, тест).</text:p>
        </text:list-item>
      </text:list>
      <text:p text:style-name="P63">Серверная часть предоставляет набор API-методов для операций с пользователями, сессиями, курсами, темами, заданиями и прогрессом. Авторизация реализуется с помощью bearer-токена сессионного типа. При входе пользователя создается сессия, а устаревшие сессии удаляются автоматически. Это позволяет поддерживать контролируемый доступ к защищенным операциям и корректную работу личных данных в профиле.</text:p>
      <text:p text:style-name="P63">Клиентская часть запускается в окне приложения с пользовательской навигацией и поддерживает сценарий переходов через стек страниц. Основной маршрут пользователя: «Курсы → Темы → Теория → Задание». Если для выполнения целевого действия требуется авторизация, система перенаправляет <text:soft-page-break/>на страницу входа/регистрации и после успешной аутентификации возвращает пользователя в нужный раздел.</text:p>
      <text:p text:style-name="P63">Для преподавателя доступна отдельная панель с вкладками управления контентом. В ней можно добавлять новые учебные сущности через формы ввода, выбирать существующие курсы и темы из выпадающих списков, а также заполнять текстовые поля теории и условий задач. Это дает возможность использовать систему как конструктор учебных материалов без изменения исходного кода.</text:p>
      <text:p text:style-name="P63">Рекомендуемая среда эксплуатации:</text:p>
      <text:list text:style-name="L9">
        <text:list-item>
          <text:p text:style-name="P65">рабочее место пользователя с установленным клиентским приложением Qt/QML;</text:p>
        </text:list-item>
        <text:list-item>
          <text:p text:style-name="P65">стабильное сетевое <text:span text:style-name="T18">интернет-</text:span>соединение.</text:p>
        </text:list-item>
      </text:list>
      <text:p text:style-name="P63">Проект рассчитан на учебное применение, в том числе для сопровождения дисциплин по программированию, организации практических занятий, контроля прохождения тем и постепенного наращивания учебного контента силами преподавателей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fo:hyphenation-keep="page" loext:hyphenation-keep-type="column" loext:hyphenation-keep-line="tru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true" style:font-name-asian="Calibri1" style:font-family-asian="Calibri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letter-kerning="false" style:language-asian="ru" style:country-asian="RU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cm" fo:margin-right="0cm" fo:margin-top="0cm" fo:margin-bottom="0.176cm" style:contextual-spacing="false" fo:text-indent="1.251cm" style:auto-text-indent="false"/>
      <style:text-properties style:letter-kerning="false" style:font-name-asian="Calibri1" style:font-family-asian="Calibri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  <style:text-properties style:letter-kerning="false" style:font-name-asian="Calibri1" style:font-family-asian="Calibri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top="0cm" fo:margin-bottom="0.176cm" style:contextual-spacing="false"/>
      <style:text-properties style:letter-kerning="false" style:font-name-asian="Calibri1" style:font-family-asian="Calibri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794cm" fo:margin-left="2.044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771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38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ListLabel_20_39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ListLabel_20_40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41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ListLabel_20_4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ListLabel_20_4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ListLabel_20_4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ListLabel_20_4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47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48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9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0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51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52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53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54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771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74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ListLabel_20_75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ListLabel_20_76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77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ListLabel_20_78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ListLabel_20_79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ListLabel_20_8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ListLabel_20_81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83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ListLabel_20_84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ListLabel_20_85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86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ListLabel_20_87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ListLabel_20_88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ListLabel_20_89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ListLabel_20_9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Standard" style:list-style-name="">
      <style:paragraph-properties fo:margin-left="0cm" fo:margin-top="0cm" fo:margin-bottom="0cm" style:contextual-spacing="false" fo:line-height="100%" fo:text-align="center" style:justify-single-word="false" fo:text-indent="0cm" style:auto-text-indent="false"/>
      <style:text-properties fo:color="#000000" loext:opacity="100%" style:font-name="Times New Roman" fo:font-size="14pt" officeooo:paragraph-rsid="000f53be" style:font-size-asian="14pt" style:font-name-complex="Times New Roman1" style:font-size-complex="14pt">
        <loext:char-complex-color loext:theme-type="dark1" loext:color-type="theme"/>
      </style:text-properties>
    </style:style>
    <style:style style:name="MT1" style:family="text">
      <style:text-properties fo:color="#000000" loext:opacity="100%" style:font-name="Times New Roman" fo:font-size="14pt" style:font-size-asian="14pt" style:font-name-complex="Times New Roman1" style:font-size-complex="14pt">
        <loext:char-complex-color loext:theme-type="dark1" loext:color-type="theme"/>
      </style:text-properties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1"><text:page-number text:select-page="current">16</text:page-number></text:span></text:p>
      </style:footer>
      <style:footer-first>
        <text:h text:style-name="MP2" text:outline-level="2" loext:marker-style-name="MT1">Чита</text:h>
        <text:h text:style-name="MP2" text:outline-level="2" loext:marker-style-name="MT1">2026</text:h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11-14T10:11:00</meta:creation-date>
    <meta:initial-creator>bogale</meta:initial-creator>
    <dc:language>ru-RU</dc:language>
    <dc:date>2026-05-17T19:02:26.597108090</dc:date>
    <meta:editing-cycles>120</meta:editing-cycles>
    <meta:editing-duration>P2DT5H4M53S</meta:editing-duration>
    <meta:generator>LibreOffice/25.8.7.3$Linux_X86_64 LibreOffice_project/580$Build-3</meta:generator>
    <meta:document-statistic meta:table-count="2" meta:image-count="0" meta:object-count="0" meta:page-count="24" meta:paragraph-count="331" meta:word-count="3898" meta:character-count="33717" meta:non-whitespace-character-count="30169"/>
    <meta:user-defined meta:name="AppVersion">15.0000</meta:user-defined>
    <meta:template xlink:type="simple" xlink:actuate="onRequest" xlink:title="Normal.dotm" xlink:href=""/>
  </office:meta>
</office:document-meta>
</file>